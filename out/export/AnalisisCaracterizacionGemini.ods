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11.571cm"/>
    </style:style>
    <style:style style:name="co5" style:family="table-column">
      <style:table-column-properties fo:break-before="auto" style:column-width="11.044cm"/>
    </style:style>
    <style:style style:name="co6" style:family="table-column">
      <style:table-column-properties fo:break-before="auto" style:column-width="12.293cm"/>
    </style:style>
    <style:style style:name="co7" style:family="table-column">
      <style:table-column-properties fo:break-before="auto" style:column-width="8.712cm"/>
    </style:style>
    <style:style style:name="co8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20.006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951cm"/>
    </style:style>
    <style:style style:name="co12" style:family="table-column">
      <style:table-column-properties fo:break-before="auto" style:column-width="16.649cm"/>
    </style:style>
    <style:style style:name="co13" style:family="table-column">
      <style:table-column-properties fo:break-before="auto" style:column-width="4.688cm"/>
    </style:style>
    <style:style style:name="co14" style:family="table-column">
      <style:table-column-properties fo:break-before="auto" style:column-width="5.161cm"/>
    </style:style>
    <style:style style:name="co15" style:family="table-column">
      <style:table-column-properties fo:break-before="auto" style:column-width="9.906cm"/>
    </style:style>
    <style:style style:name="co16" style:family="table-column">
      <style:table-column-properties fo:break-before="auto" style:column-width="9.045cm"/>
    </style:style>
    <style:style style:name="co17" style:family="table-column">
      <style:table-column-properties fo:break-before="auto" style:column-width="18.979cm"/>
    </style:style>
    <style:style style:name="co18" style:family="table-column">
      <style:table-column-properties fo:break-before="auto" style:column-width="11.21cm"/>
    </style:style>
    <style:style style:name="co19" style:family="table-column">
      <style:table-column-properties fo:break-before="auto" style:column-width="8.186cm"/>
    </style:style>
    <style:style style:name="co20" style:family="table-column">
      <style:table-column-properties fo:break-before="auto" style:column-width="15.6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Grupo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Denominación del Grupo</text:p>
          </table:table-cell>
          <table:table-cell table:style-name="ce1" office:value-type="string">
            <text:p>Objeto u objetivo del grupo de atributos</text:p>
          </table:table-cell>
        </table:table-row>
        <table:table-row table:style-name="ro1">
          <table:table-cell office:value-type="string">
            <text:p>1. Identificación y Calidad</text:p>
          </table:table-cell>
          <table:table-cell office:value-type="string">
            <text:p>Identificar unívocamente el vehículo, su gestora y evaluar la fiabilidad del dato registrado en el sistema.</text:p>
          </table:table-cell>
        </table:table-row>
        <table:table-row table:style-name="ro1">
          <table:table-cell office:value-type="string">
            <text:p>2. Clasificación Estratégica</text:p>
          </table:table-cell>
          <table:table-cell office:value-type="string">
            <text:p>Definir el universo de inversión, la política, la geografía, el estilo y la vocación principal del fondo.</text:p>
          </table:table-cell>
        </table:table-row>
        <table:table-row table:style-name="ro1">
          <table:table-cell office:value-type="string">
            <text:p>3. Perfil de Riesgo y Horizonte</text:p>
          </table:table-cell>
          <table:table-cell office:value-type="string">
            <text:p>Cuantificar el riesgo asumido por el inversor y el tiempo recomendado para madurar la inversión.</text:p>
          </table:table-cell>
        </table:table-row>
        <table:table-row table:style-name="ro1">
          <table:table-cell office:value-type="string">
            <text:p>4. Estructura Económica y Divisa</text:p>
          </table:table-cell>
          <table:table-cell office:value-type="string">
            <text:p>Determinar los costes de entrada/salida, la política de dividendos y la exposición a riesgo divisa.</text:p>
          </table:table-cell>
        </table:table-row>
        <table:table-row table:style-name="ro1">
          <table:table-cell office:value-type="string">
            <text:p>5. Operativa y Gestión de Cartera</text:p>
          </table:table-cell>
          <table:table-cell office:value-type="string">
            <text:p>Describir cómo el gestor implementa la estrategia (uso de derivados, réplica, liquidez).</text:p>
          </table:table-cell>
        </table:table-row>
        <table:table-row table:style-name="ro1">
          <table:table-cell office:value-type="string">
            <text:p>6. Sostenibilidad (ESG)</text:p>
          </table:table-cell>
          <table:table-cell office:value-type="string">
            <text:p>Clasificar el fondo según normativas de finanzas sostenibles y criterios extra-financieros.</text:p>
          </table:table-cell>
        </table:table-row>
      </table:table>
      <table:table table:name="Actuales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4" table:default-cell-style-name="ce4"/>
        <table:table-row table:style-name="ro2">
          <table:table-cell table:style-name="ce3" office:value-type="string">
            <text:p>Nombre</text:p>
          </table:table-cell>
          <table:table-cell table:style-name="ce3" office:value-type="string">
            <text:p>Grupo</text:p>
          </table:table-cell>
          <table:table-cell table:style-name="ce3" office:value-type="string">
            <text:p>Pregunta</text:p>
          </table:table-cell>
          <table:table-cell table:style-name="ce3" office:value-type="string">
            <text:p>Criterio</text:p>
          </table:table-cell>
          <table:table-cell table:style-name="ce3" office:value-type="string">
            <text:p>Objeto</text:p>
          </table:table-cell>
          <table:table-cell table:style-name="ce3" office:value-type="string">
            <text:p>Población Actual (Ejemplos)</text:p>
          </table:table-cell>
          <table:table-cell table:style-name="ce3" office:value-type="string">
            <text:p>Mantener</text:p>
          </table:table-cell>
          <table:table-cell table:style-name="ce3" office:value-type="string">
            <text:p>ModificarCriterio</text:p>
          </table:table-cell>
          <table:table-cell table:style-name="ce3" office:value-type="string">
            <text:p>ModificarValores</text:p>
          </table:table-cell>
          <table:table-cell table:style-name="ce3" office:value-type="string">
            <text:p>NuevaPoblación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ISIN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Cuál es el identificador único del fondo?</text:p>
          </table:table-cell>
          <table:table-cell table:style-name="ce3" office:value-type="string">
            <text:p>Estándar internacional ISO 6166.</text:p>
          </table:table-cell>
          <table:table-cell table:style-name="ce3" office:value-type="string">
            <text:p>Clave primaria para cruce de datos y operaciones.</text:p>
          </table:table-cell>
          <table:table-cell table:style-name="ce3" office:value-type="string">
            <text:p>Ej: LU0123456789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und_family_id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A qué gestora (Asset Manager) pertenece?</text:p>
          </table:table-cell>
          <table:table-cell table:style-name="ce3" office:value-type="string">
            <text:p>Entidad legal que gestiona el vehículo.</text:p>
          </table:table-cell>
          <table:table-cell table:style-name="ce3" office:value-type="string">
            <text:p>Agrupar por gestora para análisis de concentración o acuerdos comerciales.</text:p>
          </table:table-cell>
          <table:table-cell table:style-name="ce3" office:value-type="string">
            <text:p>FAM_000185, Retorno Absoluto..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Ambos campos parecen mezclados o redundantes. Family parece tener nombres descriptivos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Consolidar: Gestora_ID y Gestora_Nombre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amily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A qué gestora (Asset Manager) pertenece?</text:p>
          </table:table-cell>
          <table:table-cell table:style-name="ce3" office:value-type="string">
            <text:p>Entidad legal que gestiona el vehículo.</text:p>
          </table:table-cell>
          <table:table-cell table:style-name="ce3" office:value-type="string">
            <text:p>Agrupar por gestora para análisis de concentración o acuerdos comerciales.</text:p>
          </table:table-cell>
          <table:table-cell table:style-name="ce3" office:value-type="string">
            <text:p>FAM_000185, Retorno Absoluto..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Ambos campos parecen mezclados o redundantes. Family parece tener nombres descriptivos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Consolidar: Gestora_ID y Gestora_Nombre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Profile</text:p>
          </table:table-cell>
          <table:table-cell table:style-name="ce3" office:value-type="string">
            <text:p>Perfil de Riesgo</text:p>
          </table:table-cell>
          <table:table-cell table:style-name="ce3" office:value-type="string">
            <text:p>¿Cuál es el perfil de riesgo comercial del fondo?</text:p>
          </table:table-cell>
          <table:table-cell table:style-name="ce3" office:value-type="string">
            <text:p>Etiqueta comercial asignada por gestora o analista.</text:p>
          </table:table-cell>
          <table:table-cell table:style-name="ce3" office:value-type="string">
            <text:p>Clasificación rápida para adecuación (MiFID).</text:p>
          </table:table-cell>
          <table:table-cell table:style-name="ce3" office:value-type="string">
            <text:p>Conservador, Moderado, Agresivo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Debe ser un campo calculado paramétricamente a partir del SRRI y volatilidad, no un texto libre subjetivo.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Conservador, Moderado, Dinámico, Agresivo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Qué tipo de activo gestiona a nivel granular?</text:p>
          </table:table-cell>
          <table:table-cell table:style-name="ce3" office:value-type="string">
            <text:p>Clasificación interna de la base de datos.</text:p>
          </table:table-cell>
          <table:table-cell table:style-name="ce3" office:value-type="string">
            <text:p>Aterrizar el Fund_Nature a un nivel operativo.</text:p>
          </table:table-cell>
          <table:table-cell table:style-name="ce3" office:value-type="string">
            <text:p>Absolute Return, Equity..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Hay mucho riesgo de solapamiento con Fund_Nature. Debe existir una jerarquía estricta: Nature -&gt; Type -&gt; Subtype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Revisar diccionario interno para evitar redundancias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ubtype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Qué tipo de activo gestiona a nivel granular?</text:p>
          </table:table-cell>
          <table:table-cell table:style-name="ce3" office:value-type="string">
            <text:p>Clasificación interna de la base de datos.</text:p>
          </table:table-cell>
          <table:table-cell table:style-name="ce3" office:value-type="string">
            <text:p>Aterrizar el Fund_Nature a un nivel operativo.</text:p>
          </table:table-cell>
          <table:table-cell table:style-name="ce3" office:value-type="string">
            <text:p>Absolute Return, Equity..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Hay mucho riesgo de solapamiento con Fund_Nature. Debe existir una jerarquía estricta: Nature -&gt; Type -&gt; Subtype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Revisar diccionario interno para evitar redundancias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Style_Profile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Cuál es el estilo de gestión (especialmente en RV)?</text:p>
          </table:table-cell>
          <table:table-cell table:style-name="ce3" office:value-type="string">
            <text:p>Metodología de selección de activos (Growth/Value).</text:p>
          </table:table-cell>
          <table:table-cell table:style-name="ce3" office:value-type="string">
            <text:p>Analizar el comportamiento del fondo en distintos ciclos económicos.</text:p>
          </table:table-cell>
          <table:table-cell table:style-name="ce3" office:value-type="string">
            <text:p>Momentum, Value, Growth, Blend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Hacerlo obligatorio solo para fondos de Renta Variable (Fund_Nature = RV).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alue, Growth, Blend, Momentum, Yield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Exposure_Bias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Hacia dónde tiene sesgo la cartera?</text:p>
          </table:table-cell>
          <table:table-cell table:style-name="ce3" office:value-type="string">
            <text:p>Exposición estructural mantenida.</text:p>
          </table:table-cell>
          <table:table-cell table:style-name="ce3" office:value-type="string">
            <text:p>Identificar riesgos de concentración persistente.</text:p>
          </table:table-cell>
          <table:table-cell table:style-name="ce3" office:value-type="string">
            <text:p>Absolute Return Bias..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Redefinir valores para que sean complementarios al estilo (ej: Sesgo Calidad, Sesgo Ciclico)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Data_Quality_Flag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Es fiable la información registrada?</text:p>
          </table:table-cell>
          <table:table-cell table:style-name="ce3" office:value-type="string">
            <text:p>Auditoría interna del sistema.</text:p>
          </table:table-cell>
          <table:table-cell table:style-name="ce3" office:value-type="string">
            <text:p>Filtrar registros en los cálculos de P2/P3 para evitar errores matemáticos.</text:p>
          </table:table-cell>
          <table:table-cell table:style-name="ce3" office:value-type="string">
            <text:p>OK, MISSING, HIGH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N/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SRRI_Quality_Flag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Es fiable la información registrada?</text:p>
          </table:table-cell>
          <table:table-cell table:style-name="ce3" office:value-type="string">
            <text:p>Auditoría interna del sistema.</text:p>
          </table:table-cell>
          <table:table-cell table:style-name="ce3" office:value-type="string">
            <text:p>Filtrar registros en los cálculos de P2/P3 para evitar errores matemáticos.</text:p>
          </table:table-cell>
          <table:table-cell table:style-name="ce3" office:value-type="string">
            <text:p>OK, MISSING, HIGH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N/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Is_ESG</text:p>
          </table:table-cell>
          <table:table-cell table:style-name="ce3" office:value-type="string">
            <text:p>Sostenibilidad (ESG)</text:p>
          </table:table-cell>
          <table:table-cell table:style-name="ce3" office:value-type="string">
            <text:p>¿El fondo tiene sesgo sostenible?</text:p>
          </table:table-cell>
          <table:table-cell table:style-name="ce3" office:value-type="string">
            <text:p>Marcador binario de sostenibilidad.</text:p>
          </table:table-cell>
          <table:table-cell table:style-name="ce3" office:value-type="string">
            <text:p>Filtrado rápido de fondos.</text:p>
          </table:table-cell>
          <table:table-cell table:style-name="ce3" office:value-type="string">
            <text:p>YES, nulo.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N/A</text:p>
          </table:table-cell>
          <table:table-cell table:style-name="ce3" office:value-type="string">
            <text:p>Sustituir íntegramente por Sfdr_Article (Analizado en tanda 1). Un "Sí/No" hoy en día es legalmente insuficiente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Fund_Currency</text:p>
          </table:table-cell>
          <table:table-cell table:style-name="ce3" office:value-type="string">
            <text:p>Estructura Económica</text:p>
          </table:table-cell>
          <table:table-cell table:style-name="ce3" office:value-type="string">
            <text:p>¿En qué divisa está denominado el ISIN comercial?</text:p>
          </table:table-cell>
          <table:table-cell table:style-name="ce3" office:value-type="string">
            <text:p>Divisa de la clase de acciones del fondo.</text:p>
          </table:table-cell>
          <table:table-cell table:style-name="ce3" office:value-type="string">
            <text:p>Clave para cruzar con el sistema de liquidación y pagos.</text:p>
          </table:table-cell>
          <table:table-cell table:style-name="ce3" office:value-type="string">
            <text:p>EUR, USD, GBP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Divisas ISO estándar (EUR, USD, etc.)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Accumulation_Policy</text:p>
          </table:table-cell>
          <table:table-cell table:style-name="ce3" office:value-type="string">
            <text:p>Estructura Económica</text:p>
          </table:table-cell>
          <table:table-cell table:style-name="ce3" office:value-type="string">
            <text:p>¿Qué hace el fondo con los rendimientos que genera?</text:p>
          </table:table-cell>
          <table:table-cell table:style-name="ce3" office:value-type="string">
            <text:p>Política de reparto de dividendos/cupones.</text:p>
          </table:table-cell>
          <table:table-cell table:style-name="ce3" office:value-type="string">
            <text:p>Impacta drásticamente en el cálculo de rentabilidad de la cartera (P2/P3).</text:p>
          </table:table-cell>
          <table:table-cell table:style-name="ce3" office:value-type="string">
            <text:p>ACCUMULATION, DISTRIBUTION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Acumulación, Distribución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ecommended_Holding_Period</text:p>
          </table:table-cell>
          <table:table-cell table:style-name="ce3" office:value-type="string">
            <text:p>Perfil de Riesgo</text:p>
          </table:table-cell>
          <table:table-cell table:style-name="ce3" office:value-type="string">
            <text:p>¿Cuánto tiempo mínimo debería invertirse?</text:p>
          </table:table-cell>
          <table:table-cell table:style-name="ce3" office:value-type="string">
            <text:p>Plazo recomendado en folleto.</text:p>
          </table:table-cell>
          <table:table-cell table:style-name="ce3" office:value-type="string">
            <text:p>Validar idoneidad y penalizar salidas tempranas en P3.</text:p>
          </table:table-cell>
          <table:table-cell table:style-name="ce3" office:value-type="string">
            <text:p>5Y, 3Y..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Normalizar siempre a valor numérico continuo (años) para poder hacer cálculos matemáticos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Numérico entero (ej: 1, 3, 5, 7)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Market_Cap_Focus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En qué tamaño de empresas invierte?</text:p>
          </table:table-cell>
          <table:table-cell table:style-name="ce3" office:value-type="string">
            <text:p>Capitalización bursátil media de la cartera.</text:p>
          </table:table-cell>
          <table:table-cell table:style-name="ce3" office:value-type="string">
            <text:p>Medir riesgo de liquidez y potencial de crecimiento.</text:p>
          </table:table-cell>
          <table:table-cell table:style-name="ce3" office:value-type="string">
            <text:p>Large, Mid, Small Cap (nulos en tu base)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Aplicable estrictamente si Fund_Nature es RV.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Large Cap, Mid Cap, Small Cap, Multi Cap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Sector_Focus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En qué sector económico invierte?</text:p>
          </table:table-cell>
          <table:table-cell table:style-name="ce3" office:value-type="string">
            <text:p>Concentración sectorial principal.</text:p>
          </table:table-cell>
          <table:table-cell table:style-name="ce3" office:value-type="string">
            <text:p>Medir riesgo sectorial.</text:p>
          </table:table-cell>
          <table:table-cell table:style-name="ce3" office:value-type="string">
            <text:p>Technology &amp; Innovation (muchos nulos)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Como detectamos antes, debe ser obligatorio si Investment_Universe es "Sector".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ectores GICS (Tecnología, Salud, Energía, etc.)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Hedging_Policy</text:p>
          </table:table-cell>
          <table:table-cell table:style-name="ce3" office:value-type="string">
            <text:p>Operativa y Gestión</text:p>
          </table:table-cell>
          <table:table-cell table:style-name="ce3" office:value-type="string">
            <text:p>¿Cuál es la política de cobertura de riesgos?</text:p>
          </table:table-cell>
          <table:table-cell table:style-name="ce3" office:value-type="string">
            <text:p>Uso de derivados para mitigar riesgos (divisa/mercado).</text:p>
          </table:table-cell>
          <table:table-cell table:style-name="ce3" office:value-type="string">
            <text:p>Identificar si el fondo busca neutralizar riesgos externos.</text:p>
          </table:table-cell>
          <table:table-cell table:style-name="ce3" office:value-type="string">
            <text:p>Hedged, Unhedged, nulos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Totalmente cubierto, Parcialmente cubierto, No cubierto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urrency_Hedged</text:p>
          </table:table-cell>
          <table:table-cell table:style-name="ce3" office:value-type="string">
            <text:p>Estructura Económica</text:p>
          </table:table-cell>
          <table:table-cell table:style-name="ce3" office:value-type="string">
            <text:p>¿Está la clase de acción cubierta contra el riesgo divisa?</text:p>
          </table:table-cell>
          <table:table-cell table:style-name="ce3" office:value-type="string">
            <text:p>Existencia de cobertura específica para la moneda del ISIN.</text:p>
          </table:table-cell>
          <table:table-cell table:style-name="ce3" office:value-type="string">
            <text:p>Evitar que el inversor asuma volatilidad cambiaria no deseada.</text:p>
          </table:table-cell>
          <table:table-cell table:style-name="ce3" office:value-type="string">
            <text:p>Hedged, nulos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Yes, No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Replication_Method</text:p>
          </table:table-cell>
          <table:table-cell table:style-name="ce3" office:value-type="string">
            <text:p>Operativa y Gestión</text:p>
          </table:table-cell>
          <table:table-cell table:style-name="ce3" office:value-type="string">
            <text:p>¿Cómo replica el fondo a su índice o estrategia?</text:p>
          </table:table-cell>
          <table:table-cell table:style-name="ce3" office:value-type="string">
            <text:p>Método físico vs sintético (derivados).</text:p>
          </table:table-cell>
          <table:table-cell table:style-name="ce3" office:value-type="string">
            <text:p>Evaluar el riesgo de contrapartida (mayor en réplica sintética).</text:p>
          </table:table-cell>
          <table:table-cell table:style-name="ce3" office:value-type="string">
            <text:p>Physical, Synthetic, Sampling (nulos en tu base)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Physical, Synthetic, Sampling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Derivatives_Usage</text:p>
          </table:table-cell>
          <table:table-cell table:style-name="ce3" office:value-type="string">
            <text:p>Operativa y Gestión</text:p>
          </table:table-cell>
          <table:table-cell table:style-name="ce3" office:value-type="string">
            <text:p>¿Para qué utiliza el fondo instrumentos derivados?</text:p>
          </table:table-cell>
          <table:table-cell table:style-name="ce3" office:value-type="string">
            <text:p>Finalidad del uso de derivados según folleto.</text:p>
          </table:table-cell>
          <table:table-cell table:style-name="ce3" office:value-type="string">
            <text:p>Diferenciar entre uso para cobertura vs. uso para inversión/apalancamiento.</text:p>
          </table:table-cell>
          <table:table-cell table:style-name="ce3" office:value-type="string">
            <text:p>Hedging, Investment, Both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Hedging, Investment, Both, No Usage.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Leverage_Used</text:p>
          </table:table-cell>
          <table:table-cell table:style-name="ce3" office:value-type="string">
            <text:p>Perfil de Riesgo</text:p>
          </table:table-cell>
          <table:table-cell table:style-name="ce3" office:value-type="string">
            <text:p>¿Está el fondo apalancado?</text:p>
          </table:table-cell>
          <table:table-cell table:style-name="ce3" office:value-type="string">
            <text:p>Nivel de exposición superior al 100% del patrimonio.</text:p>
          </table:table-cell>
          <table:table-cell table:style-name="ce3" office:value-type="string">
            <text:p>Medir la amplificación del riesgo en escenarios de volatilidad.</text:p>
          </table:table-cell>
          <table:table-cell table:style-name="ce3" office:value-type="string">
            <text:p>YES, NO, nulos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Un "Yes/No" es insuficiente para P3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% de apalancamiento esperado (ej: 0%, 50%, 200%)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Benchmark_Declared</text:p>
          </table:table-cell>
          <table:table-cell table:style-name="ce3" office:value-type="string">
            <text:p>Operativa y Gestión</text:p>
          </table:table-cell>
          <table:table-cell table:style-name="ce3" office:value-type="string">
            <text:p>¿Contra qué índice se compara el fondo?</text:p>
          </table:table-cell>
          <table:table-cell table:style-name="ce3" office:value-type="string">
            <text:p>Índice de referencia oficial en el folleto.</text:p>
          </table:table-cell>
          <table:table-cell table:style-name="ce3" office:value-type="string">
            <text:p>Medir el Alpha (valor añadido) del gestor.</text:p>
          </table:table-cell>
          <table:table-cell table:style-name="ce3" office:value-type="string">
            <text:p>MSCI World, Bloomberg Commodity..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N/A (Texto libre o ID de índice)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Benchmark_Type</text:p>
          </table:table-cell>
          <table:table-cell table:style-name="ce3" office:value-type="string">
            <text:p>Operativa y Gestión</text:p>
          </table:table-cell>
          <table:table-cell table:style-name="ce3" office:value-type="string">
            <text:p>¿Qué rol juega el índice de referencia?</text:p>
          </table:table-cell>
          <table:table-cell table:style-name="ce3" office:value-type="string">
            <text:p>Tipo de uso del benchmark (objetivo vs comparativo).</text:p>
          </table:table-cell>
          <table:table-cell table:style-name="ce3" office:value-type="string">
            <text:p>Determinar si el gestor está obligado a seguir al índice o solo a batirlo.</text:p>
          </table:table-cell>
          <table:table-cell table:style-name="ce3" office:value-type="string">
            <text:p>REFERENCE_INDEX, TARGET_INDEX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Reference, Target, Hurdle Rate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Liquidity_Profile</text:p>
          </table:table-cell>
          <table:table-cell table:style-name="ce3" office:value-type="string">
            <text:p>Operativa y Gestión</text:p>
          </table:table-cell>
          <table:table-cell table:style-name="ce3" office:value-type="string">
            <text:p>¿Con qué frecuencia puede el inversor retirar su dinero?</text:p>
          </table:table-cell>
          <table:table-cell table:style-name="ce3" office:value-type="string">
            <text:p>Ventana de liquidez del fondo.</text:p>
          </table:table-cell>
          <table:table-cell table:style-name="ce3" office:value-type="string">
            <text:p>Evaluar el riesgo de "mismatch" entre los activos y las salidas de flujo.</text:p>
          </table:table-cell>
          <table:table-cell table:style-name="ce3" office:value-type="string">
            <text:p>Daily, Weekly, Fortnightly, Monthly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Diaria, Semanal, Quincenal, Mensual, Trimestral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Distribution_Frequency</text:p>
          </table:table-cell>
          <table:table-cell table:style-name="ce3" office:value-type="string">
            <text:p>Estructura Económica</text:p>
          </table:table-cell>
          <table:table-cell table:style-name="ce3" office:value-type="string">
            <text:p>¿Cada cuánto tiempo reparte dividendos?</text:p>
          </table:table-cell>
          <table:table-cell table:style-name="ce3" office:value-type="string">
            <text:p>Calendario de pagos (si aplica).</text:p>
          </table:table-cell>
          <table:table-cell table:style-name="ce3" office:value-type="string">
            <text:p>Planificación de flujos de caja para el inversor.</text:p>
          </table:table-cell>
          <table:table-cell table:style-name="ce3" office:value-type="string">
            <text:p>Annual, Semi-Annual, Quarterly, Monthly.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í. Solo debe informarse si Accumulation_Policy = Distribution.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Anual, Semestral, Trimestral, Mensual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Strategy</text:p>
          </table:table-cell>
          <table:table-cell table:style-name="ce3" office:value-type="string">
            <text:p>Clasificación Estratégica</text:p>
          </table:table-cell>
          <table:table-cell table:style-name="ce3" office:value-type="string">
            <text:p>¿Cuál es la estrategia específica de inversión?</text:p>
          </table:table-cell>
          <table:table-cell table:style-name="ce3" office:value-type="string">
            <text:p>Descripción narrativa o técnica de la gestión.</text:p>
          </table:table-cell>
          <table:table-cell table:style-name="ce3" office:value-type="string">
            <text:p>Complementar al Type con la táctica empleada.</text:p>
          </table:table-cell>
          <table:table-cell table:style-name="ce3" office:value-type="string">
            <text:p>Long/Short, Global Macro, etc.</text:p>
          </table:table-cell>
          <table:table-cell table:style-name="ce3" office:value-type="string">
            <text:p>Sí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N/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Heuristic_Block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A qué bloque lógico pertenece el fondo para el motor de reglas?</text:p>
          </table:table-cell>
          <table:table-cell table:style-name="ce3" office:value-type="string">
            <text:p>Clasificación técnica del algoritmo de ingesta.</text:p>
          </table:table-cell>
          <table:table-cell table:style-name="ce3" office:value-type="string">
            <text:p>Control interno del proceso de ETL (Extracción y Carga).</text:p>
          </table:table-cell>
          <table:table-cell table:style-name="ce3" office:value-type="string">
            <text:p>RESTANTES, CORE, nulos.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N/A</text:p>
          </table:table-cell>
          <table:table-cell table:style-name="ce3" office:value-type="string">
            <text:p>Eliminar de la vista de negocio. Son metadatos técnicos que ensucian el modelo analítico.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>
            <text:p>Heuristic_Core</text:p>
          </table:table-cell>
          <table:table-cell table:style-name="ce3" office:value-type="string">
            <text:p>Identificación y Calidad</text:p>
          </table:table-cell>
          <table:table-cell table:style-name="ce3" office:value-type="string">
            <text:p>¿A qué bloque lógico pertenece el fondo para el motor de reglas?</text:p>
          </table:table-cell>
          <table:table-cell table:style-name="ce3" office:value-type="string">
            <text:p>Clasificación técnica del algoritmo de ingesta.</text:p>
          </table:table-cell>
          <table:table-cell table:style-name="ce3" office:value-type="string">
            <text:p>Control interno del proceso de ETL (Extracción y Carga).</text:p>
          </table:table-cell>
          <table:table-cell table:style-name="ce3" office:value-type="string">
            <text:p>RESTANTES, CORE, nulos.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N/A</text:p>
          </table:table-cell>
          <table:table-cell table:style-name="ce3" office:value-type="string">
            <text:p>Eliminar de la vista de negocio. Son metadatos técnicos que ensucian el modelo analítico.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Fund_Nature</text:p>
          </table:table-cell>
          <table:table-cell office:value-type="string">
            <text:p>Clasificación Estratégica</text:p>
          </table:table-cell>
          <table:table-cell office:value-type="string">
            <text:p>¿Cuál es la naturaleza general del activo?</text:p>
          </table:table-cell>
          <table:table-cell office:value-type="string">
            <text:p>Clase de activo macro subyacente.</text:p>
          </table:table-cell>
          <table:table-cell office:value-type="string">
            <text:p>Agrupar fondos a primer nivel macroeconómico.</text:p>
          </table:table-cell>
          <table:table-cell office:value-type="string">
            <text:p>Alternativo, Restantes...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Sí (Falta granularidad básica)</text:p>
          </table:table-cell>
          <table:table-cell office:value-type="string">
            <text:p>Renta Variable, Renta Fija, Mixto, Alternativo, Monetario.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Theme</text:p>
          </table:table-cell>
          <table:table-cell office:value-type="string">
            <text:p>Clasificación Estratégica</text:p>
          </table:table-cell>
          <table:table-cell office:value-type="string">
            <text:p>¿En qué temática concreta invierte el fondo?</text:p>
          </table:table-cell>
          <table:table-cell office:value-type="string">
            <text:p>Foco temático declarado en folleto.</text:p>
          </table:table-cell>
          <table:table-cell office:value-type="string">
            <text:p>Identificar tendencias seculares de inversión.</text:p>
          </table:table-cell>
          <table:table-cell office:value-type="string">
            <text:p>Artificial Intelligence, nulos...</text:p>
          </table:table-cell>
          <table:table-cell office:value-type="string">
            <text:p>Sí</text:p>
          </table:table-cell>
          <table:table-cell office:value-type="string">
            <text:p>Sí. Un fondo global no temático no debe ser "nulo", sino "Core/General".</text:p>
          </table:table-cell>
          <table:table-cell office:value-type="string">
            <text:p>Sí. Reducir nulos y estandarizar.</text:p>
          </table:table-cell>
          <table:table-cell office:value-type="string">
            <text:p>Core/General, Tecnología, Salud, Ecología, Demografía.</text:p>
          </table:table-cell>
          <table:table-cell table:number-columns-repeated="1014"/>
        </table:table-row>
        <table:table-row table:style-name="ro2">
          <table:table-cell office:value-type="string">
            <text:p>Geography</text:p>
          </table:table-cell>
          <table:table-cell office:value-type="string">
            <text:p>Clasificación Estratégica</text:p>
          </table:table-cell>
          <table:table-cell office:value-type="string">
            <text:p>¿Cuál es la exposición regional del riesgo?</text:p>
          </table:table-cell>
          <table:table-cell office:value-type="string">
            <text:p>Domicilio de los emisores en cartera.</text:p>
          </table:table-cell>
          <table:table-cell office:value-type="string">
            <text:p>Medir riesgo país/región.</text:p>
          </table:table-cell>
          <table:table-cell office:value-type="string">
            <text:p>EEUU, Europa, Global...</text:p>
          </table:table-cell>
          <table:table-cell office:value-type="string">
            <text:p>Sí</text:p>
          </table:table-cell>
          <table:table-cell office:value-type="string">
            <text:p>Sí. Debe basarse en la cartera real, no solo en el "Fund Name" (que puede engañar).</text:p>
          </table:table-cell>
          <table:table-cell office:value-type="string">
            <text:p>Sí</text:p>
          </table:table-cell>
          <table:table-cell office:value-type="string">
            <text:p>Global, Norteamérica, Europa, Emergentes, Asia-Pacífico, Latam.</text:p>
          </table:table-cell>
          <table:table-cell table:number-columns-repeated="1014"/>
        </table:table-row>
        <table:table-row table:style-name="ro2">
          <table:table-cell office:value-type="string">
            <text:p>SRRI</text:p>
          </table:table-cell>
          <table:table-cell office:value-type="string">
            <text:p>Perfil de Riesgo</text:p>
          </table:table-cell>
          <table:table-cell office:value-type="string">
            <text:p>¿Qué volatilidad histórica tiene el fondo?</text:p>
          </table:table-cell>
          <table:table-cell office:value-type="string">
            <text:p>Normativa UCITS (volatilidad a 5 años).</text:p>
          </table:table-cell>
          <table:table-cell office:value-type="string">
            <text:p>Estandarizar el riesgo para el inversor minorista.</text:p>
          </table:table-cell>
          <table:table-cell office:value-type="string">
            <text:p>1.0 a 7.0</text:p>
          </table:table-cell>
          <table:table-cell office:value-type="string">
            <text:p>Sí</text:p>
          </table:table-cell>
          <table:table-cell office:value-type="string">
            <text:p>Sí. Evolucionar hacia el nuevo estándar PRIIPs SRI.</text:p>
          </table:table-cell>
          <table:table-cell office:value-type="string">
            <text:p>Sí</text:p>
          </table:table-cell>
          <table:table-cell office:value-type="string">
            <text:p>SRI: 1, 2, 3, 4, 5, 6, 7.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Sfdr_Article</text:p>
          </table:table-cell>
          <table:table-cell office:value-type="string">
            <text:p>Sostenibilidad (ESG)</text:p>
          </table:table-cell>
          <table:table-cell office:value-type="string">
            <text:p>¿Qué nivel de compromiso ESG legal tiene?</text:p>
          </table:table-cell>
          <table:table-cell office:value-type="string">
            <text:p>Normativa europea SFDR.</text:p>
          </table:table-cell>
          <table:table-cell office:value-type="string">
            <text:p>Cumplimiento regulatorio de sostenibilidad.</text:p>
          </table:table-cell>
          <table:table-cell office:value-type="string">
            <text:p>Art 6, Art 8, Art 9 (inferido)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  <table:table-cell office:value-type="string">
            <text:p>Evaluar fricción de capital al operar.</text:p>
          </table:table-cell>
          <table:table-cell office:value-type="string">
            <text:p>0.0, 2.0, 4.0...</text:p>
          </table:table-cell>
          <table:table-cell office:value-type="string">
            <text:p>Sí</text:p>
          </table:table-cell>
          <table:table-cell office:value-type="string">
            <text:p>Sí. Se debe registrar el coste real aplicado (descuentos institucionales), no solo el máximo legal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Entry_Fee_Pct / Exit_Fee_Pct</text:p>
          </table:table-cell>
          <table:table-cell office:value-type="string">
            <text:p>Estructura Económica</text:p>
          </table:table-cell>
          <table:table-cell office:value-type="string">
            <text:p>¿Cuánto cuesta suscribir/reembolsar?</text:p>
          </table:table-cell>
          <table:table-cell office:value-type="string">
            <text:p>Folleto de comercialización máxima.</text:p>
          </table:table-cell>
        </table:table-row>
        <table:table-row table:style-name="ro2" table:visibility="filter">
          <table:table-cell office:value-type="string">
            <text:p>Investment_Universe</text:p>
          </table:table-cell>
          <table:table-cell office:value-type="string">
            <text:p>Clasificación Estratégica</text:p>
          </table:table-cell>
          <table:table-cell office:value-type="string">
            <text:p>¿Cuál es el sesgo de selección del universo?</text:p>
          </table:table-cell>
          <table:table-cell office:value-type="string">
            <text:p>Amplitud del mandato del gestor.</text:p>
          </table:table-cell>
          <table:table-cell office:value-type="string">
            <text:p>Diferenciar fondos nicho de fondos generalistas.</text:p>
          </table:table-cell>
          <table:table-cell office:value-type="string">
            <text:p>Regional, Sector...</text:p>
          </table:table-cell>
          <table:table-cell office:value-type="string">
            <text:p>Sí</text:p>
          </table:table-cell>
          <table:table-cell office:value-type="string">
            <text:p>Sí. Si es "Sector", el campo "Sector_Focus" debe ser obligatorio.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Portfolio_Currency</text:p>
          </table:table-cell>
          <table:table-cell office:value-type="string">
            <text:p>Estructura Económica</text:p>
          </table:table-cell>
          <table:table-cell office:value-type="string">
            <text:p>¿En qué divisa están los activos subyacentes?</text:p>
          </table:table-cell>
          <table:table-cell office:value-type="string">
            <text:p>Divisa base de los activos invertidos.</text:p>
          </table:table-cell>
          <table:table-cell office:value-type="string">
            <text:p>Medir el riesgo divisa real.</text:p>
          </table:table-cell>
          <table:table-cell office:value-type="string">
            <text:p>EUR, USD...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101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ñadir" table:style-name="ta1" table:print="false"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number-columns-repeated="1018" table:default-cell-style-name="Default"/>
        <table:table-row table:style-name="ro1">
          <table:table-cell office:value-type="string">
            <text:p>Nombre</text:p>
          </table:table-cell>
          <table:table-cell table:style-name="ce1" office:value-type="string">
            <text:p>Grupo</text:p>
          </table:table-cell>
          <table:table-cell table:style-name="ce1" office:value-type="string">
            <text:p>Pregunta</text:p>
          </table:table-cell>
          <table:table-cell table:style-name="ce1" office:value-type="string">
            <text:p>Criterio</text:p>
          </table:table-cell>
          <table:table-cell table:style-name="ce1" office:value-type="string">
            <text:p>Objeto</text:p>
          </table:table-cell>
          <table:table-cell table:style-name="ce1" office:value-type="string">
            <text:p>Población Propuesta</text:p>
          </table:table-cell>
          <table:table-cell table:number-columns-repeated="1018"/>
        </table:table-row>
        <table:table-row table:style-name="ro1">
          <table:table-cell office:value-type="string">
            <text:p>Ongoing_Charges (TER)</text:p>
          </table:table-cell>
          <table:table-cell office:value-type="string">
            <text:p>Estructura Económica</text:p>
          </table:table-cell>
          <table:table-cell office:value-type="string">
            <text:p>¿Cuál es el coste total recurrente anual del fondo?</text:p>
          </table:table-cell>
          <table:table-cell office:value-type="string">
            <text:p>Gastos corrientes extraídos del KIID/KID.</text:p>
          </table:table-cell>
          <table:table-cell office:value-type="string">
            <text:p>Es el indicador más crítico para predecir la rentabilidad neta a largo plazo (supera en importancia a Entry/Exit fees).</text:p>
          </table:table-cell>
          <table:table-cell office:value-type="string">
            <text:p>Valores numéricos decimales (ej: 0.85, 1.50).</text:p>
          </table:table-cell>
          <table:table-cell table:number-columns-repeated="1018"/>
        </table:table-row>
        <table:table-row table:style-name="ro1">
          <table:table-cell office:value-type="string">
            <text:p>AUM_Base_Currency</text:p>
          </table:table-cell>
          <table:table-cell office:value-type="string">
            <text:p>Identificación y Calidad</text:p>
          </table:table-cell>
          <table:table-cell office:value-type="string">
            <text:p>¿Cuál es el patrimonio total gestionado (tamaño)?</text:p>
          </table:table-cell>
          <table:table-cell office:value-type="string">
            <text:p>Activos bajo gestión (AUM) en millones.</text:p>
          </table:table-cell>
          <table:table-cell office:value-type="string">
            <text:p>Evaluar riesgo de liquidez y viabilidad comercial (fondos muy pequeños tienen riesgo de cierre).</text:p>
          </table:table-cell>
          <table:table-cell office:value-type="string">
            <text:p>Valores numéricos enteros (Millones).</text:p>
          </table:table-cell>
          <table:table-cell table:number-columns-repeated="1018"/>
        </table:table-row>
        <table:table-row table:style-name="ro1">
          <table:table-cell office:value-type="string">
            <text:p>Active_Share</text:p>
          </table:table-cell>
          <table:table-cell office:value-type="string">
            <text:p>Operativa y Gestión</text:p>
          </table:table-cell>
          <table:table-cell office:value-type="string">
            <text:p>¿Cuánto difiere la cartera real frente a su Benchmark?</text:p>
          </table:table-cell>
          <table:table-cell office:value-type="string">
            <text:p>Solapamiento de activos frente al índice.</text:p>
          </table:table-cell>
          <table:table-cell office:value-type="string">
            <text:p>Diferenciar gestión activa real de fondos "abraza-índices" (closet indexers) caros.</text:p>
          </table:table-cell>
          <table:table-cell office:value-type="string">
            <text:p>Porcentaje (0% a 100%).</text:p>
          </table:table-cell>
          <table:table-cell table:number-columns-repeated="1018"/>
        </table:table-row>
        <table:table-row table:style-name="ro1">
          <table:table-cell office:value-type="string">
            <text:p>Management_Tenure</text:p>
          </table:table-cell>
          <table:table-cell office:value-type="string">
            <text:p>Identificación y Calidad</text:p>
          </table:table-cell>
          <table:table-cell office:value-type="string">
            <text:p>¿Cuántos años lleva el gestor actual a los mandos?</text:p>
          </table:table-cell>
          <table:table-cell office:value-type="string">
            <text:p>Antigüedad del Lead Portfolio Manager.</text:p>
          </table:table-cell>
          <table:table-cell office:value-type="string">
            <text:p>El track record del fondo no sirve de nada si el gestor que lo consiguió se marchó el mes pasado.</text:p>
          </table:table-cell>
          <table:table-cell office:value-type="string">
            <text:p>Años (ej: 1.5, 5.0, 10.0).</text:p>
          </table:table-cell>
          <table:table-cell table:number-columns-repeated="1018"/>
        </table:table-row>
        <table:table-row table:style-name="ro1">
          <table:table-cell office:value-type="string">
            <text:p>Duration_Modified</text:p>
          </table:table-cell>
          <table:table-cell office:value-type="string">
            <text:p>Operativa y Gestión</text:p>
          </table:table-cell>
          <table:table-cell office:value-type="string">
            <text:p>¿Cuál es la sensibilidad a los tipos de interés?</text:p>
          </table:table-cell>
          <table:table-cell office:value-type="string">
            <text:p>Duración modificada (solo aplicable a Renta Fija).</text:p>
          </table:table-cell>
          <table:table-cell office:value-type="string">
            <text:p>Imprescindible para medir el riesgo en fondos de bonos frente a políticas de bancos centrales.</text:p>
          </table:table-cell>
          <table:table-cell office:value-type="string">
            <text:p>Valores numéricos decimales (ej: 5.2).</text:p>
          </table:table-cell>
          <table:table-cell table:number-columns-repeated="1018"/>
        </table:table-row>
      </table:table>
      <table:table table:name="DiccionarioDeValores" table:style-name="ta1" table:print="false">
        <table:table-column table:style-name="co19" table:default-cell-style-name="ce2"/>
        <table:table-column table:style-name="co20" table:default-cell-style-name="ce2"/>
        <table:table-row table:style-name="ro1">
          <table:table-cell office:value-type="string">
            <text:p>Atributo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, Renta Fija, Mixto, Alternativo, Monetario</text:p>
          </table:table-cell>
        </table:table-row>
        <table:table-row table:style-name="ro1">
          <table:table-cell office:value-type="string">
            <text:p>Investment_Universe</text:p>
          </table:table-cell>
          <table:table-cell office:value-type="string">
            <text:p>Global, Regional, Sector, Temático</text:p>
          </table:table-cell>
        </table:table-row>
        <table:table-row table:style-name="ro1">
          <table:table-cell office:value-type="string">
            <text:p>Theme</text:p>
          </table:table-cell>
          <table:table-cell office:value-type="string">
            <text:p>Core/General, Tecnología, Salud, Ecología, Demografía, Infraestructuras, Inmobiliario, Megatendencias</text:p>
          </table:table-cell>
        </table:table-row>
        <table:table-row table:style-name="ro1">
          <table:table-cell office:value-type="string">
            <text:p>Geography</text:p>
          </table:table-cell>
          <table:table-cell office:value-type="string">
            <text:p>Global, Norteamérica, Europa, Mercados Emergentes, Asia-Pacífico, Latinoamérica, Japón</text:p>
          </table:table-cell>
        </table:table-row>
        <table:table-row table:style-name="ro4">
          <table:table-cell office:value-type="string">
            <text:p>Sector_Focus</text:p>
          </table:table-cell>
          <table:table-cell office:value-type="string">
            <text:p>Tecnología, Salud, Energía, Finanzas, Consumo Discrecional, Consumo Básico, Materiales, Industria, Telecomunicaciones, Servicios Públicos, Inmobiliario</text:p>
          </table:table-cell>
        </table:table-row>
        <table:table-row table:style-name="ro1">
          <table:table-cell office:value-type="string">
            <text:p>Market_Cap_Focus</text:p>
          </table:table-cell>
          <table:table-cell office:value-type="string">
            <text:p>Large Cap, Mid Cap, Small Cap, Multi Cap</text:p>
          </table:table-cell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Value, Growth, Blend, Momentum, Yield</text:p>
          </table:table-cell>
        </table:table-row>
        <table:table-row table:style-name="ro1">
          <table:table-cell office:value-type="string">
            <text:p>Exposure_Bias</text:p>
          </table:table-cell>
          <table:table-cell office:value-type="string">
            <text:p>Sesgo Calidad, Sesgo Cíclico, Sesgo Defensivo, Sesgo Retorno Absoluto, Sin Sesgo</text:p>
          </table:table-cell>
        </table:table-row>
        <table:table-row table:style-name="ro1">
          <table:table-cell office:value-type="string">
            <text:p>SRRI</text:p>
          </table:table-cell>
          <table:table-cell office:value-type="string">
            <text:p>1, 2, 3, 4, 5, 6, 7</text:p>
          </table:table-cell>
        </table:table-row>
        <table:table-row table:style-name="ro1">
          <table:table-cell office:value-type="string">
            <text:p>Profile</text:p>
          </table:table-cell>
          <table:table-cell office:value-type="string">
            <text:p>Conservador, Moderado, Dinámico, Agresivo</text:p>
          </table:table-cell>
        </table:table-row>
        <table:table-row table:style-name="ro1">
          <table:table-cell office:value-type="string">
            <text:p>Sfdr_Article</text:p>
          </table:table-cell>
          <table:table-cell office:value-type="string">
            <text:p>Artículo 6, Artículo 8, Artículo 9</text:p>
          </table:table-cell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umulación, Distribución</text:p>
          </table:table-cell>
        </table:table-row>
        <table:table-row table:style-name="ro1">
          <table:table-cell office:value-type="string">
            <text:p>Distribution_Frequency</text:p>
          </table:table-cell>
          <table:table-cell office:value-type="string">
            <text:p>Anual, Semestral, Trimestral, Mensual</text:p>
          </table:table-cell>
        </table:table-row>
        <table:table-row table:style-name="ro1">
          <table:table-cell office:value-type="string">
            <text:p>Fund_Currency</text:p>
          </table:table-cell>
          <table:table-cell office:value-type="string">
            <text:p>EUR, USD, GBP, JPY, CHF, CAD, AUD, NOK, SEK</text:p>
          </table:table-cell>
        </table:table-row>
        <table:table-row table:style-name="ro1">
          <table:table-cell office:value-type="string">
            <text:p>Portfolio_Currency</text:p>
          </table:table-cell>
          <table:table-cell office:value-type="string">
            <text:p>EUR, USD, GBP, JPY, CHF, CAD, AUD, NOK, SEK</text:p>
          </table:table-cell>
        </table:table-row>
        <table:table-row table:style-name="ro1">
          <table:table-cell office:value-type="string">
            <text:p>Currency_Hedged</text:p>
          </table:table-cell>
          <table:table-cell office:value-type="string">
            <text:p>Yes, No</text:p>
          </table:table-cell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Totalmente cubierto, Parcialmente cubierto, No cubierto</text:p>
          </table:table-cell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, Synthetic, Sampling</text:p>
          </table:table-cell>
        </table:table-row>
        <table:table-row table:style-name="ro1">
          <table:table-cell office:value-type="string">
            <text:p>Derivatives_Usage</text:p>
          </table:table-cell>
          <table:table-cell office:value-type="string">
            <text:p>Hedging, Investment, Both, No Usage</text:p>
          </table:table-cell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ference, Target, Hurdle Rate</text:p>
          </table:table-cell>
        </table:table-row>
        <table:table-row table:style-name="ro1">
          <table:table-cell office:value-type="string">
            <text:p>Liquidity_Profile</text:p>
          </table:table-cell>
          <table:table-cell office:value-type="string">
            <text:p>Diaria, Semanal, Quincenal, Mensual, Trimestral</text:p>
          </table:table-cell>
        </table:table-row>
      </table:table>
      <table:database-ranges>
        <table:database-range table:name="__Anonymous_Sheet_DB__2" table:target-range-address="Actuales.A1:Actuales.J38" table:display-filter-buttons="true">
          <table:filter>
            <table:filter-condition table:field-number="8" table:value="Sí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1">01/04/2026</text:date>, <text:time>22:2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ntonio Cormenzana Elosua</meta:initial-creator>
    <meta:creation-date>2026-04-01T14:39:04.16</meta:creation-date>
    <dc:date>2026-04-01T22:14:30.93</dc:date>
    <dc:creator>Jose Antonio Cormenzana Elosua</dc:creator>
    <meta:editing-duration>PT7H35M26S</meta:editing-duration>
    <meta:editing-cycles>3</meta:editing-cycles>
    <meta:generator>OpenOffice/4.1.16$Win32 OpenOffice.org_project/4116m3$Build-9816</meta:generator>
    <meta:document-statistic meta:table-count="4" meta:cell-count="1488" meta:object-count="0"/>
  </office:meta>
</office:document-meta>
</file>