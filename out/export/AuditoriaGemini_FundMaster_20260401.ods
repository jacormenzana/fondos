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93cm"/>
    </style:style>
    <style:style style:name="co2" style:family="table-column">
      <style:table-column-properties fo:break-before="auto" style:column-width="7.713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5.105cm"/>
    </style:style>
    <style:style style:name="co5" style:family="table-column">
      <style:table-column-properties fo:break-before="auto" style:column-width="3.4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ValoresInconsistent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1" table:number-columns-repeated="1019" table:default-cell-style-name="Default"/>
        <table:table-row table:style-name="ro1">
          <table:table-cell office:value-type="string">
            <text:p>Nombre del atributo A</text:p>
          </table:table-cell>
          <table:table-cell office:value-type="string">
            <text:p>Valor del atributo A</text:p>
          </table:table-cell>
          <table:table-cell office:value-type="string">
            <text:p>Nombre del atributo B</text:p>
          </table:table-cell>
          <table:table-cell office:value-type="string">
            <text:p>Valor del atributo B</text:p>
          </table:table-cell>
          <table:table-cell office:value-type="string">
            <text:p>Número de relaciones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string">
            <text:p>SRRI</text:p>
          </table:table-cell>
          <table:table-cell table:style-name="Default"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string">
            <text:p>Benchmark_Declared</text:p>
          </table:table-cell>
          <table:table-cell office:value-type="string">
            <text:p>Bloomberg Commodity Index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SRRI</text:p>
          </table:table-cell>
          <table:table-cell table:style-name="Default"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Hedging_Policy</text:p>
          </table:table-cell>
          <table:table-cell office:value-type="string">
            <text:p>UNHEDGED</text:p>
          </table:table-cell>
          <table:table-cell office:value-type="string">
            <text:p>Currency_Hedged</text:p>
          </table:table-cell>
          <table:table-cell office:value-type="string">
            <text:p>EUR</text:p>
          </table:table-cell>
          <table:table-cell office:value-type="float" office:value="58">
            <text:p>58</text:p>
          </table:table-cell>
          <table:table-cell table:number-columns-repeated="1019"/>
        </table:table-row>
        <table:table-row table:style-name="ro1">
          <table:table-cell office:value-type="string">
            <text:p>Accumulation_Policy</text:p>
          </table:table-cell>
          <table:table-cell office:value-type="string">
            <text:p>ACCUMULATION</text:p>
          </table:table-cell>
          <table:table-cell office:value-type="string">
            <text:p>Distribution_Frequency</text:p>
          </table:table-cell>
          <table:table-cell office:value-type="string">
            <text:p>QUARTERLY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Profile</text:p>
          </table:table-cell>
          <table:table-cell office:value-type="string">
            <text:p>Conservador</text:p>
          </table:table-cell>
          <table:table-cell office:value-type="string">
            <text:p>Derivatives_Usage</text:p>
          </table:table-cell>
          <table:table-cell office:value-type="string">
            <text:p>HIGH_LEVERAG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Is_ESG</text:p>
          </table:table-cell>
          <table:table-cell office:value-type="string">
            <text:p>0.0</text:p>
          </table:table-cell>
          <table:table-cell office:value-type="string">
            <text:p>Sfdr_Article</text:p>
          </table:table-cell>
          <table:table-cell table:style-name="Default" office:value-type="float" office:value="9">
            <text:p>9</text:p>
          </table:table-cell>
          <table:table-cell office:value-type="float" office:value="47">
            <text:p>47</text:p>
          </table:table-cell>
          <table:table-cell table:number-columns-repeated="1019"/>
        </table:table-row>
        <table:table-row table:style-name="ro1">
          <table:table-cell office:value-type="string">
            <text:p>Replication_Method</text:p>
          </table:table-cell>
          <table:table-cell office:value-type="string">
            <text:p>PHYSICAL</text:p>
          </table:table-cell>
          <table:table-cell office:value-type="string">
            <text:p>Type</text:p>
          </table:table-cell>
          <table:table-cell office:value-type="string">
            <text:p>Absolute Return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Market_Cap_Focus</text:p>
          </table:table-cell>
          <table:table-cell office:value-type="string">
            <text:p>Large Cap</text:p>
          </table:table-cell>
          <table:table-cell office:value-type="string">
            <text:p>Subtype</text:p>
          </table:table-cell>
          <table:table-cell office:value-type="string">
            <text:p>Micro Cap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 office:value-type="string">
            <text:p>Nombre del atributo A</text:p>
          </table:table-cell>
          <table:table-cell office:value-type="string">
            <text:p>Valor del atributo A</text:p>
          </table:table-cell>
          <table:table-cell office:value-type="string">
            <text:p>Nombre del atributo B</text:p>
          </table:table-cell>
          <table:table-cell office:value-type="string">
            <text:p>Valor del atributo B</text:p>
          </table:table-cell>
          <table:table-cell office:value-type="string">
            <text:p>Número de relaciones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Type</text:p>
          </table:table-cell>
          <table:table-cell office:value-type="string">
            <text:p>Monetario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Subtype</text:p>
          </table:table-cell>
          <table:table-cell office:value-type="string">
            <text:p>Monetario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Investment_Universe</text:p>
          </table:table-cell>
          <table:table-cell office:value-type="string">
            <text:p>Liquidity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Profile</text:p>
          </table:table-cell>
          <table:table-cell office:value-type="string">
            <text:p>Conservador</text:p>
          </table:table-cell>
          <table:table-cell office:value-type="float" office:value="73">
            <text:p>73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string">
            <text:p>Profile</text:p>
          </table:table-cell>
          <table:table-cell office:value-type="string">
            <text:p>Agresivo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string">
            <text:p>Derivatives_Usage</text:p>
          </table:table-cell>
          <table:table-cell office:value-type="string">
            <text:p>HIGH_LEVERAGE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string">
            <text:p>SRRI</text:p>
          </table:table-cell>
          <table:table-cell table:style-name="ce2"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string">
            <text:p>SRRI</text:p>
          </table:table-cell>
          <table:table-cell table:style-name="ce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Type</text:p>
          </table:table-cell>
          <table:table-cell office:value-type="string">
            <text:p>Target Date</text:p>
          </table:table-cell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Style_Profile</text:p>
          </table:table-cell>
          <table:table-cell office:value-type="string">
            <text:p>Value</text:p>
          </table:table-cell>
          <table:table-cell office:value-type="string">
            <text:p>Fund_Nature</text:p>
          </table:table-cell>
          <table:table-cell office:value-type="string">
            <text:p>Renta Fija</text:p>
          </table:table-cell>
          <table:table-cell office:value-type="float" office:value="52">
            <text:p>52</text:p>
          </table:table-cell>
          <table:table-cell table:number-columns-repeated="1019"/>
        </table:table-row>
        <table:table-row table:style-name="ro1">
          <table:table-cell office:value-type="string">
            <text:p>Market_Cap_Focus</text:p>
          </table:table-cell>
          <table:table-cell office:value-type="string">
            <text:p>Large Cap</text:p>
          </table:table-cell>
          <table:table-cell office:value-type="string">
            <text:p>Fund_Nature</text:p>
          </table:table-cell>
          <table:table-cell office:value-type="string">
            <text:p>Renta Fija</text:p>
          </table:table-cell>
          <table:table-cell office:value-type="float" office:value="89">
            <text:p>89</text:p>
          </table:table-cell>
          <table:table-cell table:number-columns-repeated="1019"/>
        </table:table-row>
        <table:table-row table:style-name="ro2">
          <table:table-cell office:value-type="string">
            <text:p>Accumulation_Policy</text:p>
          </table:table-cell>
          <table:table-cell office:value-type="string">
            <text:p>ACCUMULATION</text:p>
          </table:table-cell>
          <table:table-cell office:value-type="string">
            <text:p>Distribution_Frequency</text:p>
          </table:table-cell>
          <table:table-cell office:value-type="string">
            <text:p>ANNUAL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2">
          <table:table-cell office:value-type="string">
            <text:p>Accumulation_Policy</text:p>
          </table:table-cell>
          <table:table-cell office:value-type="string">
            <text:p>ACCUMULATION</text:p>
          </table:table-cell>
          <table:table-cell office:value-type="string">
            <text:p>Distribution_Frequency</text:p>
          </table:table-cell>
          <table:table-cell office:value-type="string">
            <text:p>QUARTERLY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Hedging_Policy</text:p>
          </table:table-cell>
          <table:table-cell office:value-type="string">
            <text:p>UNHEDGED</text:p>
          </table:table-cell>
          <table:table-cell office:value-type="string">
            <text:p>Currency_Hedged</text:p>
          </table:table-cell>
          <table:table-cell office:value-type="string">
            <text:p>EUR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1">
          <table:table-cell office:value-type="string">
            <text:p>Hedging_Policy</text:p>
          </table:table-cell>
          <table:table-cell office:value-type="string">
            <text:p>UNHEDGED</text:p>
          </table:table-cell>
          <table:table-cell office:value-type="string">
            <text:p>Currency_Hedg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Is_ESG</text:p>
          </table:table-cell>
          <table:table-cell office:value-type="string">
            <text:p>0.0</text:p>
          </table:table-cell>
          <table:table-cell office:value-type="string">
            <text:p>Sfdr_Article</text:p>
          </table:table-cell>
          <table:table-cell table:style-name="ce3" office:value-type="date" office:date-value="2000-08-01">
            <text:p>01/08/00</text:p>
          </table:table-cell>
          <table:table-cell office:value-type="float" office:value="112">
            <text:p>112</text:p>
          </table:table-cell>
          <table:table-cell table:number-columns-repeated="1019"/>
        </table:table-row>
        <table:table-row table:style-name="ro1">
          <table:table-cell office:value-type="string">
            <text:p>Is_ESG</text:p>
          </table:table-cell>
          <table:table-cell office:value-type="string">
            <text:p>0.0</text:p>
          </table:table-cell>
          <table:table-cell office:value-type="string">
            <text:p>Sfdr_Article</text:p>
          </table:table-cell>
          <table:table-cell table:style-name="ce3" office:value-type="date" office:date-value="2000-09-01">
            <text:p>01/09/00</text:p>
          </table:table-cell>
          <table:table-cell office:value-type="float" office:value="47">
            <text:p>47</text:p>
          </table:table-cell>
          <table:table-cell table:number-columns-repeated="1019"/>
        </table:table-row>
        <table:table-row table:style-name="ro1">
          <table:table-cell office:value-type="string">
            <text:p>Replication_Method</text:p>
          </table:table-cell>
          <table:table-cell office:value-type="string">
            <text:p>PHYSICAL</text:p>
          </table:table-cell>
          <table:table-cell office:value-type="string">
            <text:p>Derivatives_Usage</text:p>
          </table:table-cell>
          <table:table-cell office:value-type="string">
            <text:p>HIGH_LEVERAGE</text:p>
          </table:table-cell>
          <table:table-cell office:value-type="float" office:value="23">
            <text:p>23</text:p>
          </table:table-cell>
          <table:table-cell table:number-columns-repeated="1019"/>
        </table:table-row>
      </table:table>
      <table:table table:name="Hoja2" table:style-name="ta1" table:print="false">
        <table:table-column table:style-name="co4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4" table:number-columns-repeated="1019" table:default-cell-style-name="Default"/>
        <table:table-row table:style-name="ro1">
          <table:table-cell office:value-type="string">
            <text:p>Nombre del atributo A</text:p>
          </table:table-cell>
          <table:table-cell office:value-type="string">
            <text:p>Valor del atributo A</text:p>
          </table:table-cell>
          <table:table-cell office:value-type="string">
            <text:p>Nombre del atributo B</text:p>
          </table:table-cell>
          <table:table-cell office:value-type="string">
            <text:p>Valor del atributo B</text:p>
          </table:table-cell>
          <table:table-cell office:value-type="string">
            <text:p>Número de relaciones</text:p>
          </table:table-cell>
          <table:table-cell table:number-columns-repeated="1019"/>
        </table:table-row>
        <table:table-row table:style-name="ro1">
          <table:table-cell office:value-type="string">
            <text:p>Hedging_Policy</text:p>
          </table:table-cell>
          <table:table-cell office:value-type="string">
            <text:p>HEDGED</text:p>
          </table:table-cell>
          <table:table-cell office:value-type="string">
            <text:p>Currency_Hedged</text:p>
          </table:table-cell>
          <table:table-cell office:value-type="string">
            <text:p>NULL</text:p>
          </table:table-cell>
          <table:table-cell office:value-type="float" office:value="142">
            <text:p>142</text:p>
          </table:table-cell>
          <table:table-cell table:number-columns-repeated="1019"/>
        </table:table-row>
        <table:table-row table:style-name="ro1">
          <table:table-cell office:value-type="string">
            <text:p>Accumulation_Policy</text:p>
          </table:table-cell>
          <table:table-cell office:value-type="string">
            <text:p>DISTRIBUTION</text:p>
          </table:table-cell>
          <table:table-cell office:value-type="string">
            <text:p>Distribution_Frequency</text:p>
          </table:table-cell>
          <table:table-cell office:value-type="string">
            <text:p>NULL</text:p>
          </table:table-cell>
          <table:table-cell office:value-type="float" office:value="89">
            <text:p>89</text:p>
          </table:table-cell>
          <table:table-cell table:number-columns-repeated="1019"/>
        </table:table-row>
        <table:table-row table:style-name="ro1">
          <table:table-cell office:value-type="string">
            <text:p>Is_ESG</text:p>
          </table:table-cell>
          <table:table-cell table:style-name="Default" office:value-type="float" office:value="1">
            <text:p>1</text:p>
          </table:table-cell>
          <table:table-cell office:value-type="string">
            <text:p>Sfdr_Article</text:p>
          </table:table-cell>
          <table:table-cell office:value-type="string">
            <text:p>NULL</text:p>
          </table:table-cell>
          <table:table-cell office:value-type="float" office:value="215">
            <text:p>215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Fija</text:p>
          </table:table-cell>
          <table:table-cell office:value-type="string">
            <text:p>Recommended_Holding_Period</text:p>
          </table:table-cell>
          <table:table-cell office:value-type="string">
            <text:p>NULL</text:p>
          </table:table-cell>
          <table:table-cell office:value-type="float" office:value="74">
            <text:p>74</text:p>
          </table:table-cell>
          <table:table-cell table:number-columns-repeated="1019"/>
        </table:table-row>
        <table:table-row table:style-name="ro1">
          <table:table-cell office:value-type="string">
            <text:p>Style_Profile</text:p>
          </table:table-cell>
          <table:table-cell office:value-type="string">
            <text:p>Growth</text:p>
          </table:table-cell>
          <table:table-cell office:value-type="string">
            <text:p>Market_Cap_Focus</text:p>
          </table:table-cell>
          <table:table-cell office:value-type="string">
            <text:p>NULL</text:p>
          </table:table-cell>
          <table:table-cell office:value-type="float" office:value="108">
            <text:p>108</text:p>
          </table:table-cell>
          <table:table-cell table:number-columns-repeated="1019"/>
        </table:table-row>
        <table:table-row table:style-name="ro1">
          <table:table-cell office:value-type="string">
            <text:p>Type</text:p>
          </table:table-cell>
          <table:table-cell office:value-type="string">
            <text:p>Target Date</text:p>
          </table:table-cell>
          <table:table-cell office:value-type="string">
            <text:p>Benchmark_Declared</text:p>
          </table:table-cell>
          <table:table-cell office:value-type="string">
            <text:p>NULL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Entry_Fee_Pct</text:p>
          </table:table-cell>
          <table:table-cell table:style-name="Default" office:value-type="float" office:value="5">
            <text:p>5</text:p>
          </table:table-cell>
          <table:table-cell office:value-type="string">
            <text:p>Exit_Fee_Pct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>
            <text:p>Nombre del atributo A</text:p>
          </table:table-cell>
          <table:table-cell office:value-type="string">
            <text:p>Valor del atributo A</text:p>
          </table:table-cell>
          <table:table-cell office:value-type="string">
            <text:p>Nombre del atributo B</text:p>
          </table:table-cell>
          <table:table-cell office:value-type="string">
            <text:p>Valor del atributo B</text:p>
          </table:table-cell>
          <table:table-cell office:value-type="string">
            <text:p>Número de relaciones</text:p>
          </table:table-cell>
          <table:table-cell table:number-columns-repeated="1019"/>
        </table:table-row>
        <table:table-row table:style-name="ro1">
          <table:table-cell office:value-type="string">
            <text:p>Hedging_Policy</text:p>
          </table:table-cell>
          <table:table-cell office:value-type="string">
            <text:p>HEDGED</text:p>
          </table:table-cell>
          <table:table-cell office:value-type="string">
            <text:p>Currency_Hedged</text:p>
          </table:table-cell>
          <table:table-cell office:value-type="string">
            <text:p>NULL</text:p>
          </table:table-cell>
          <table:table-cell office:value-type="float" office:value="142">
            <text:p>142</text:p>
          </table:table-cell>
          <table:table-cell table:number-columns-repeated="1019"/>
        </table:table-row>
        <table:table-row table:style-name="ro1">
          <table:table-cell office:value-type="string">
            <text:p>Accumulation_Policy</text:p>
          </table:table-cell>
          <table:table-cell office:value-type="string">
            <text:p>DISTRIBUTION</text:p>
          </table:table-cell>
          <table:table-cell office:value-type="string">
            <text:p>Distribution_Frequency</text:p>
          </table:table-cell>
          <table:table-cell office:value-type="string">
            <text:p>NULL</text:p>
          </table:table-cell>
          <table:table-cell office:value-type="float" office:value="89">
            <text:p>89</text:p>
          </table:table-cell>
          <table:table-cell table:number-columns-repeated="1019"/>
        </table:table-row>
        <table:table-row table:style-name="ro1">
          <table:table-cell office:value-type="string">
            <text:p>Is_ESG</text:p>
          </table:table-cell>
          <table:table-cell table:style-name="Default" office:value-type="float" office:value="1">
            <text:p>1</text:p>
          </table:table-cell>
          <table:table-cell office:value-type="string">
            <text:p>Sfdr_Article</text:p>
          </table:table-cell>
          <table:table-cell office:value-type="string">
            <text:p>NULL</text:p>
          </table:table-cell>
          <table:table-cell office:value-type="float" office:value="215">
            <text:p>215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Style_Profile</text:p>
          </table:table-cell>
          <table:table-cell office:value-type="string">
            <text:p>NULL</text:p>
          </table:table-cell>
          <table:table-cell office:value-type="float" office:value="310">
            <text:p>310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Market_Cap_Focus</text:p>
          </table:table-cell>
          <table:table-cell office:value-type="string">
            <text:p>NULL</text:p>
          </table:table-cell>
          <table:table-cell office:value-type="float" office:value="284">
            <text:p>284</text:p>
          </table:table-cell>
          <table:table-cell table:number-columns-repeated="1019"/>
        </table:table-row>
        <table:table-row table:style-name="ro1">
          <table:table-cell office:value-type="string">
            <text:p>Type</text:p>
          </table:table-cell>
          <table:table-cell office:value-type="string">
            <text:p>Target Date</text:p>
          </table:table-cell>
          <table:table-cell office:value-type="string">
            <text:p>Recommended_Holding_Period</text:p>
          </table:table-cell>
          <table:table-cell office:value-type="string">
            <text:p>NULL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Benchmark_Type</text:p>
          </table:table-cell>
          <table:table-cell office:value-type="string">
            <text:p>REFERENCE_INDEX</text:p>
          </table:table-cell>
          <table:table-cell office:value-type="string">
            <text:p>Benchmark_Declared</text:p>
          </table:table-cell>
          <table:table-cell office:value-type="string">
            <text:p>NULL</text:p>
          </table:table-cell>
          <table:table-cell office:value-type="float" office:value="76">
            <text:p>76</text:p>
          </table:table-cell>
          <table:table-cell table:number-columns-repeated="1019"/>
        </table:table-row>
        <table:table-row table:style-name="ro1">
          <table:table-cell office:value-type="string">
            <text:p>Entry_Fee_Pct</text:p>
          </table:table-cell>
          <table:table-cell table:style-name="Default" office:value-type="float" office:value="5">
            <text:p>5</text:p>
          </table:table-cell>
          <table:table-cell office:value-type="string">
            <text:p>Exit_Fee_Pct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ixto</text:p>
          </table:table-cell>
          <table:table-cell office:value-type="string">
            <text:p>Exposure_Bias</text:p>
          </table:table-cell>
          <table:table-cell office:value-type="string">
            <text:p>NULL</text:p>
          </table:table-cell>
          <table:table-cell office:value-type="float" office:value="198">
            <text:p>198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>
            <text:p>Nombre del atributo A</text:p>
          </table:table-cell>
          <table:table-cell office:value-type="string">
            <text:p>Valor del atributo A</text:p>
          </table:table-cell>
          <table:table-cell office:value-type="string">
            <text:p>Nombre del atributo B</text:p>
          </table:table-cell>
          <table:table-cell office:value-type="string">
            <text:p>Valor del atributo B</text:p>
          </table:table-cell>
          <table:table-cell office:value-type="string">
            <text:p>Número de relaciones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Type</text:p>
          </table:table-cell>
          <table:table-cell office:value-type="string">
            <text:p>Monetario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Subtype</text:p>
          </table:table-cell>
          <table:table-cell office:value-type="string">
            <text:p>Monetario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Investment_Universe</text:p>
          </table:table-cell>
          <table:table-cell office:value-type="string">
            <text:p>Liquidity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Profile</text:p>
          </table:table-cell>
          <table:table-cell office:value-type="string">
            <text:p>Conservador</text:p>
          </table:table-cell>
          <table:table-cell office:value-type="float" office:value="73">
            <text:p>73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Fija</text:p>
          </table:table-cell>
          <table:table-cell office:value-type="string">
            <text:p>Style_Profile</text:p>
          </table:table-cell>
          <table:table-cell office:value-type="string">
            <text:p>Growth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Fija</text:p>
          </table:table-cell>
          <table:table-cell office:value-type="string">
            <text:p>Style_Profile</text:p>
          </table:table-cell>
          <table:table-cell office:value-type="string">
            <text:p>Value</text:p>
          </table:table-cell>
          <table:table-cell office:value-type="float" office:value="52">
            <text:p>52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Fija</text:p>
          </table:table-cell>
          <table:table-cell office:value-type="string">
            <text:p>Market_Cap_Focus</text:p>
          </table:table-cell>
          <table:table-cell office:value-type="string">
            <text:p>Large Cap</text:p>
          </table:table-cell>
          <table:table-cell office:value-type="float" office:value="89">
            <text:p>89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Fija</text:p>
          </table:table-cell>
          <table:table-cell office:value-type="string">
            <text:p>Market_Cap_Focus</text:p>
          </table:table-cell>
          <table:table-cell office:value-type="string">
            <text:p>Small Cap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string">
            <text:p>Profile</text:p>
          </table:table-cell>
          <table:table-cell office:value-type="string">
            <text:p>Agresivo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string">
            <text:p>Profile</text:p>
          </table:table-cell>
          <table:table-cell office:value-type="string">
            <text:p>Moderado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string">
            <text:p>SRRI</text:p>
          </table:table-cell>
          <table:table-cell table:style-name="ce3" office:value-type="date" office:date-value="2000-06-01">
            <text:p>01/06/00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string">
            <text:p>SRRI</text:p>
          </table:table-cell>
          <table:table-cell table:style-name="ce3" office:value-type="date" office:date-value="2000-05-01">
            <text:p>01/05/00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Investment_Universe</text:p>
          </table:table-cell>
          <table:table-cell office:value-type="string">
            <text:p>Liquidity</text:p>
          </table:table-cell>
          <table:table-cell office:value-type="string">
            <text:p>Profile</text:p>
          </table:table-cell>
          <table:table-cell office:value-type="string">
            <text:p>Agresivo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Accumulation_Policy</text:p>
          </table:table-cell>
          <table:table-cell office:value-type="string">
            <text:p>ACCUMULATION</text:p>
          </table:table-cell>
          <table:table-cell office:value-type="string">
            <text:p>Distribution_Frequency</text:p>
          </table:table-cell>
          <table:table-cell office:value-type="string">
            <text:p>QUARTERLY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Accumulation_Policy</text:p>
          </table:table-cell>
          <table:table-cell office:value-type="string">
            <text:p>ACCUMULATION</text:p>
          </table:table-cell>
          <table:table-cell office:value-type="string">
            <text:p>Distribution_Frequency</text:p>
          </table:table-cell>
          <table:table-cell office:value-type="string">
            <text:p>ANNUAL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1">
          <table:table-cell office:value-type="string">
            <text:p>Hedging_Policy</text:p>
          </table:table-cell>
          <table:table-cell office:value-type="string">
            <text:p>UNHEDGED</text:p>
          </table:table-cell>
          <table:table-cell office:value-type="string">
            <text:p>Currency_Hedged</text:p>
          </table:table-cell>
          <table:table-cell office:value-type="string">
            <text:p>EUR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1">
          <table:table-cell office:value-type="string">
            <text:p>Hedging_Policy</text:p>
          </table:table-cell>
          <table:table-cell office:value-type="string">
            <text:p>UNHEDGED</text:p>
          </table:table-cell>
          <table:table-cell office:value-type="string">
            <text:p>Currency_Hedg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Is_ESG</text:p>
          </table:table-cell>
          <table:table-cell office:value-type="string">
            <text:p>0.0</text:p>
          </table:table-cell>
          <table:table-cell office:value-type="string">
            <text:p>Sfdr_Article</text:p>
          </table:table-cell>
          <table:table-cell table:style-name="ce3" office:value-type="date" office:date-value="2000-09-01">
            <text:p>01/09/00</text:p>
          </table:table-cell>
          <table:table-cell office:value-type="float" office:value="47">
            <text:p>47</text:p>
          </table:table-cell>
          <table:table-cell table:number-columns-repeated="1019"/>
        </table:table-row>
        <table:table-row table:style-name="ro1">
          <table:table-cell office:value-type="string">
            <text:p>Is_ESG</text:p>
          </table:table-cell>
          <table:table-cell office:value-type="string">
            <text:p>0.0</text:p>
          </table:table-cell>
          <table:table-cell office:value-type="string">
            <text:p>Sfdr_Article</text:p>
          </table:table-cell>
          <table:table-cell table:style-name="ce3" office:value-type="date" office:date-value="2000-08-01">
            <text:p>01/08/00</text:p>
          </table:table-cell>
          <table:table-cell office:value-type="float" office:value="112">
            <text:p>112</text:p>
          </table:table-cell>
          <table:table-cell table:number-columns-repeated="1019"/>
        </table:table-row>
        <table:table-row table:style-name="ro1">
          <table:table-cell office:value-type="string">
            <text:p>Replication_Method</text:p>
          </table:table-cell>
          <table:table-cell office:value-type="string">
            <text:p>PHYSICAL</text:p>
          </table:table-cell>
          <table:table-cell office:value-type="string">
            <text:p>Derivatives_Usage</text:p>
          </table:table-cell>
          <table:table-cell office:value-type="string">
            <text:p>HIGH_LEVERAGE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>
            <text:p>Nombre del atributo A</text:p>
          </table:table-cell>
          <table:table-cell office:value-type="string">
            <text:p>Valor del atributo A</text:p>
          </table:table-cell>
          <table:table-cell office:value-type="string">
            <text:p>Nombre del atributo B</text:p>
          </table:table-cell>
          <table:table-cell office:value-type="string">
            <text:p>Valor del atributo B</text:p>
          </table:table-cell>
          <table:table-cell office:value-type="string">
            <text:p>Número de relaciones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Style_Profile</text:p>
          </table:table-cell>
          <table:table-cell office:value-type="string">
            <text:p>NULL</text:p>
          </table:table-cell>
          <table:table-cell office:value-type="float" office:value="310">
            <text:p>310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Market_Cap_Focus</text:p>
          </table:table-cell>
          <table:table-cell office:value-type="string">
            <text:p>NULL</text:p>
          </table:table-cell>
          <table:table-cell office:value-type="float" office:value="284">
            <text:p>284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ixto</text:p>
          </table:table-cell>
          <table:table-cell office:value-type="string">
            <text:p>Exposure_Bias</text:p>
          </table:table-cell>
          <table:table-cell office:value-type="string">
            <text:p>NULL</text:p>
          </table:table-cell>
          <table:table-cell office:value-type="float" office:value="198">
            <text:p>198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Fija</text:p>
          </table:table-cell>
          <table:table-cell office:value-type="string">
            <text:p>Recommended_Holding_Period</text:p>
          </table:table-cell>
          <table:table-cell office:value-type="string">
            <text:p>NULL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string">
            <text:p>Hedging_Policy</text:p>
          </table:table-cell>
          <table:table-cell office:value-type="string">
            <text:p>HEDGED</text:p>
          </table:table-cell>
          <table:table-cell office:value-type="string">
            <text:p>Currency_Hedged</text:p>
          </table:table-cell>
          <table:table-cell office:value-type="string">
            <text:p>NULL</text:p>
          </table:table-cell>
          <table:table-cell office:value-type="float" office:value="142">
            <text:p>142</text:p>
          </table:table-cell>
          <table:table-cell table:number-columns-repeated="1019"/>
        </table:table-row>
        <table:table-row table:style-name="ro1">
          <table:table-cell office:value-type="string">
            <text:p>Accumulation_Policy</text:p>
          </table:table-cell>
          <table:table-cell office:value-type="string">
            <text:p>DISTRIBUTION</text:p>
          </table:table-cell>
          <table:table-cell office:value-type="string">
            <text:p>Distribution_Frequency</text:p>
          </table:table-cell>
          <table:table-cell office:value-type="string">
            <text:p>NULL</text:p>
          </table:table-cell>
          <table:table-cell office:value-type="float" office:value="89">
            <text:p>89</text:p>
          </table:table-cell>
          <table:table-cell table:number-columns-repeated="1019"/>
        </table:table-row>
        <table:table-row table:style-name="ro1">
          <table:table-cell office:value-type="string">
            <text:p>Is_ESG</text:p>
          </table:table-cell>
          <table:table-cell table:style-name="ce3" office:value-type="date" office:date-value="2000-01-01">
            <text:p>01/01/00</text:p>
          </table:table-cell>
          <table:table-cell office:value-type="string">
            <text:p>Sfdr_Article</text:p>
          </table:table-cell>
          <table:table-cell office:value-type="string">
            <text:p>NULL</text:p>
          </table:table-cell>
          <table:table-cell office:value-type="float" office:value="215">
            <text:p>215</text:p>
          </table:table-cell>
          <table:table-cell table:number-columns-repeated="1019"/>
        </table:table-row>
        <table:table-row table:style-name="ro1">
          <table:table-cell office:value-type="string">
            <text:p>Benchmark_Type</text:p>
          </table:table-cell>
          <table:table-cell office:value-type="string">
            <text:p>REFERENCE_INDEX</text:p>
          </table:table-cell>
          <table:table-cell office:value-type="string">
            <text:p>Benchmark_Declared</text:p>
          </table:table-cell>
          <table:table-cell office:value-type="string">
            <text:p>NULL</text:p>
          </table:table-cell>
          <table:table-cell office:value-type="float" office:value="76">
            <text:p>76</text:p>
          </table:table-cell>
          <table:table-cell table:number-columns-repeated="1019"/>
        </table:table-row>
        <table:table-row table:style-name="ro1">
          <table:table-cell office:value-type="string">
            <text:p>Type</text:p>
          </table:table-cell>
          <table:table-cell office:value-type="string">
            <text:p>Target Date</text:p>
          </table:table-cell>
          <table:table-cell office:value-type="string">
            <text:p>Recommended_Holding_Period</text:p>
          </table:table-cell>
          <table:table-cell office:value-type="string">
            <text:p>NULL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Entry_Fee_Pct</text:p>
          </table:table-cell>
          <table:table-cell table:style-name="ce3" office:value-type="date" office:date-value="2000-05-01">
            <text:p>01/05/00</text:p>
          </table:table-cell>
          <table:table-cell office:value-type="string">
            <text:p>Exit_Fee_Pct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 table:number-rows-repeated="5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>
            <text:p>Nombre del atributo A</text:p>
          </table:table-cell>
          <table:table-cell office:value-type="string">
            <text:p>Valor del atributo A</text:p>
          </table:table-cell>
          <table:table-cell office:value-type="string">
            <text:p>Nombre del atributo B</text:p>
          </table:table-cell>
          <table:table-cell office:value-type="string">
            <text:p>Valor del atributo B</text:p>
          </table:table-cell>
          <table:table-cell office:value-type="string">
            <text:p>Número de relaciones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Type</text:p>
          </table:table-cell>
          <table:table-cell office:value-type="string">
            <text:p>Monetario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Subtype</text:p>
          </table:table-cell>
          <table:table-cell office:value-type="string">
            <text:p>Monetario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Investment_Universe</text:p>
          </table:table-cell>
          <table:table-cell office:value-type="string">
            <text:p>Liquidity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Profile</text:p>
          </table:table-cell>
          <table:table-cell office:value-type="string">
            <text:p>Conservador</text:p>
          </table:table-cell>
          <table:table-cell office:value-type="float" office:value="73">
            <text:p>73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Fija</text:p>
          </table:table-cell>
          <table:table-cell office:value-type="string">
            <text:p>Style_Profile</text:p>
          </table:table-cell>
          <table:table-cell office:value-type="string">
            <text:p>Growth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Fija</text:p>
          </table:table-cell>
          <table:table-cell office:value-type="string">
            <text:p>Style_Profile</text:p>
          </table:table-cell>
          <table:table-cell office:value-type="string">
            <text:p>Value</text:p>
          </table:table-cell>
          <table:table-cell office:value-type="float" office:value="52">
            <text:p>52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Fija</text:p>
          </table:table-cell>
          <table:table-cell office:value-type="string">
            <text:p>Market_Cap_Focus</text:p>
          </table:table-cell>
          <table:table-cell office:value-type="string">
            <text:p>Large Cap</text:p>
          </table:table-cell>
          <table:table-cell office:value-type="float" office:value="89">
            <text:p>89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Fija</text:p>
          </table:table-cell>
          <table:table-cell office:value-type="string">
            <text:p>Market_Cap_Focus</text:p>
          </table:table-cell>
          <table:table-cell office:value-type="string">
            <text:p>Small Cap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string">
            <text:p>Profile</text:p>
          </table:table-cell>
          <table:table-cell office:value-type="string">
            <text:p>Agresivo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string">
            <text:p>Profile</text:p>
          </table:table-cell>
          <table:table-cell office:value-type="string">
            <text:p>Moderado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string">
            <text:p>SRRI</text:p>
          </table:table-cell>
          <table:table-cell table:style-name="ce3" office:value-type="date" office:date-value="2000-06-01">
            <text:p>01/06/00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onetario</text:p>
          </table:table-cell>
          <table:table-cell office:value-type="string">
            <text:p>SRRI</text:p>
          </table:table-cell>
          <table:table-cell table:style-name="ce3" office:value-type="date" office:date-value="2000-05-01">
            <text:p>01/05/00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Investment_Universe</text:p>
          </table:table-cell>
          <table:table-cell office:value-type="string">
            <text:p>Liquidity</text:p>
          </table:table-cell>
          <table:table-cell office:value-type="string">
            <text:p>Profile</text:p>
          </table:table-cell>
          <table:table-cell office:value-type="string">
            <text:p>Agresivo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Accumulation_Policy</text:p>
          </table:table-cell>
          <table:table-cell office:value-type="string">
            <text:p>ACCUMULATION</text:p>
          </table:table-cell>
          <table:table-cell office:value-type="string">
            <text:p>Distribution_Frequency</text:p>
          </table:table-cell>
          <table:table-cell office:value-type="string">
            <text:p>QUARTERLY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Accumulation_Policy</text:p>
          </table:table-cell>
          <table:table-cell office:value-type="string">
            <text:p>ACCUMULATION</text:p>
          </table:table-cell>
          <table:table-cell office:value-type="string">
            <text:p>Distribution_Frequency</text:p>
          </table:table-cell>
          <table:table-cell office:value-type="string">
            <text:p>ANNUAL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1">
          <table:table-cell office:value-type="string">
            <text:p>Hedging_Policy</text:p>
          </table:table-cell>
          <table:table-cell office:value-type="string">
            <text:p>UNHEDGED</text:p>
          </table:table-cell>
          <table:table-cell office:value-type="string">
            <text:p>Currency_Hedged</text:p>
          </table:table-cell>
          <table:table-cell office:value-type="string">
            <text:p>EUR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1">
          <table:table-cell office:value-type="string">
            <text:p>Hedging_Policy</text:p>
          </table:table-cell>
          <table:table-cell office:value-type="string">
            <text:p>UNHEDGED</text:p>
          </table:table-cell>
          <table:table-cell office:value-type="string">
            <text:p>Currency_Hedg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Is_ESG</text:p>
          </table:table-cell>
          <table:table-cell office:value-type="string">
            <text:p>0.0</text:p>
          </table:table-cell>
          <table:table-cell office:value-type="string">
            <text:p>Sfdr_Article</text:p>
          </table:table-cell>
          <table:table-cell table:style-name="ce3" office:value-type="date" office:date-value="2000-09-01">
            <text:p>01/09/00</text:p>
          </table:table-cell>
          <table:table-cell office:value-type="float" office:value="47">
            <text:p>47</text:p>
          </table:table-cell>
          <table:table-cell table:number-columns-repeated="1019"/>
        </table:table-row>
        <table:table-row table:style-name="ro1">
          <table:table-cell office:value-type="string">
            <text:p>Is_ESG</text:p>
          </table:table-cell>
          <table:table-cell office:value-type="string">
            <text:p>0.0</text:p>
          </table:table-cell>
          <table:table-cell office:value-type="string">
            <text:p>Sfdr_Article</text:p>
          </table:table-cell>
          <table:table-cell table:style-name="ce3" office:value-type="date" office:date-value="2000-08-01">
            <text:p>01/08/00</text:p>
          </table:table-cell>
          <table:table-cell office:value-type="float" office:value="112">
            <text:p>112</text:p>
          </table:table-cell>
          <table:table-cell table:number-columns-repeated="1019"/>
        </table:table-row>
        <table:table-row table:style-name="ro1">
          <table:table-cell office:value-type="string">
            <text:p>Replication_Method</text:p>
          </table:table-cell>
          <table:table-cell office:value-type="string">
            <text:p>PHYSICAL</text:p>
          </table:table-cell>
          <table:table-cell office:value-type="string">
            <text:p>Derivatives_Usage</text:p>
          </table:table-cell>
          <table:table-cell office:value-type="string">
            <text:p>HIGH_LEVERAGE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Style_Profile</text:p>
          </table:table-cell>
          <table:table-cell office:value-type="string">
            <text:p>NULL</text:p>
          </table:table-cell>
          <table:table-cell office:value-type="float" office:value="310">
            <text:p>310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Variable</text:p>
          </table:table-cell>
          <table:table-cell office:value-type="string">
            <text:p>Market_Cap_Focus</text:p>
          </table:table-cell>
          <table:table-cell office:value-type="string">
            <text:p>NULL</text:p>
          </table:table-cell>
          <table:table-cell office:value-type="float" office:value="284">
            <text:p>284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Mixto</text:p>
          </table:table-cell>
          <table:table-cell office:value-type="string">
            <text:p>Exposure_Bias</text:p>
          </table:table-cell>
          <table:table-cell office:value-type="string">
            <text:p>NULL</text:p>
          </table:table-cell>
          <table:table-cell office:value-type="float" office:value="198">
            <text:p>198</text:p>
          </table:table-cell>
          <table:table-cell table:number-columns-repeated="1019"/>
        </table:table-row>
        <table:table-row table:style-name="ro1">
          <table:table-cell office:value-type="string">
            <text:p>Fund_Nature</text:p>
          </table:table-cell>
          <table:table-cell office:value-type="string">
            <text:p>Renta Fija</text:p>
          </table:table-cell>
          <table:table-cell office:value-type="string">
            <text:p>Recommended_Holding_Period</text:p>
          </table:table-cell>
          <table:table-cell office:value-type="string">
            <text:p>NULL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string">
            <text:p>Hedging_Policy</text:p>
          </table:table-cell>
          <table:table-cell office:value-type="string">
            <text:p>HEDGED</text:p>
          </table:table-cell>
          <table:table-cell office:value-type="string">
            <text:p>Currency_Hedged</text:p>
          </table:table-cell>
          <table:table-cell office:value-type="string">
            <text:p>NULL</text:p>
          </table:table-cell>
          <table:table-cell office:value-type="float" office:value="142">
            <text:p>142</text:p>
          </table:table-cell>
          <table:table-cell table:number-columns-repeated="1019"/>
        </table:table-row>
        <table:table-row table:style-name="ro1">
          <table:table-cell office:value-type="string">
            <text:p>Accumulation_Policy</text:p>
          </table:table-cell>
          <table:table-cell office:value-type="string">
            <text:p>DISTRIBUTION</text:p>
          </table:table-cell>
          <table:table-cell office:value-type="string">
            <text:p>Distribution_Frequency</text:p>
          </table:table-cell>
          <table:table-cell office:value-type="string">
            <text:p>NULL</text:p>
          </table:table-cell>
          <table:table-cell office:value-type="float" office:value="89">
            <text:p>89</text:p>
          </table:table-cell>
          <table:table-cell table:number-columns-repeated="1019"/>
        </table:table-row>
        <table:table-row table:style-name="ro1">
          <table:table-cell office:value-type="string">
            <text:p>Is_ESG</text:p>
          </table:table-cell>
          <table:table-cell table:style-name="ce3" office:value-type="date" office:date-value="2000-01-01">
            <text:p>01/01/00</text:p>
          </table:table-cell>
          <table:table-cell office:value-type="string">
            <text:p>Sfdr_Article</text:p>
          </table:table-cell>
          <table:table-cell office:value-type="string">
            <text:p>NULL</text:p>
          </table:table-cell>
          <table:table-cell office:value-type="float" office:value="215">
            <text:p>215</text:p>
          </table:table-cell>
          <table:table-cell table:number-columns-repeated="1019"/>
        </table:table-row>
        <table:table-row table:style-name="ro1">
          <table:table-cell office:value-type="string">
            <text:p>Benchmark_Type</text:p>
          </table:table-cell>
          <table:table-cell office:value-type="string">
            <text:p>REFERENCE_INDEX</text:p>
          </table:table-cell>
          <table:table-cell office:value-type="string">
            <text:p>Benchmark_Declared</text:p>
          </table:table-cell>
          <table:table-cell office:value-type="string">
            <text:p>NULL</text:p>
          </table:table-cell>
          <table:table-cell office:value-type="float" office:value="76">
            <text:p>76</text:p>
          </table:table-cell>
          <table:table-cell table:number-columns-repeated="1019"/>
        </table:table-row>
        <table:table-row table:style-name="ro1">
          <table:table-cell office:value-type="string">
            <text:p>Type</text:p>
          </table:table-cell>
          <table:table-cell office:value-type="string">
            <text:p>Target Date</text:p>
          </table:table-cell>
          <table:table-cell office:value-type="string">
            <text:p>Recommended_Holding_Period</text:p>
          </table:table-cell>
          <table:table-cell office:value-type="string">
            <text:p>NULL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Entry_Fee_Pct</text:p>
          </table:table-cell>
          <table:table-cell table:style-name="ce3" office:value-type="date" office:date-value="2000-05-01">
            <text:p>01/05/00</text:p>
          </table:table-cell>
          <table:table-cell office:value-type="string">
            <text:p>Exit_Fee_Pct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5">05/04/2026</text:date>, <text:time>11:40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Antonio Cormenzana Elosua</meta:initial-creator>
    <meta:creation-date>2026-04-02T23:42:02.50</meta:creation-date>
    <dc:date>2026-04-05T11:40:09.35</dc:date>
    <dc:creator>Jose Antonio Cormenzana Elosua</dc:creator>
    <meta:editing-duration>PT1H5M56S</meta:editing-duration>
    <meta:editing-cycles>4</meta:editing-cycles>
    <meta:generator>OpenOffice/4.1.16$Win32 OpenOffice.org_project/4116m3$Build-9816</meta:generator>
    <meta:document-statistic meta:table-count="2" meta:cell-count="550" meta:object-count="0"/>
  </office:meta>
</office:document-meta>
</file>