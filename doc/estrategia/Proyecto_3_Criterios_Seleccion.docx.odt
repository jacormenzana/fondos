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Heading_20_1"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 3 – Criterios de selección y construcción de carteras</text:p>
      <text:p text:style-name="Standard">Este documento define los criterios de selección que se aplicarán en el Proyecto 3, derivados directamente de los indicadores cuantitativos calculados en el Proyecto 2. El objetivo es establecer reglas claras, reproducibles y orientadas a preservación de capital.</text:p>
      <text:p text:style-name="Heading_20_2">1. Objetivo de la fase de selección</text:p>
      <text:p text:style-name="Standard">Reducir el universo de fondos a aquellos que demuestran capacidad real de preservación de capital y comportamiento robusto bajo estrés.</text:p>
      <text:p text:style-name="Heading_20_2">2. Principios metodológicos</text:p>
      <text:p text:style-name="Standard">Uso de filtros duros antes de cualquier ponderación; prioridad al riesgo real sobre la rentabilidad; decisiones basadas en métricas históricas reproducibles.</text:p>
      <text:p text:style-name="Heading_20_2">3. Filtros de exclusión (hard filters)</text:p>
      <text:p text:style-name="Standard">Ejemplos: exclusión de fondos con drawdown real extremo, recuperación inexistente o consistencia real insuficiente.</text:p>
      <text:p text:style-name="Heading_20_2">4. Indicadores clave utilizados</text:p>
      <text:p text:style-name="Standard">max_drawdown_real, drawdown_duration, time_to_recovery, pct_positive_months_real, pct_severe_loss_months_real.</text:p>
      <text:p text:style-name="Heading_20_2">5. Evaluación en crisis</text:p>
      <text:p text:style-name="Standard">Análisis específico del comportamiento en ventanas de crisis para descartar fondos que colapsan en escenarios adversos.</text:p>
      <text:p text:style-name="Heading_20_2">6. Preparación para scoring y asignación</text:p>
      <text:p text:style-name="Standard">Una vez filtrado el universo, los fondos supervivientes podrán ser objeto de scoring compuesto y asignación de pesos bajo criterios de control de drawdown agregado.</text:p>
      <text:p text:style-name="Heading_20_2">7. Conclusión</text:p>
      <text:p text:style-name="Standard">Los criterios aquí definidos garantizan que la construcción de carteras en Proyecto 3 se base en resiliencia y preservación real, no en rentabilidades nominales aisla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none" style:letter-kerning="false" style:font-name-asian="Cambria1" style:font-size-asian="11pt" style:language-asian="zh" style:country-asian="CN" style:font-name-complex="Cambr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none" style:letter-kerning="false" style:font-name-asian="Cambria1" style:font-size-asian="11pt" style:language-asian="zh" style:country-asian="CN" style:font-name-complex="Cambr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835in" loext:contextual-spacing="false"/>
    </style:style>
    <style:style style:name="List" style:family="paragraph" style:parent-style-name="normal" style:default-outline-level="" style:class="list">
      <style:paragraph-properties fo:margin-left="0.25in" fo:margin-right="0in" fo:margin-top="0in" fo:margin-bottom="0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66091"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tyle="italic" fo:font-weight="bold" style:font-name-asian="Calibri1" style:font-family-asian="Calibri" style:font-family-generic-asian="system" style:font-pitch-asian="variable" style:font-style-asian="italic" style:font-weight-asian="bold" style:font-name-complex="Calibri1" style:font-family-complex="Calibri" style:font-family-generic-complex="system" style:font-pitch-complex="variable" style:font-style-complex="italic" style:font-weight-complex="bold"/>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2083in" loext:contextual-spacing="fals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Header" style:family="paragraph" style:parent-style-name="normal"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7" style:display-name="Heading 7" style:family="paragraph" style:parent-style-name="normal"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normal"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normal"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Body_20_Text_20_2" style:display-name="Body Text 2" style:family="paragraph" style:parent-style-name="normal" style:default-outline-level="">
      <style:paragraph-properties fo:margin-top="0in" fo:margin-bottom="0.0835in" loext:contextual-spacing="false" fo:line-height="200%"/>
    </style:style>
    <style:style style:name="Body_20_Text_20_3" style:display-name="Body Text 3" style:family="paragraph" style:parent-style-name="normal"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normal" style:default-outline-level="" style:class="list">
      <style:paragraph-properties fo:margin-left="0.5in" fo:margin-right="0in" fo:margin-top="0in" fo:margin-bottom="0in" loext:contextual-spacing="true" fo:text-indent="-0.25in" style:auto-text-indent="false"/>
    </style:style>
    <style:style style:name="List_20_3" style:display-name="List 3" style:family="paragraph" style:parent-style-name="normal" style:default-outline-level="" style:class="list">
      <style:paragraph-properties fo:margin-left="0.75in" fo:margin-right="0in" fo:margin-top="0in" fo:margin-bottom="0in" loext:contextual-spacing="true" fo:text-indent="-0.25in" style:auto-text-indent="false"/>
    </style:style>
    <style:style style:name="List_20_Bullet" style:display-name="List Bullet" style:family="paragraph" style:parent-style-name="normal" style:default-outline-level="">
      <style:paragraph-properties fo:margin-top="0in" fo:margin-bottom="0in" loext:contextual-spacing="true"/>
    </style:style>
    <style:style style:name="List_20_Bullet_20_2" style:display-name="List Bullet 2" style:family="paragraph" style:parent-style-name="normal" style:default-outline-level="">
      <style:paragraph-properties fo:margin-top="0in" fo:margin-bottom="0in" loext:contextual-spacing="true"/>
    </style:style>
    <style:style style:name="List_20_Bullet_20_3" style:display-name="List Bullet 3" style:family="paragraph" style:parent-style-name="normal" style:default-outline-level="">
      <style:paragraph-properties fo:margin-top="0in" fo:margin-bottom="0in" loext:contextual-spacing="true"/>
    </style:style>
    <style:style style:name="List_20_Number" style:display-name="List Number" style:family="paragraph" style:parent-style-name="normal" style:default-outline-level="">
      <style:paragraph-properties fo:margin-top="0in" fo:margin-bottom="0in" loext:contextual-spacing="true"/>
    </style:style>
    <style:style style:name="List_20_Number_20_2" style:display-name="List Number 2" style:family="paragraph" style:parent-style-name="normal" style:default-outline-level="">
      <style:paragraph-properties fo:margin-top="0in" fo:margin-bottom="0in" loext:contextual-spacing="true"/>
    </style:style>
    <style:style style:name="List_20_Number_20_3" style:display-name="List Number 3" style:family="paragraph" style:parent-style-name="normal" style:default-outline-level="">
      <style:paragraph-properties fo:margin-top="0in" fo:margin-bottom="0in" loext:contextual-spacing="true"/>
    </style:style>
    <style:style style:name="List_20_Continue" style:display-name="List Continue" style:family="paragraph" style:parent-style-name="normal"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normal"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normal"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normal" style:next-style-name="Standard" style:default-outline-level="">
      <style:text-properties fo:color="#000000" fo:font-style="italic" style:font-style-asian="italic" style:font-style-complex="italic"/>
    </style:style>
    <style:style style:name="caption" style:family="paragraph" style:parent-style-name="normal"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normal"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Subtitle" style:family="paragraph" style:parent-style-name="normal" style:next-style-name="Standard" style:default-outline-level="" style:class="chapter">
      <style:text-properties fo:color="#4f81bd"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23:15:00</meta:creation-date>
    <meta:initial-creator>python-docx</meta:initial-creator>
    <meta:document-statistic meta:table-count="0" meta:image-count="0" meta:object-count="0" meta:page-count="1" meta:paragraph-count="16" meta:word-count="205" meta:character-count="1502" meta:non-whitespace-character-count="1312"/>
    <meta:generator>LibreOfficeDev/6.0.5.2$Linux_X86_64 LibreOffice_project/</meta:generator>
  </office:meta>
</office:document-meta>
</file>