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2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6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7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8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9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0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1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2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3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4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5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6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7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8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9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0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1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2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3" style:family="paragraph" style:parent-style-name="Standard" style:list-style-name="WWNum2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4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5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66" style:family="paragraph" style:parent-style-name="Standard" style:list-style-name="WWNum2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7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8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69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70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71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7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font-size="17pt" fo:font-weight="bold" style:font-size-asian="17pt" style:font-weight-asian="bold" style:font-size-complex="17pt" style:font-weight-complex="bold"/>
    </style:style>
    <style:style style:name="T3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weight="bold" style:font-weight-asian="bold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bookmark text:name="_a00z5xa6nyg2"/><text:span text:style-name="T1">📘 PROYECTO 2 – ENRIQUECIMIENTO CUANTITATIVO DE FONDOS</text:span></text:p>
      <text:p text:style-name="P70"><text:bookmark text:name="_5jy1nbbquheh"/><text:span text:style-name="T2">1️⃣ ÁMBITO DEL PROYECTO</text:span></text:p>
      <text:p text:style-name="P71"><text:bookmark text:name="_32nvkkabruq1"/><text:span text:style-name="T3">Qué es el Proyecto 2</text:span></text:p>
      <text:p text:style-name="P1">El Proyecto 2 tiene como finalidad <text:span text:style-name="T4">enriquecer cuantitativamente</text:span> la tabla maestra de fondos creada en el Proyecto 1, incorporando <text:span text:style-name="T4">datos históricos de comportamiento</text:span>, <text:span text:style-name="T4">riesgo</text:span> y <text:span text:style-name="T4">relación con su benchmark</text:span>, sin alterar en ningún caso la tipología estructural del fondo.</text:p>
      <text:p text:style-name="P71"><text:bookmark text:name="_4b1i26jdhbok"/><text:span text:style-name="T3">Qué NO es el Proyecto 2</text:span></text:p>
      <text:list xml:id="list387447748" text:style-name="WWNum13">
        <text:list-item>
          <text:p text:style-name="P2">❌ No clasifica fondos (eso ya está hecho en Proyecto 1)<text:line-break/></text:p>
        </text:list-item>
        <text:list-item>
          <text:p text:style-name="P27">❌ No selecciona fondos para cartera<text:line-break/></text:p>
        </text:list-item>
        <text:list-item>
          <text:p text:style-name="P27">❌ No asigna pesos ni construye carteras<text:line-break/></text:p>
        </text:list-item>
        <text:list-item>
          <text:p text:style-name="P41">❌ No toma decisiones estratégicas<text:line-break/></text:p>
        </text:list-item>
      </text:list>
      <text:p text:style-name="P1">👉 Es una <text:span text:style-name="T4">capa intermedia</text:span>, estrictamente analítica.</text:p>
      <text:p text:style-name="Standard"><draw:rect text:anchor-type="as-char" style:rel-width="100%" draw:z-index="0" draw:style-name="gr1" draw:text-style-name="P72" svg:width="0.0012in" svg:height="0.0213in"><text:p/></draw:rect></text:p>
      <text:p text:style-name="P70"><text:bookmark text:name="_9bbdxbbidn1j"/><text:span text:style-name="T2">2️⃣ OBJETIVO DEL PROYECTO</text:span></text:p>
      <text:p text:style-name="P71"><text:bookmark text:name="_t7u2il2acppr"/><text:span text:style-name="T3">Objetivo principal</text:span></text:p>
      <text:p text:style-name="P1">Dotar a cada fondo de inversión de un <text:span text:style-name="T4">perfil cuantitativo completo</text:span>, comparable y homogéneo, que permita en el Proyecto 3:</text:p>
      <text:list xml:id="list3751154833" text:style-name="WWNum25">
        <text:list-item>
          <text:p text:style-name="P3">evaluar calidad,<text:line-break/></text:p>
        </text:list-item>
        <text:list-item>
          <text:p text:style-name="P28">comparar alternativas equivalentes,<text:line-break/></text:p>
        </text:list-item>
        <text:list-item>
          <text:p text:style-name="P28">descartar fondos ineficientes,<text:line-break/></text:p>
        </text:list-item>
        <text:list-item>
          <text:p text:style-name="P42">y construir carteras con fundamento empírico.<text:line-break/></text:p>
        </text:list-item>
      </text:list>
      <text:p text:style-name="P71"><text:bookmark text:name="_tj1s6h4egg02"/><text:span text:style-name="T3">Objetivo secundario (muy importante)</text:span></text:p>
      <text:p text:style-name="P1">Separar claramente:</text:p>
      <text:list xml:id="list1553951306" text:style-name="WWNum8">
        <text:list-item>
          <text:p text:style-name="P4"><text:soft-page-break/><text:span text:style-name="T4">riesgo estructural</text:span> (Proyecto 1)<text:line-break/></text:p>
        </text:list-item>
        <text:list-item>
          <text:p text:style-name="P43">de <text:span text:style-name="T4">riesgo empírico</text:span> (Proyecto 2)<text:line-break/></text:p>
        </text:list-item>
      </text:list>
      <text:p text:style-name="P1">Esto evita errores muy comunes como:</text:p>
      <text:list xml:id="list2100597957" text:style-name="WWNum2">
        <text:list-item>
          <text:p text:style-name="P5">penalizar un fondo por un mal año aislado,<text:line-break/></text:p>
        </text:list-item>
        <text:list-item>
          <text:p text:style-name="P44">o premiar un fondo estructuralmente débil por suerte coyuntural.<text:line-break/></text:p>
        </text:list-item>
      </text:list>
      <text:p text:style-name="Standard"><draw:rect text:anchor-type="as-char" style:rel-width="100%" draw:z-index="1" draw:style-name="gr1" draw:text-style-name="P72" svg:width="0.0012in" svg:height="0.0213in"><text:p/></draw:rect></text:p>
      <text:p text:style-name="P70"><text:bookmark text:name="_gut97y40dy60"/><text:span text:style-name="T2">3️⃣ DATOS DE ENTRADA DEL PROYECTO 2</text:span></text:p>
      <text:p text:style-name="P71"><text:bookmark text:name="_c0yq4txyv7z"/><text:span text:style-name="T3">📥 Entrada principal (obligatoria)</text:span></text:p>
      <text:p text:style-name="P1">Tabla maestra de fondos del <text:span text:style-name="T4">Proyecto 1</text:span>, con al menos los siguientes campos:</text:p>
      <text:list xml:id="list2207675347" text:style-name="WWNum1">
        <text:list-item>
          <text:p text:style-name="P6">ISIN<text:line-break/></text:p>
        </text:list-item>
        <text:list-item>
          <text:p text:style-name="P29">Nombre del fondo<text:line-break/></text:p>
        </text:list-item>
        <text:list-item>
          <text:p text:style-name="P29">Gestora<text:line-break/></text:p>
        </text:list-item>
        <text:list-item>
          <text:p text:style-name="P29">Naturaleza del fondo (Monetario, RF corto, RF, Mixto, etc.)<text:line-break/></text:p>
        </text:list-item>
        <text:list-item>
          <text:p text:style-name="P29">SRRI (KIID)<text:line-break/></text:p>
        </text:list-item>
        <text:list-item>
          <text:p text:style-name="P29">Benchmark (si existe)<text:line-break/></text:p>
        </text:list-item>
        <text:list-item>
          <text:p text:style-name="P45">Uso de derivados<text:line-break/></text:p>
        </text:list-item>
      </text:list>
      <text:p text:style-name="P1">👉 <text:span text:style-name="T4">Esta tabla es inmutable</text:span> en Proyecto 2.</text:p>
      <text:p text:style-name="Standard"><draw:rect text:anchor-type="as-char" style:rel-width="100%" draw:z-index="2" draw:style-name="gr1" draw:text-style-name="P72" svg:width="0.0012in" svg:height="0.0213in"><text:p/></draw:rect></text:p>
      <text:p text:style-name="P71"><text:bookmark text:name="_gdj4ulhzp5p9"/><text:span text:style-name="T3">📥 Fuentes de datos cuantitativos (a integrar)</text:span></text:p>
      <text:p text:style-name="P1">Dependiendo de disponibilidad y fiabilidad:</text:p>
      <text:list xml:id="list3528096918" text:style-name="WWNum7">
        <text:list-item>
          <text:p text:style-name="P7">Morningstar<text:line-break/></text:p>
        </text:list-item>
        <text:list-item>
          <text:p text:style-name="P30"><text:soft-page-break/>Finect<text:line-break/></text:p>
        </text:list-item>
        <text:list-item>
          <text:p text:style-name="P30">Fundinfo<text:line-break/></text:p>
        </text:list-item>
        <text:list-item>
          <text:p text:style-name="P30">Documentación histórica de la gestora<text:line-break/></text:p>
        </text:list-item>
        <text:list-item>
          <text:p text:style-name="P30">Series de liquidativos (NAV)<text:line-break/></text:p>
        </text:list-item>
        <text:list-item>
          <text:p text:style-name="P46">Índices oficiales (benchmarks)<text:line-break/></text:p>
        </text:list-item>
      </text:list>
      <text:p text:style-name="P1">⚠️ Principio clave:</text:p>
      <text:p text:style-name="P65">Si una métrica no puede calcularse de forma consistente para la mayoría del universo, <text:span text:style-name="T4">no se incluye</text:span>.</text:p>
      <text:p text:style-name="Standard"><draw:rect text:anchor-type="as-char" style:rel-width="100%" draw:z-index="3" draw:style-name="gr1" draw:text-style-name="P72" svg:width="0.0012in" svg:height="0.0213in"><text:p/></draw:rect></text:p>
      <text:p text:style-name="P70"><text:bookmark text:name="_g3ux0cuoqrij"/><text:span text:style-name="T2">4️⃣ HORIZONTE TEMPORAL DEL ANÁLISIS</text:span></text:p>
      <text:p text:style-name="P1">El enriquecimiento debe cubrir <text:span text:style-name="T4">varios horizontes</text:span>, porque cada uno mide algo distinto:</text:p>
      <text:list xml:id="list3129466445" text:style-name="WWNum9">
        <text:list-item>
          <text:p text:style-name="P8"><text:span text:style-name="T4">YTD</text:span> → comportamiento reciente / estrés actual<text:line-break/></text:p>
        </text:list-item>
        <text:list-item>
          <text:p text:style-name="P31"><text:span text:style-name="T4">1 año</text:span> → ciclo corto<text:line-break/></text:p>
        </text:list-item>
        <text:list-item>
          <text:p text:style-name="P31"><text:span text:style-name="T4">3 años</text:span> → robustez táctica<text:line-break/></text:p>
        </text:list-item>
        <text:list-item>
          <text:p text:style-name="P31"><text:span text:style-name="T4">5 años</text:span> → calidad estructural<text:line-break/></text:p>
        </text:list-item>
        <text:list-item>
          <text:p text:style-name="P47"><text:span text:style-name="T4">Desde lanzamiento</text:span> (si aplica) → resiliencia histórica<text:line-break/></text:p>
        </text:list-item>
      </text:list>
      <text:p text:style-name="P1">No todos los fondos tendrán todos los horizontes, pero el modelo debe soportarlo.</text:p>
      <text:p text:style-name="Standard"><draw:rect text:anchor-type="as-char" style:rel-width="100%" draw:z-index="4" draw:style-name="gr1" draw:text-style-name="P72" svg:width="0.0012in" svg:height="0.0213in"><text:p/></draw:rect></text:p>
      <text:p text:style-name="P70"><text:bookmark text:name="_56d24zrekipc"/><text:span text:style-name="T2">5️⃣ INDICADORES A CALCULAR (CORE)</text:span></text:p>
      <text:p text:style-name="P71"><text:bookmark text:name="_xqdwx9ijzfqw"/><text:span text:style-name="T3">🔹 A. Rentabilidad</text:span></text:p>
      <text:p text:style-name="P1">Indicadores básicos, siempre <text:span text:style-name="T4">netos de comisiones</text:span>:</text:p>
      <text:list xml:id="list1110483719" text:style-name="WWNum17">
        <text:list-item>
          <text:p text:style-name="P9">Rentabilidad YTD<text:line-break/></text:p>
        </text:list-item>
        <text:list-item>
          <text:p text:style-name="P32"><text:soft-page-break/>Rentabilidad 1 año<text:line-break/></text:p>
        </text:list-item>
        <text:list-item>
          <text:p text:style-name="P32">Rentabilidad anualizada 3 años<text:line-break/></text:p>
        </text:list-item>
        <text:list-item>
          <text:p text:style-name="P48">Rentabilidad anualizada 5 años<text:line-break/></text:p>
        </text:list-item>
      </text:list>
      <text:p text:style-name="P1">Notas:</text:p>
      <text:list xml:id="list3815781918" text:style-name="WWNum12">
        <text:list-item>
          <text:p text:style-name="P10">No se usan rentabilidades “puntuales” sin contexto.<text:line-break/></text:p>
        </text:list-item>
        <text:list-item>
          <text:p text:style-name="P49">Se priorizan anualizadas para comparabilidad.<text:line-break/></text:p>
        </text:list-item>
      </text:list>
      <text:p text:style-name="Standard"><draw:rect text:anchor-type="as-char" style:rel-width="100%" draw:z-index="5" draw:style-name="gr1" draw:text-style-name="P72" svg:width="0.0012in" svg:height="0.0213in"><text:p/></draw:rect></text:p>
      <text:p text:style-name="P71"><text:bookmark text:name="_w3evvzrw84u1"/><text:span text:style-name="T3">🔹 B. Riesgo (volatilidad y pérdidas)</text:span></text:p>
      <text:p text:style-name="P1">Indicadores imprescindibles:</text:p>
      <text:list xml:id="list2651054859" text:style-name="WWNum11">
        <text:list-item>
          <text:p text:style-name="P11">Volatilidad anualizada (1, 3 y 5 años)<text:line-break/></text:p>
        </text:list-item>
        <text:list-item>
          <text:p text:style-name="P33">Máximo drawdown (1, 3 y 5 años)<text:line-break/></text:p>
        </text:list-item>
        <text:list-item>
          <text:p text:style-name="P50">Tiempo de recuperación del drawdown (si aplica)<text:line-break/></text:p>
        </text:list-item>
      </text:list>
      <text:p text:style-name="P1">Estos indicadores son <text:span text:style-name="T4">clave</text:span> para:</text:p>
      <text:list xml:id="list3168977629" text:style-name="WWNum15">
        <text:list-item>
          <text:p text:style-name="P12">descartar fondos “inestables”,<text:line-break/></text:p>
        </text:list-item>
        <text:list-item>
          <text:p text:style-name="P51">y proteger al ahorrador conservador.<text:line-break/></text:p>
        </text:list-item>
      </text:list>
      <text:p text:style-name="Standard"><draw:rect text:anchor-type="as-char" style:rel-width="100%" draw:z-index="6" draw:style-name="gr1" draw:text-style-name="P72" svg:width="0.0012in" svg:height="0.0213in"><text:p/></draw:rect></text:p>
      <text:p text:style-name="P71"><text:bookmark text:name="_x525eo7iwhmt"/><text:span text:style-name="T3">🔹 C. Relación riesgo / retorno</text:span></text:p>
      <text:p text:style-name="P1">Indicadores de eficiencia:</text:p>
      <text:list xml:id="list1600932354" text:style-name="WWNum19">
        <text:list-item>
          <text:p text:style-name="P13">Ratio Sharpe<text:line-break/></text:p>
        </text:list-item>
        <text:list-item>
          <text:p text:style-name="P34">Ratio Sortino<text:line-break/></text:p>
        </text:list-item>
        <text:list-item>
          <text:p text:style-name="P52">Rentabilidad / Volatilidad simple<text:line-break/></text:p>
        </text:list-item>
      </text:list>
      <text:p text:style-name="P1"><text:soft-page-break/>Siempre calculados:</text:p>
      <text:list xml:id="list1896022866" text:style-name="WWNum20">
        <text:list-item>
          <text:p text:style-name="P14">con el mismo horizonte temporal,<text:line-break/></text:p>
        </text:list-item>
        <text:list-item>
          <text:p text:style-name="P53">y comparables entre fondos del mismo tipo.<text:line-break/></text:p>
        </text:list-item>
      </text:list>
      <text:p text:style-name="Standard"><draw:rect text:anchor-type="as-char" style:rel-width="100%" draw:z-index="7" draw:style-name="gr1" draw:text-style-name="P72" svg:width="0.0012in" svg:height="0.0213in"><text:p/></draw:rect></text:p>
      <text:p text:style-name="P71"><text:bookmark text:name="_ag05wukrs3f"/><text:span text:style-name="T3">🔹 D. Comparación con benchmark (si existe)</text:span></text:p>
      <text:p text:style-name="P1">Solo cuando:</text:p>
      <text:list xml:id="list598020907" text:style-name="WWNum3">
        <text:list-item>
          <text:p text:style-name="P15">el fondo declara benchmark,<text:line-break/></text:p>
        </text:list-item>
        <text:list-item>
          <text:p text:style-name="P54">o existe uno claramente identificable.<text:line-break/></text:p>
        </text:list-item>
      </text:list>
      <text:p text:style-name="P1">Indicadores:</text:p>
      <text:list xml:id="list1325131055" text:style-name="WWNum24">
        <text:list-item>
          <text:p text:style-name="P16">Alpha (1, 3, 5 años)<text:line-break/></text:p>
        </text:list-item>
        <text:list-item>
          <text:p text:style-name="P35">Tracking Error<text:line-break/></text:p>
        </text:list-item>
        <text:list-item>
          <text:p text:style-name="P35">Ratio de información<text:line-break/></text:p>
        </text:list-item>
        <text:list-item>
          <text:p text:style-name="P55">% de años que bate al benchmark<text:line-break/></text:p>
        </text:list-item>
      </text:list>
      <text:p text:style-name="P1">⚠️ Si no hay benchmark fiable:</text:p>
      <text:list xml:id="list3683705534" text:style-name="WWNum6">
        <text:list-item>
          <text:p text:style-name="P17">no se “inventa”,<text:line-break/></text:p>
        </text:list-item>
        <text:list-item>
          <text:p text:style-name="P56">el fondo se evalúa en términos absolutos.<text:line-break/></text:p>
        </text:list-item>
      </text:list>
      <text:p text:style-name="Standard"><draw:rect text:anchor-type="as-char" style:rel-width="100%" draw:z-index="8" draw:style-name="gr1" draw:text-style-name="P72" svg:width="0.0012in" svg:height="0.0213in"><text:p/></draw:rect></text:p>
      <text:p text:style-name="P71"><text:bookmark text:name="_rubo7mjbb02s"/><text:span text:style-name="T3">🔹 E. Consistencia</text:span></text:p>
      <text:p text:style-name="P1">Indicadores que miden <text:span text:style-name="T4">regularidad</text:span>, no brillo puntual:</text:p>
      <text:list xml:id="list1257710273" text:style-name="WWNum5">
        <text:list-item>
          <text:p text:style-name="P18">% de meses positivos<text:line-break/></text:p>
        </text:list-item>
        <text:list-item>
          <text:p text:style-name="P36">% de años positivos<text:line-break/></text:p>
        </text:list-item>
        <text:list-item>
          <text:p text:style-name="P36"><text:soft-page-break/>Número de años con pérdidas severas<text:line-break/></text:p>
        </text:list-item>
        <text:list-item>
          <text:p text:style-name="P57">Desviación de rentabilidad respecto a la media<text:line-break/></text:p>
        </text:list-item>
      </text:list>
      <text:p text:style-name="P1">Esto es especialmente importante en:</text:p>
      <text:list xml:id="list1808452668" text:style-name="WWNum14">
        <text:list-item>
          <text:p text:style-name="P19">monetarios,<text:line-break/></text:p>
        </text:list-item>
        <text:list-item>
          <text:p text:style-name="P37">RF corto,<text:line-break/></text:p>
        </text:list-item>
        <text:list-item>
          <text:p text:style-name="P58">bloques defensivos.<text:line-break/></text:p>
        </text:list-item>
      </text:list>
      <text:p text:style-name="Standard"><draw:rect text:anchor-type="as-char" style:rel-width="100%" draw:z-index="9" draw:style-name="gr1" draw:text-style-name="P72" svg:width="0.0012in" svg:height="0.0213in"><text:p/></draw:rect></text:p>
      <text:p text:style-name="P70"><text:bookmark text:name="_5iu5f42qkq2r"/><text:span text:style-name="T2">6️⃣ INDICADORES DERIVADOS (OPCIONALES PERO MUY ÚTILES)</text:span></text:p>
      <text:p text:style-name="P1">Dependiendo de disponibilidad:</text:p>
      <text:list xml:id="list1825138504" text:style-name="WWNum23">
        <text:list-item>
          <text:p text:style-name="P20">Correlación con:<text:line-break/></text:p>
          <text:list>
            <text:list-item>
              <text:p text:style-name="P66">renta variable<text:line-break/></text:p>
            </text:list-item>
            <text:list-item>
              <text:p text:style-name="P66">bonos soberanos<text:line-break/></text:p>
            </text:list-item>
            <text:list-item>
              <text:p text:style-name="P66">inflación<text:line-break/></text:p>
            </text:list-item>
          </text:list>
        </text:list-item>
        <text:list-item>
          <text:p text:style-name="P38">Sensibilidad a tipos de interés (duración empírica)<text:line-break/></text:p>
        </text:list-item>
        <text:list-item>
          <text:p text:style-name="P59">Sensibilidad a crédito (spreads)<text:line-break/></text:p>
        </text:list-item>
      </text:list>
      <text:p text:style-name="P1">Estos indicadores ayudan mucho en Proyecto 3 para:</text:p>
      <text:list xml:id="list2034226220" text:style-name="WWNum18">
        <text:list-item>
          <text:p text:style-name="P21">evitar solapamientos,<text:line-break/></text:p>
        </text:list-item>
        <text:list-item>
          <text:p text:style-name="P60">y construir carteras verdaderamente diversificadas.<text:line-break/></text:p>
        </text:list-item>
      </text:list>
      <text:p text:style-name="Standard"><draw:rect text:anchor-type="as-char" style:rel-width="100%" draw:z-index="10" draw:style-name="gr1" draw:text-style-name="P72" svg:width="0.0012in" svg:height="0.0213in"><text:p/></draw:rect></text:p>
      <text:p text:style-name="P70"><text:bookmark text:name="_yspocpbfz2lu"/><text:span text:style-name="T2">7️⃣ ESTRUCTURA DE SALIDA DEL PROYECTO 2</text:span></text:p>
      <text:p text:style-name="P1">El resultado del Proyecto 2 debe ser:</text:p>
      <text:p text:style-name="P1"><text:soft-page-break/>👉 <text:span text:style-name="T4">Una tabla enriquecida</text:span>, una fila por ISIN, con:</text:p>
      <text:list xml:id="list1891934740" text:style-name="WWNum4">
        <text:list-item>
          <text:p text:style-name="P22">todos los campos del Proyecto 1<text:line-break/></text:p>
          <text:list>
            <text:list-item>
              <text:p text:style-name="P67">todos los indicadores cuantitativos calculados<text:line-break/></text:p>
            </text:list-item>
            <text:list-item>
              <text:p text:style-name="P67">metadatos:<text:line-break/></text:p>
            </text:list-item>
            <text:list-item>
              <text:p text:style-name="P67">fuente<text:line-break/></text:p>
            </text:list-item>
            <text:list-item>
              <text:p text:style-name="P67">horizonte<text:line-break/></text:p>
            </text:list-item>
            <text:list-item>
              <text:p text:style-name="P68">fecha de cálculo<text:line-break/></text:p>
            </text:list-item>
          </text:list>
        </text:list-item>
      </text:list>
      <text:p text:style-name="P1">Esta tabla será la <text:span text:style-name="T4">entrada única del Proyecto 3</text:span>.</text:p>
      <text:p text:style-name="Standard"><draw:rect text:anchor-type="as-char" style:rel-width="100%" draw:z-index="11" draw:style-name="gr1" draw:text-style-name="P72" svg:width="0.0012in" svg:height="0.0213in"><text:p/></draw:rect></text:p>
      <text:p text:style-name="P70"><text:bookmark text:name="_5c5yevkbzo4u"/><text:span text:style-name="T2">8️⃣ PRINCIPIOS METODOLÓGICOS (NO NEGOCIABLES)</text:span></text:p>
      <text:list xml:id="list2691016549" text:style-name="WWNum16">
        <text:list-item>
          <text:p text:style-name="P23">Comparar solo fondos de <text:span text:style-name="T4">misma naturaleza<text:line-break/></text:span></text:p>
        </text:list-item>
        <text:list-item>
          <text:p text:style-name="P39">No mezclar horizontes temporales<text:line-break/></text:p>
        </text:list-item>
        <text:list-item>
          <text:p text:style-name="P39">No usar indicadores que no entendamos<text:line-break/></text:p>
        </text:list-item>
        <text:list-item>
          <text:p text:style-name="P39">No “optimizar” métricas para que queden bien<text:line-break/></text:p>
        </text:list-item>
        <text:list-item>
          <text:p text:style-name="P61">Preferir robustez a rentabilidad máxima<text:line-break/></text:p>
        </text:list-item>
      </text:list>
      <text:p text:style-name="Standard"><draw:rect text:anchor-type="as-char" style:rel-width="100%" draw:z-index="12" draw:style-name="gr1" draw:text-style-name="P72" svg:width="0.0012in" svg:height="0.0213in"><text:p/></draw:rect></text:p>
      <text:p text:style-name="P70"><text:bookmark text:name="_gmoj43jpa6tt"/><text:span text:style-name="T2">9️⃣ RELACIÓN CON EL PROYECTO 3</text:span></text:p>
      <text:p text:style-name="P1">El Proyecto 2 <text:span text:style-name="T4">no decide</text:span>, pero deja todo preparado para que el Proyecto 3:</text:p>
      <text:list xml:id="list2680366827" text:style-name="WWNum21">
        <text:list-item>
          <text:p text:style-name="P24">filtre por calidad,<text:line-break/></text:p>
        </text:list-item>
        <text:list-item>
          <text:p text:style-name="P40">asigne pesos con sentido,<text:line-break/></text:p>
        </text:list-item>
        <text:list-item>
          <text:p text:style-name="P40">modele escenarios,<text:line-break/></text:p>
        </text:list-item>
        <text:list-item>
          <text:p text:style-name="P62"><text:soft-page-break/>y evalúe impacto real sobre el patrimonio.<text:line-break/></text:p>
        </text:list-item>
      </text:list>
      <text:p text:style-name="P1">Sin un Proyecto 2 sólido:</text:p>
      <text:list xml:id="list992558157" text:style-name="WWNum22">
        <text:list-item>
          <text:p text:style-name="P25">el Proyecto 3 sería opinativo.<text:line-break/> Con un Proyecto 2 sólido:<text:line-break/></text:p>
        </text:list-item>
        <text:list-item>
          <text:p text:style-name="P63">el Proyecto 3 será <text:span text:style-name="T4">defendible, replicable y racional</text:span>.<text:line-break/></text:p>
        </text:list-item>
      </text:list>
      <text:p text:style-name="Standard"><draw:rect text:anchor-type="as-char" style:rel-width="100%" draw:z-index="13" draw:style-name="gr1" draw:text-style-name="P72" svg:width="0.0012in" svg:height="0.0213in"><text:p/></draw:rect></text:p>
      <text:p text:style-name="P70"><text:bookmark text:name="_7744b4crj8at"/><text:span text:style-name="T2">🔚 Cierre</text:span></text:p>
      <text:p text:style-name="P1">En una frase:</text:p>
      <text:p text:style-name="P65"><text:span text:style-name="T4">El Proyecto 2 convierte fondos “bien tipificados” en fondos “bien evaluados”.</text:span></text:p>
      <text:p text:style-name="P1">Cuando quieras, el siguiente paso natural es:</text:p>
      <text:list xml:id="list3393781714" text:style-name="WWNum10">
        <text:list-item>
          <text:p text:style-name="P26">priorizar qué indicadores implementar primero,<text:line-break/></text:p>
        </text:list-item>
        <text:list-item>
          <text:p text:style-name="P64">o diseñar la estructura técnica (pipeline) del Proyecto 2.<text:line-break/></text:p>
        </text:list-item>
      </text:list>
      <text:p text:style-name="P1">Seguim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58" meta:word-count="851" meta:character-count="5131" meta:non-whitespace-character-count="4422"/>
    <meta:generator>LibreOfficeDev/6.0.5.2$Linux_X86_64 LibreOffice_project/</meta:generator>
  </office:meta>
</office:document-meta>
</file>