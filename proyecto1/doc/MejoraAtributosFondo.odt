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text-properties fo:font-weight="bold" style:font-weight-asian="bold" style:font-weight-complex="bold"/>
    </style:style>
    <style:style style:name="P2" style:family="paragraph" style:parent-style-name="Text_20_body">
      <style:text-properties fo:color="#000000" style:font-name="Consolas" fo:font-size="10pt" fo:background-color="#ffffff"/>
    </style:style>
    <style:style style:name="P3" style:family="paragraph" style:parent-style-name="Text_20_body">
      <style:text-properties fo:color="#808080" style:font-name="Consolas" fo:font-size="10pt" fo:background-color="#ffffff"/>
    </style:style>
    <style:style style:name="P4" style:family="paragraph" style:parent-style-name="Text_20_body">
      <style:paragraph-properties fo:padding="0cm" fo:border="none"/>
      <style:text-properties fo:color="#000000" style:font-name="Consolas" fo:font-size="10pt" fo:background-color="#ffffff"/>
    </style:style>
    <style:style style:name="P5" style:family="paragraph" style:parent-style-name="Text_20_body" style:list-style-name="L1"/>
    <style:style style:name="P6" style:family="paragraph" style:parent-style-name="Text_20_body" style:list-style-name="L1">
      <style:paragraph-properties fo:margin-top="0cm" fo:margin-bottom="0cm"/>
    </style:style>
    <style:style style:name="P7" style:family="paragraph" style:parent-style-name="Text_20_body">
      <style:paragraph-properties fo:break-before="page"/>
    </style:style>
    <style:style style:name="P8" style:family="paragraph" style:parent-style-name="Text_20_body">
      <style:paragraph-properties fo:padding="0cm" fo:border="none"/>
    </style:style>
    <style:style style:name="P9" style:family="paragraph" style:parent-style-name="Text_20_body">
      <style:paragraph-properties fo:padding="0cm" fo:border="none"/>
      <style:text-properties fo:color="#000000" style:font-name="Consolas" fo:font-size="10pt" fo:background-color="#ffffff"/>
    </style:style>
    <style:style style:name="P10" style:family="paragraph" style:parent-style-name="Standard">
      <style:text-properties fo:color="#000000" style:font-name="Consolas" fo:font-size="10pt" fo:background-color="#ffffff"/>
    </style:style>
    <style:style style:name="T1" style:family="text">
      <style:text-properties fo:font-weight="bold" style:font-weight-asian="bold" style:font-weight-complex="bold"/>
    </style:style>
    <style:style style:name="T2" style:family="text">
      <style:text-properties fo:color="#800000" fo:font-weight="bold"/>
    </style:style>
    <style:style style:name="T3" style:family="text">
      <style:text-properties fo:color="#800000" style:font-name="Consolas" fo:font-size="10pt" fo:font-weight="bold" fo:background-color="#ffffff"/>
    </style:style>
    <style:style style:name="T4" style:family="text">
      <style:text-properties fo:color="#000080" fo:font-weight="bold"/>
    </style:style>
    <style:style style:name="T5" style:family="text">
      <style:text-properties fo:color="#000080" style:font-name="Consolas" fo:font-size="10pt" fo:font-weight="bold" fo:background-color="#ffffff"/>
    </style:style>
    <style:style style:name="T6" style:family="text">
      <style:text-properties fo:color="#8e00c6"/>
    </style:style>
    <style:style style:name="T7" style:family="text">
      <style:text-properties fo:color="#8e00c6" style:font-name="Consolas" fo:font-size="10pt" fo:background-color="#ffffff"/>
    </style:style>
    <style:style style:name="T8" style:family="text">
      <style:text-properties fo:color="#006464"/>
    </style:style>
    <style:style style:name="T9" style:family="text">
      <style:text-properties fo:color="#006464" fo:font-style="italic"/>
    </style:style>
    <style:style style:name="T10" style:family="text">
      <style:text-properties fo:color="#008000"/>
    </style:style>
    <style:style style:name="T11" style:family="text">
      <style:text-properties fo:color="#ff0000"/>
    </style:style>
    <style:style style:name="T12" style:family="text">
      <style:text-properties fo:color="#000000" style:font-name="Consolas" fo:font-size="10pt" fo:background-color="#fffff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 CRÍTICO — Derivatives_Usage = NO incorrecto (4 fondos)</text:span></text:p>
      <text:p text:style-name="Text_20_body">Los únicos 4 fondos con <text:span text:style-name="Source_20_Text">Derivatives_Usage = NO</text:span> son todos Fidelity (LU0056886558, LU0766124712, LU1731833304, LU1731833569), y sus KIIDs dicen explícitamente <text:span text:style-name="Emphasis">"el fondo puede utilizar derivados con fines..."</text:span>. El valor correcto es <text:span text:style-name="Source_20_Text">YES</text:span>. Parece un falso negativo del parser que capturó alguna negación fuera de contexto.</text:p>
      <text:p text:style-name="Text_20_body"/>
      <text:p text:style-name="Text_20_body"/>
      <text:p text:style-name="Text_20_body"/>
      <text:p text:style-name="Horizontal_20_Line"/>
      <text:p text:style-name="Text_20_body"><text:span text:style-name="Strong_20_Emphasis">? CRÍTICO — Replication_Method = ACTIVE para 282 fondos Type=Indexado</text:span></text:p>
      <text:p text:style-name="Text_20_body">Hay 277 fondos con <text:span text:style-name="Source_20_Text">Subtype = Fondo Indexado</text:span> y <text:span text:style-name="Source_20_Text">Replication_Method = ACTIVE</text:span> simultáneamente, lo cual es una contradicción directa. La causa raíz puede ser doble:</text:p>
      <text:list xml:id="list3733404361651931401" text:style-name="L1">
        <text:list-item>
          <text:p text:style-name="P6"><text:span text:style-name="Strong_20_Emphasis">Hipótesis A</text:span> (más probable): el <text:span text:style-name="Source_20_Text">Type/Subtype = Indexado</text:span> está mal asignado para esos fondos, que son en realidad de gestión activa con benchmark declarado. Sus KIIDs dicen literalmente <text:span text:style-name="Emphasis">"la cartera se gestiona de forma activa y el gestor no está limitado por el índice"</text:span>. </text:p>
        </text:list-item>
        <text:list-item>
          <text:p text:style-name="P5"><text:span text:style-name="Strong_20_Emphasis">Hipótesis B</text:span>: el parser de <text:span text:style-name="Source_20_Text">Replication_Method</text:span> está capturando la cláusula genérica "gestión activa" de fondos que sí son indexados. </text:p>
        </text:list-item>
      </text:list>
      <text:p text:style-name="Text_20_body">Afecta principalmente a JPMorgan (89), BlackRock (50), Schroeder (29) y Fidelity (28). Requiere decisión de negocio sobre cuál de los dos campos prevalece.</text:p>
      <text:p text:style-name="Text_20_body"/>
      <text:p text:style-name="Text_20_body">Entiendo que en este caso los has incluido en <text:s/>los correctivos que ya he ejecutado y que as aplicado la <text:s/></text:p>
      <text:p text:style-name="Horizontal_20_Line"/>
      <text:p text:style-name="Text_20_body"><text:span text:style-name="Strong_20_Emphasis">? IMPORTANTE — SRRI_Visual sistemáticamente inflado en 56 fondos (LOW_CONFLICT)</text:span></text:p>
      <text:p text:style-name="Text_20_body"><text:span text:style-name="T1">Tu comentario:</text:span> En los 56 fondos con <text:span text:style-name="Source_20_Text">SRRI_Quality_Flag = LOW_CONFLICT</text:span>, el <text:span text:style-name="Source_20_Text">SRRI_Visual</text:span> supera al <text:span text:style-name="Source_20_Text">SRRI_Textual</text:span> con deltas de hasta +5 puntos (media +2.3). El <text:span text:style-name="Source_20_Text">SRRI</text:span> almacenado en <text:span text:style-name="Source_20_Text">fund_master</text:span> coincide siempre con el textual, que es el correcto. El problema está en el extractor visual que parece estar leyendo el gráfico de barras del KIID con sesgo alto. Estos 56 fondos tienen además <text:span text:style-name="Source_20_Text">Data_Quality_Flag = WARN</text:span>, así que están señalizados, pero conviene revisar si el <text:span text:style-name="Source_20_Text">SRRI_Visual</text:span> debería corregirse en <text:span text:style-name="Source_20_Text">fund_kiid_metadata</text:span>. </text:p>
      <text:p text:style-name="Text_20_body"/>
      <text:p text:style-name="Text_20_body"><text:span text:style-name="T1">Mi contribución:</text:span> Ya los operaremos, lo importante es que has confirmado que <text:s/>el textual es correcto</text:p>
      <text:p text:style-name="Horizontal_20_Line"/>
      <text:p text:style-name="Text_20_body"><text:span text:style-name="Strong_20_Emphasis">? IMPORTANTE — Profile = NULL en 163 fondos de tipo Alternativo</text:span></text:p>
      <text:p text:style-name="Text_20_body">Todos los fondos con <text:span text:style-name="Source_20_Text">Fund_Nature = Alternativo</text:span> (152) y <text:span text:style-name="Source_20_Text">Fund_Nature = Restantes</text:span> (11) carecen de <text:span text:style-name="Source_20_Text">Profile</text:span>. Ningún Alternativo tiene Profile asignado en toda la base de datos, lo que sugiere que la lógica de asignación de perfil de riesgo (Conservador/Moderado/Dinámico) excluye deliberadamente esta categoría. Si eso es intencional está bien, pero debería documentarse; si no, habría que extender la heurística.</text:p>
      <text:p text:style-name="Text_20_body"><text:soft-page-break/></text:p>
      <text:p text:style-name="Text_20_body">Hay que revisar los 11 de naturaleza restante. Esto significa que tenemos que revisar la lógica de “descubrimiento” que hemos implementado en análsis de “restantes”, no es capaz de categorizar estos fondos, por eso tendremos que revisarlos.</text:p>
      <text:p text:style-name="Text_20_body"/>
      <text:p text:style-name="Horizontal_20_Line"/>
      <text:p text:style-name="Text_20_body"><text:span text:style-name="Strong_20_Emphasis">? RELEVANTE — Heuristic_Block = RESTANTES para 1.198 fondos de Renta Variable</text:span></text:p>
      <text:p text:style-name="Text_20_body"><text:span text:style-name="T1">Tu comentario:</text:span> El 68% de los fondos <text:span text:style-name="Source_20_Text">Fund_Nature = Renta Variable</text:span> tienen <text:span text:style-name="Source_20_Text">Heuristic_Block = RESTANTES</text:span>, lo que indica que el bloque especializado <text:span text:style-name="Source_20_Text">RENTA_VARIABLE</text:span> del pipeline solo procesa 556 fondos de los 1.754 que son de renta variable. Probablemente hay una condición de filtro en <text:span text:style-name="Source_20_Text">run_block.py</text:span> demasiado restrictiva que deja fuera a la mayoría de fondos de RV temática y activa.</text:p>
      <text:p text:style-name="Text_20_body"><text:span text:style-name="T1">Mi contribución:</text:span> No, el problema es que la heurística debe ser muy conservadora. <text:s/>Y la heurística de esa fase no <text:s/>consideraba a esos fondos como de renta variable. Y por este motivo, quedaron en el saco de “restantes” y como en restantes hemos aplicado una nueva lógica evolucionada, si se han considerado como fondos de renta variable en esta fase. </text:p>
      <text:p text:style-name="Text_20_body"/>
      <text:p text:style-name="Horizontal_20_Line"/>
      <text:p text:style-name="Text_20_body"><text:span text:style-name="Strong_20_Emphasis">? RELEVANTE — Geography = NULL en 357 fondos de Renta Variable</text:span></text:p>
      <text:p text:style-name="Text_20_body"><text:span text:style-name="T1">Tu comentario:</text:span>Todos son fondos temáticos (ESG, Technology, AI, Water...). La pregunta es si <text:span text:style-name="Source_20_Text">Geography = NULL</text:span> es intencional para temáticos de alcance global, o si debería imputarse <text:span text:style-name="Source_20_Text">Global</text:span>. Hay 90 fondos que tienen tanto <text:span text:style-name="Source_20_Text">Theme</text:span> como <text:span text:style-name="Source_20_Text">Geography = Global</text:span>, lo que sugiere que se puede rellenar para los temáticos sin geografía específica.</text:p>
      <text:p text:style-name="Text_20_body"/>
      <text:p text:style-name="Text_20_body"><text:span text:style-name="T1">Mi contribución: </text:span>Geography no debiera ser intencionalmente null en ningún caso. Por tanto este valor que toma este campo debe ser revisado, <text:s/>Entiendo que no pasa en fondos con <text:s/>heuristic_block=”RESTANTES”, que pasa en bloques con heuristic block con valor Renta_Variable. Y de ser así tal vez tendremos que actualizar todos los bloques que se ekjecutan antes de “RESTANTES”, y proyectae sobre todos ellos la lógica de caracterización de atributos óptima, que es la que tenemos implantada en el bloque restantes. Los bloques están subidos al proyecto, en los ficheros monetarios, rf_corto, rf_flexible, renta_variable, mixtos y alternativos</text:p>
      <text:p text:style-name="Text_20_body"><text:s/></text:p>
      <text:p text:style-name="Text_20_body"/>
      <text:p text:style-name="Horizontal_20_Line"/>
      <text:p text:style-name="Text_20_body"><text:span text:style-name="Strong_20_Emphasis">? RELEVANTE — Replication_Method: 149 ETF/Indexados sin valor</text:span></text:p>
      <text:p text:style-name="Text_20_body"><text:span text:style-name="T1">Tu comentario:</text:span>149 fondos con <text:span text:style-name="Source_20_Text">Subtype = ETF</text:span> o <text:span text:style-name="Source_20_Text">Fondo Indexado</text:span> tienen <text:span text:style-name="Source_20_Text">Replication_Method = NULL</text:span>. Afecta a BlackRock (27), Vanguard (23), Franklin (14), Deutsche (13) y Janus (13). Deberían tener al mínimo <text:span text:style-name="Source_20_Text">PASSIVE</text:span> o <text:span text:style-name="Source_20_Text">INDEX</text:span>.</text:p>
      <text:p text:style-name="Text_20_body"/>
      <text:p text:style-name="Text_20_body"><text:span text:style-name="T1">Mi contribución: </text:span>Estos hay que corregirlos </text:p>
      <text:p text:style-name="Text_20_body"/>
      <text:p text:style-name="Horizontal_20_Line"/>
      <text:p text:style-name="Text_20_body"><text:soft-page-break/>¿Quieres que genere sentencias SQL de corrección para alguna de estas inconsistencias? Las más directas serían los 4 <text:span text:style-name="Source_20_Text">Derivatives_Usage = NO</text:span> (corrección clara) y los 149 ETF/Indexados sin <text:span text:style-name="Source_20_Text">Replication_Method</text:span> (imputación mecánica). Las de <text:span text:style-name="Source_20_Text">Replication_Method = ACTIVE</text:span> en fondos Indexado requieren antes tu confirmación sobre qué campo prevalece.</text:p>
      <text:p text:style-name="Standard"/>
      <text:p text:style-name="P1">CUESTIONES PENDIENTES</text:p>
      <text:p text:style-name="Standard"/>
      <text:p text:style-name="Standard">----</text:p>
      <text:p text:style-name="Standard">En la última modificación no ha creado nueva versión para restantes. </text:p>
      <text:p text:style-name="Standard"/>
      <text:p text:style-name="Standard">Entiendo que debiera haberlo hecho ya que el hecho de que no se informara el atributo geography creo que también afectaba <text:s/>a restantes</text:p>
      <text:p text:style-name="Standard"/>
      <text:p text:style-name="Standard">----</text:p>
      <text:p text:style-name="Standard">El resultado de esta consulta es 8 cuando debía ser 0</text:p>
      <text:p text:style-name="Standard"/>
      <text:p text:style-name="P3">-- Contradicción Type/Replication residual (debe ser 0):</text:p>
      <text:p text:style-name="P4"><text:span text:style-name="T2">SELECT</text:span> <text:span text:style-name="T4">COUNT</text:span>(*) <text:span text:style-name="T2">FROM</text:span> <text:span text:style-name="T6">fund_master</text:span></text:p>
      <text:p text:style-name="P4"><text:span text:style-name="T2">WHERE</text:span> <text:span text:style-name="T8">Type</text:span>=<text:span text:style-name="T10">'Indexado'</text:span> <text:span text:style-name="T2">AND</text:span> <text:span text:style-name="T8">Replication_Method</text:span>=<text:span text:style-name="T10">'ACTIVE'</text:span><text:span text:style-name="T11">;</text:span></text:p>
      <text:p text:style-name="Standard"/>
      <text:p text:style-name="Standard"/>
      <text:p text:style-name="Standard">----</text:p>
      <text:p text:style-name="Standard">152 fondos fondos alternativos siguen sin tener informado el perfil</text:p>
      <text:p text:style-name="Standard"/>
      <text:p text:style-name="Standard"/>
      <text:p text:style-name="P3">-- Profile cobertura:</text:p>
      <text:p text:style-name="P4"><text:span text:style-name="T2">SELECT</text:span> <text:span text:style-name="T8">Fund_Nature</text:span>, <text:span text:style-name="T4">SUM</text:span>(<text:span text:style-name="T8">Profile</text:span> <text:span text:style-name="T2">IS</text:span> <text:span text:style-name="T2">NULL</text:span>) <text:span text:style-name="T9">null_profile</text:span></text:p>
      <text:p text:style-name="P4"><text:span text:style-name="T2">FROM</text:span> <text:span text:style-name="T6">fund_master</text:span> <text:span text:style-name="T2">GROUP</text:span> <text:span text:style-name="T2">BY</text:span> <text:span text:style-name="T8">Fund_Nature</text:span><text:span text:style-name="T11">;</text:span></text:p>
      <text:p text:style-name="Standard"/>
      <text:p text:style-name="Standard">------</text:p>
      <text:p text:style-name="Standard"/>
      <text:p text:style-name="Standard">24 fondos sigen teniendo 149 fondos con <text:span text:style-name="Source_20_Text">Subtype = ETF</text:span> o <text:span text:style-name="Source_20_Text">Fondo Indexado</text:span> tienen <text:span text:style-name="Source_20_Text">Replication_Method = NULL</text:span>.</text:p>
      <text:p text:style-name="Standard"/>
      <text:p text:style-name="P2"><text:span text:style-name="T2">select</text:span><text:span text:style-name="T2"> </text:span><text:span text:style-name="T4">count</text:span><text:span text:style-name="T2">(*)</text:span></text:p>
      <text:p text:style-name="P2"><text:span text:style-name="T2">from</text:span> <text:span text:style-name="T6">fund_master</text:span> </text:p>
      <text:p text:style-name="P4"><text:span text:style-name="T2">where</text:span> <text:span text:style-name="T8">subtype</text:span> <text:span text:style-name="T2">in</text:span> (<text:span text:style-name="T4">"ETF"</text:span>,<text:span text:style-name="T4">"Fondo Indexado"</text:span>) </text:p>
      <text:p text:style-name="P4"><text:span text:style-name="T2">and</text:span> <text:span text:style-name="T8">Replication_Method</text:span> <text:span text:style-name="T2">is</text:span> <text:span text:style-name="T2">NULL</text:span><text:span text:style-name="T11">;</text:span></text:p>
      <text:p text:style-name="P10"/>
      <text:p text:style-name="Standard">-----</text:p>
      <text:p text:style-name="Standard">Siguen pendientes de corregir </text:p>
      <text:p text:style-name="Standard"/>
      <text:p text:style-name="Text_20_body">56 fondos con <text:span text:style-name="Source_20_Text">SRRI_Quality_Flag = LOW_CONFLICT</text:span>, el <text:span text:style-name="Source_20_Text">SRRI_Visual</text:span> supera al <text:span text:style-name="Source_20_Text">SRRI_Textual</text:span> con deltas de hasta +5 puntos (media +2.3). El <text:span text:style-name="Source_20_Text">SRRI</text:span> almacenado en <text:span text:style-name="Source_20_Text">fund_master</text:span> coincide siempre con el textual, que es el correcto. El problema está en el extractor visual que parece estar leyendo el gráfico de barras del KIID con sesgo alto. Estos 56 fondos tienen además <text:span text:style-name="Source_20_Text">Data_Quality_Flag = WARN</text:span>, así que están señalizados, pero conviene revisar si el <text:span text:style-name="Source_20_Text">SRRI_Visual</text:span> debería corregirse en <text:span text:style-name="Source_20_Text">fund_kiid_metadata</text:span>. </text:p>
      <text:p text:style-name="Text_20_body"/>
      <text:p text:style-name="Text_20_body"/>
      <text:p text:style-name="Text_20_body"/>
      <text:p text:style-name="P7">El correctivo no ha ido del todo bien. </text:p>
      <text:p text:style-name="P8"><text:span text:style-name="T3">SELECT</text:span><text:span text:style-name="T12"> </text:span><text:span text:style-name="T5">COUNT</text:span><text:span text:style-name="T12">(*) </text:span><text:span text:style-name="T3">FROM</text:span><text:span text:style-name="T12"> </text:span><text:span text:style-name="T7">fund_master</text:span></text:p>
      <text:p text:style-name="P4"><text:span text:style-name="T2">WHERE</text:span> <text:span text:style-name="T8">Type</text:span>=<text:span text:style-name="T10">'Indexado'</text:span> <text:span text:style-name="T2">AND</text:span> <text:span text:style-name="T8">Replication_Method</text:span>=<text:span text:style-name="T10">'ACTIVE'</text:span><text:span text:style-name="T11">;</text:span></text:p>
      <text:p text:style-name="Text_20_body"/>
      <text:p text:style-name="Text_20_body">devuelve 282</text:p>
      <text:p text:style-name="Text_20_body">y </text:p>
      <text:p text:style-name="Text_20_body"><text:span text:style-name="T3">SELECT</text:span><text:span text:style-name="T12"> </text:span><text:span text:style-name="T5">COUNT</text:span><text:span text:style-name="T12">(*) </text:span><text:span text:style-name="T3">FROM</text:span><text:span text:style-name="T12"> </text:span><text:span text:style-name="T7">fund_master</text:span></text:p>
      <text:p text:style-name="P4"><text:span text:style-name="T2">WHERE</text:span> <text:span text:style-name="T8">Fund_Nature</text:span>=<text:span text:style-name="T10">'Alternativo'</text:span> <text:span text:style-name="T2">AND</text:span> <text:span text:style-name="T8">Profile</text:span> <text:span text:style-name="T2">IS</text:span> <text:span text:style-name="T2">NULL</text:span><text:span text:style-name="T11">;</text:span></text:p>
      <text:p text:style-name="Text_20_body"/>
      <text:p text:style-name="Text_20_body">Te he actualizado el repositorio del proyecto y te he subido la version actualizada de alterativos.py , la previa también te la he subido como alterativos_20260308_01.py. También te he subido el volcado actualizado de las tablas fund_master y fund_metadata. Con los datos que te paso, y la versión de los módulos que te he actualizado en el proyecto creo que tienes todos los datos necesarios para poder analizar la causa raiz de estos problemas que no consegumos corregr, y que debemos solventar con correctivos en los módulos que potencialmente puedan generar estas inconsistencias, y con consultas sql para ejecutar los correctivos masivos que fueran necesarios.</text:p>
      <text:p text:style-name="Text_20_body">Y aprovecho también a compartir contigo una duda, ayer hiciste entrega de una nueva versión de los módulos de todos los bloques, salvo restantes.py. En teoría igualabas las políticas de todos los bloques a la óptima, <text:s/>y creo que debieras haberlo hecho ya que si también corregías el hecho de que <text:s/>el atributo geography debía informarse en todos los bloques, creo que también habría que haber actualizado el bloque restantes. Y pos si acaso te planteo esta du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 Antonio Cormenzana Elosua</meta:initial-creator>
    <meta:creation-date>2026-03-08T19:53:41.40</meta:creation-date>
    <dc:date>2026-03-09T21:28:11.40</dc:date>
    <dc:creator>Jose Antonio Cormenzana Elosua</dc:creator>
    <meta:editing-duration>PT5H34M23S</meta:editing-duration>
    <meta:editing-cycles>5</meta:editing-cycles>
    <meta:generator>OpenOffice/4.1.15$Win32 OpenOffice.org_project/4115m2$Build-9813</meta:generator>
    <meta:document-statistic meta:table-count="0" meta:image-count="0" meta:object-count="0" meta:page-count="5" meta:paragraph-count="57" meta:word-count="1210" meta:character-count="7867"/>
  </office:meta>
</office:document-meta>
</file>