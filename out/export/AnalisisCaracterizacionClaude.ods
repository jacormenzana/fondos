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991cm"/>
    </style:style>
    <style:style style:name="co2" style:family="table-column">
      <style:table-column-properties fo:break-before="auto" style:column-width="28.2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6.566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369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ll" style:family="table-cell" style:parent-style-name="Default">
      <style:table-cell-properties fo:wrap-option="wrap" fo:padding="0.101cm"/>
    </style:style>
    <style:style style:name="CellAlt" style:family="table-cell" style:parent-style-name="Default">
      <style:table-cell-properties fo:background-color="#ebf3fb" fo:wrap-option="wrap" fo:padding="0.101cm"/>
    </style:style>
    <style:style style:name="Header" style:family="table-cell" style:parent-style-name="Default">
      <style:table-cell-properties fo:background-color="#1f3864" fo:padding="0.101cm"/>
      <style:text-properties fo:color="#ffffff" fo:font-weight="bold"/>
    </style:style>
    <style:style style:name="ce4" style:family="table-cell" style:parent-style-name="Default">
      <style:table-cell-properties fo:background-color="#1f3864" fo:padding="0.101cm"/>
      <style:text-properties fo:color="#ffffff" fo:font-size="8pt" fo:font-weight="bold" style:font-size-asian="8pt" style:font-size-complex="8pt"/>
    </style:style>
    <style:style style:name="ce5" style:family="table-cell" style:parent-style-name="Default">
      <style:table-cell-properties fo:wrap-option="wrap" fo:padding="0.101cm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ebf3fb" fo:wrap-option="wrap" fo:padding="0.101cm"/>
      <style:text-properties fo:font-size="8pt" style:font-size-asian="8pt" style:font-size-complex="8pt"/>
    </style:style>
    <style:style style:name="ce7" style:family="table-cell" style:parent-style-name="Default">
      <style:text-properties fo:font-size="8pt" style:font-size-asian="8pt" style:font-size-complex="8pt"/>
    </style:style>
  </office:automatic-styles>
  <office:body>
    <office:spreadsheet>
      <table:table table:name="Grupos" table:style-name="ta1">
        <table:table-column table:style-name="co1" table:default-cell-style-name="Cell"/>
        <table:table-column table:style-name="co2" table:default-cell-style-name="Cell"/>
        <table:table-row table:style-name="ro1">
          <table:table-cell table:style-name="Header" office:value-type="string">
            <text:p>Denominación</text:p>
          </table:table-cell>
          <table:table-cell table:style-name="Header" office:value-type="string">
            <text:p>Objeto</text:p>
          </table:table-cell>
        </table:table-row>
        <table:table-row table:style-name="ro1">
          <table:table-cell office:value-type="string">
            <text:p>Identidad</text:p>
          </table:table-cell>
          <table:table-cell office:value-type="string">
            <text:p>Identificar unívocamente cada fondo, su familia de clases y su gestora.</text:p>
          </table:table-cell>
        </table:table-row>
        <table:table-row table:style-name="ro1">
          <table:table-cell table:style-name="CellAlt" office:value-type="string">
            <text:p>Clasificación Estructural</text:p>
          </table:table-cell>
          <table:table-cell table:style-name="CellAlt" office:value-type="string">
            <text:p>Determinar la naturaleza financiera del producto y su tipología en la jerarquía Nature→Type→Subtype.</text:p>
          </table:table-cell>
        </table:table-row>
        <table:table-row table:style-name="ro1">
          <table:table-cell office:value-type="string">
            <text:p>Perfil de Riesgo</text:p>
          </table:table-cell>
          <table:table-cell office:value-type="string">
            <text:p>Cuantificar el riesgo asumido y el horizonte temporal recomendado para el inversor.</text:p>
          </table:table-cell>
        </table:table-row>
        <table:table-row table:style-name="ro1">
          <table:table-cell table:style-name="CellAlt" office:value-type="string">
            <text:p>Exposición</text:p>
          </table:table-cell>
          <table:table-cell table:style-name="CellAlt" office:value-type="string">
            <text:p>Describir el universo de inversión: ámbito geográfico, tipo de exposición, sector y temática.</text:p>
          </table:table-cell>
        </table:table-row>
        <table:table-row table:style-name="ro1">
          <table:table-cell office:value-type="string">
            <text:p>Estrategia</text:p>
          </table:table-cell>
          <table:table-cell office:value-type="string">
            <text:p>Caracterizar el enfoque de gestión, estilo de inversión y sesgo de cartera.</text:p>
          </table:table-cell>
        </table:table-row>
        <table:table-row table:style-name="ro1">
          <table:table-cell table:style-name="CellAlt" office:value-type="string">
            <text:p>Estructura del Producto</text:p>
          </table:table-cell>
          <table:table-cell table:style-name="CellAlt" office:value-type="string">
            <text:p>Recoger las características operativas y de construcción: divisa, réplica, derivados, liquidez.</text:p>
          </table:table-cell>
        </table:table-row>
        <table:table-row table:style-name="ro1">
          <table:table-cell office:value-type="string">
            <text:p>Costes y Comisiones</text:p>
          </table:table-cell>
          <table:table-cell office:value-type="string">
            <text:p>Registrar la estructura completa de comisiones con distinción entre coste conocido y desconocido.</text:p>
          </table:table-cell>
        </table:table-row>
        <table:table-row table:style-name="ro1">
          <table:table-cell table:style-name="CellAlt" office:value-type="string">
            <text:p>Regulación y Sostenibilidad</text:p>
          </table:table-cell>
          <table:table-cell table:style-name="CellAlt" office:value-type="string">
            <text:p>Marco normativo aplicable al fondo: SFDR, KIID/KID, criterios ESG.</text:p>
          </table:table-cell>
        </table:table-row>
        <table:table-row table:style-name="ro1">
          <table:table-cell office:value-type="string">
            <text:p>Control y Trazabilidad</text:p>
          </table:table-cell>
          <table:table-cell office:value-type="string">
            <text:p>Metadatos del pipeline de ingesta y clasificación para auditoría y debugging.</text:p>
          </table:table-cell>
        </table:table-row>
      </table:table>
      <table:table table:name="Actuales" table:style-name="ta1">
        <table:table-column table:style-name="co4" table:number-columns-repeated="1024" table:default-cell-style-name="ce7"/>
        <table:table-row table:style-name="ro2">
          <table:table-cell table:style-name="ce4" office:value-type="string">
            <text:p>Nombre</text:p>
          </table:table-cell>
          <table:table-cell table:style-name="ce4" office:value-type="string">
            <text:p>Grupo</text:p>
          </table:table-cell>
          <table:table-cell table:style-name="ce4" office:value-type="string">
            <text:p>Pregunta</text:p>
          </table:table-cell>
          <table:table-cell table:style-name="ce4" office:value-type="string">
            <text:p>Criterio</text:p>
          </table:table-cell>
          <table:table-cell table:style-name="ce4" office:value-type="string">
            <text:p>Objeto</text:p>
          </table:table-cell>
          <table:table-cell table:style-name="ce4" office:value-type="string">
            <text:p>PobActual</text:p>
          </table:table-cell>
          <table:table-cell table:style-name="ce4" office:value-type="string">
            <text:p>Mantener</text:p>
          </table:table-cell>
          <table:table-cell table:style-name="ce4" office:value-type="string">
            <text:p>ModificarCriterio</text:p>
          </table:table-cell>
          <table:table-cell table:style-name="ce4" office:value-type="string">
            <text:p>ModificarValores</text:p>
          </table:table-cell>
          <table:table-cell table:style-name="ce4" office:value-type="string">
            <text:p>NuevaPoblación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ISIN</text:p>
          </table:table-cell>
          <table:table-cell table:style-name="ce5" office:value-type="string">
            <text:p>Identidad</text:p>
          </table:table-cell>
          <table:table-cell table:style-name="ce5" office:value-type="string">
            <text:p>¿Cuál es el identificador regulatorio único del fondo?</text:p>
          </table:table-cell>
          <table:table-cell table:style-name="ce5" office:value-type="string">
            <text:p>Estándar ISO 6166 (2 letras país + 9 alfanum + dígito control).</text:p>
          </table:table-cell>
          <table:table-cell table:style-name="ce5" office:value-type="string">
            <text:p>Clave primaria para todas las operaciones de cruce y referencia.</text:p>
          </table:table-cell>
          <table:table-cell table:style-name="ce5" office:value-type="string">
            <text:p>LU0123456789 (formato ISO)</text:p>
          </table:table-cell>
          <table:table-cell table:style-name="ce5" office:value-type="string">
            <text:p>Sí</text:p>
          </table:table-cell>
          <table:table-cell table:number-columns-repeated="2" table:style-name="ce5" office:value-type="string">
            <text:p>No</text:p>
          </table:table-cell>
          <table:table-cell table:style-name="ce5" office:value-type="string">
            <text:p>—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Fund_Name</text:p>
          </table:table-cell>
          <table:table-cell table:style-name="ce6" office:value-type="string">
            <text:p>Identidad</text:p>
          </table:table-cell>
          <table:table-cell table:style-name="ce6" office:value-type="string">
            <text:p>¿Cuál es la denominación comercial del fondo?</text:p>
          </table:table-cell>
          <table:table-cell table:style-name="ce6" office:value-type="string">
            <text:p>Nombre tal como aparece en el KIID/KID registrado.</text:p>
          </table:table-cell>
          <table:table-cell table:style-name="ce6" office:value-type="string">
            <text:p>Referencia legible para operadores y reporting.</text:p>
          </table:table-cell>
          <table:table-cell table:style-name="ce6" office:value-type="string">
            <text:p>Texto libre</text:p>
          </table:table-cell>
          <table:table-cell table:style-name="ce6" office:value-type="string">
            <text:p>Sí</text:p>
          </table:table-cell>
          <table:table-cell table:number-columns-repeated="2" table:style-name="ce6" office:value-type="string">
            <text:p>No</text:p>
          </table:table-cell>
          <table:table-cell table:style-name="ce6" office:value-type="string">
            <text:p>—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Management_Company</text:p>
          </table:table-cell>
          <table:table-cell table:style-name="ce5" office:value-type="string">
            <text:p>Identidad</text:p>
          </table:table-cell>
          <table:table-cell table:style-name="ce5" office:value-type="string">
            <text:p>¿Qué entidad gestiona el fondo?</text:p>
          </table:table-cell>
          <table:table-cell table:style-name="ce5" office:value-type="string">
            <text:p>Nombre de la gestora tal como figura en el KIID.</text:p>
          </table:table-cell>
          <table:table-cell table:style-name="ce5" office:value-type="string">
            <text:p>Permitir análisis de concentración por gestora y aplicar reglas de familia.</text:p>
          </table:table-cell>
          <table:table-cell table:style-name="ce5" office:value-type="string">
            <text:p>Texto libre</text:p>
          </table:table-cell>
          <table:table-cell table:style-name="ce5" office:value-type="string">
            <text:p>Sí</text:p>
          </table:table-cell>
          <table:table-cell table:number-columns-repeated="2" table:style-name="ce5" office:value-type="string">
            <text:p>No</text:p>
          </table:table-cell>
          <table:table-cell table:style-name="ce5" office:value-type="string">
            <text:p>—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fund_family_id</text:p>
          </table:table-cell>
          <table:table-cell table:style-name="ce6" office:value-type="string">
            <text:p>Identidad</text:p>
          </table:table-cell>
          <table:table-cell table:style-name="ce6" office:value-type="string">
            <text:p>¿A qué familia de clases pertenece este fondo?</text:p>
          </table:table-cell>
          <table:table-cell table:style-name="ce6" office:value-type="string">
            <text:p>Clave técnica generada por fund_family_builder agrupando clases del mismo vehículo.</text:p>
          </table:table-cell>
          <table:table-cell table:style-name="ce6" office:value-type="string">
            <text:p>Agrupar clases de un mismo fondo para deduplicación en P3 y análisis de consistencia.</text:p>
          </table:table-cell>
          <table:table-cell table:style-name="ce6" office:value-type="string">
            <text:p>FAM_000001 … FAM_999999 (clave técnica)</text:p>
          </table:table-cell>
          <table:table-cell table:style-name="ce6" office:value-type="string">
            <text:p>Sí</text:p>
          </table:table-cell>
          <table:table-cell table:number-columns-repeated="2" table:style-name="ce6" office:value-type="string">
            <text:p>No</text:p>
          </table:table-cell>
          <table:table-cell table:style-name="ce6" office:value-type="string">
            <text:p>—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Fund_Nature</text:p>
          </table:table-cell>
          <table:table-cell table:style-name="ce5" office:value-type="string">
            <text:p>Clasificación Estructural</text:p>
          </table:table-cell>
          <table:table-cell table:style-name="ce5" office:value-type="string">
            <text:p>¿Cuál es la naturaleza financiera principal del fondo?</text:p>
          </table:table-cell>
          <table:table-cell table:style-name="ce5" office:value-type="string">
            <text:p>Clasificación secuencial excluyente por bloques heurísticos basada en texto KIID y nombre.</text:p>
          </table:table-cell>
          <table:table-cell table:style-name="ce5" office:value-type="string">
            <text:p>Primer nivel de clasificación — determina el bloque de tratamiento y los filtros de P3.</text:p>
          </table:table-cell>
          <table:table-cell table:style-name="ce5" office:value-type="string">
            <text:p>Renta Variable, Mixtos, Renta Fija Flexible, Renta Fija Corto Plazo, Monetario, Alternativo, Restantes, Estructurado</text:p>
          </table:table-cell>
          <table:table-cell table:number-columns-repeated="2" table:style-name="ce5" office:value-type="string">
            <text:p>Sí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nta Variable, Mixtos, Renta Fija Flexible, Renta Fija Corto Plazo, Monetario, Alternativo, Restantes, Estructurado — mantener. 'Restantes' es categoría operativa necesaria para fondos no clasificables; no es un defecto del modelo.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Type</text:p>
          </table:table-cell>
          <table:table-cell table:style-name="ce6" office:value-type="string">
            <text:p>Clasificación Estructural</text:p>
          </table:table-cell>
          <table:table-cell table:style-name="ce6" office:value-type="string">
            <text:p>¿Qué tipo de vehículo o estrategia representa el fondo dentro de su naturaleza?</text:p>
          </table:table-cell>
          <table:table-cell table:style-name="ce6" office:value-type="string">
            <text:p>Señales semánticas del nombre y texto KIID dentro del bloque asignado.</text:p>
          </table:table-cell>
          <table:table-cell table:style-name="ce6" office:value-type="string">
            <text:p>Segundo nivel de clasificación — refina Fund_Nature para comparabilidad intra-categoría.</text:p>
          </table:table-cell>
          <table:table-cell table:style-name="ce6" office:value-type="string">
            <text:p>Equity, Fixed Income, Balanced, Absolute Return, Index, ETF, Fund of Funds, Commodity, Real Estate, Multi-Asset, Money Market (según bloque)</text:p>
          </table:table-cell>
          <table:table-cell table:number-columns-repeated="3" table:style-name="ce6" office:value-type="string">
            <text:p>Sí</text:p>
          </table:table-cell>
          <table:table-cell table:style-name="ce6" office:value-type="string">
            <text:p>Definir lista cerrada por bloque con jerarquía estricta Nature→Type. Eliminar valores duplicados entre bloques.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Subtype</text:p>
          </table:table-cell>
          <table:table-cell table:style-name="ce5" office:value-type="string">
            <text:p>Clasificación Estructural</text:p>
          </table:table-cell>
          <table:table-cell table:style-name="ce5" office:value-type="string">
            <text:p>¿Existe alguna especificidad estructural relevante dentro del Type?</text:p>
          </table:table-cell>
          <table:table-cell table:style-name="ce5" office:value-type="string">
            <text:p>Señales muy específicas del KIID para casos excepcionales.</text:p>
          </table:table-cell>
          <table:table-cell table:style-name="ce5" office:value-type="string">
            <text:p>Tercer nivel opcional de clasificación para casos que no encajan en Type sin perder información relevante.</text:p>
          </table:table-cell>
          <table:table-cell table:style-name="ce5" office:value-type="string">
            <text:p>Uso excepcional — valores libres por bloque</text:p>
          </table:table-cell>
          <table:table-cell table:number-columns-repeated="2" table:style-name="ce5" office:value-type="string">
            <text:p>Sí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ntener solo para Alternativos donde la especificidad estructural es alta (Long/Short, Market Neutral, etc.). Valor NULL válido para el resto.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Family</text:p>
          </table:table-cell>
          <table:table-cell table:style-name="ce6" office:value-type="string">
            <text:p>Clasificación Estructural</text:p>
          </table:table-cell>
          <table:table-cell table:style-name="ce6" office:value-type="string">
            <text:p>¿A qué línea de producto pertenece este fondo dentro de su gestora?</text:p>
          </table:table-cell>
          <table:table-cell table:style-name="ce6" office:value-type="string">
            <text:p>Etiqueta semántica descriptiva de la gama de fondos (no confundir con fund_family_id técnico).</text:p>
          </table:table-cell>
          <table:table-cell table:style-name="ce6" office:value-type="string">
            <text:p>Permitir análisis de coherencia dentro de líneas de producto y aplicar reglas de consistencia de familia.</text:p>
          </table:table-cell>
          <table:table-cell table:style-name="ce6" office:value-type="string">
            <text:p>Nombres descriptivos: Retorno Absoluto, Global Equity, Income, etc.</text:p>
          </table:table-cell>
          <table:table-cell table:style-name="ce6" office:value-type="string">
            <text:p>Sí</text:p>
          </table:table-cell>
          <table:table-cell table:number-columns-repeated="2" table:style-name="ce6" office:value-type="string">
            <text:p>No</text:p>
          </table:table-cell>
          <table:table-cell table:style-name="ce6" office:value-type="string">
            <text:p>—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SRRI</text:p>
          </table:table-cell>
          <table:table-cell table:style-name="ce5" office:value-type="string">
            <text:p>Perfil de Riesgo</text:p>
          </table:table-cell>
          <table:table-cell table:style-name="ce5" office:value-type="string">
            <text:p>¿Cuál es el indicador sintético de riesgo y remuneración regulatorio del fondo?</text:p>
          </table:table-cell>
          <table:table-cell table:style-name="ce5" office:value-type="string">
            <text:p>Extraído del KIID mediante detección visual (geometría del gráfico) y textual (patrones multilingüe). Validación cruzada entre ambas fuentes.</text:p>
          </table:table-cell>
          <table:table-cell table:style-name="ce5" office:value-type="string">
            <text:p>Indicador regulatorio obligatorio UCITS. Base primaria para el perfil de riesgo y los filtros de P3.</text:p>
          </table:table-cell>
          <table:table-cell table:style-name="ce5" office:value-type="string">
            <text:p>1, 2, 3, 4, 5, 6, 7</text:p>
          </table:table-cell>
          <table:table-cell table:style-name="ce5" office:value-type="string">
            <text:p>Sí</text:p>
          </table:table-cell>
          <table:table-cell table:number-columns-repeated="2" table:style-name="ce5" office:value-type="string">
            <text:p>No</text:p>
          </table:table-cell>
          <table:table-cell table:style-name="ce5" office:value-type="string">
            <text:p>—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Profile</text:p>
          </table:table-cell>
          <table:table-cell table:style-name="ce6" office:value-type="string">
            <text:p>Perfil de Riesgo</text:p>
          </table:table-cell>
          <table:table-cell table:style-name="ce6" office:value-type="string">
            <text:p>¿A qué perfil inversor tipo corresponde el fondo?</text:p>
          </table:table-cell>
          <table:table-cell table:style-name="ce6" office:value-type="string">
            <text:p>Derivado del SRRI con mapeo: 1-2→Conservador, 3-4→Moderado, 5-7→Dinámico.</text:p>
          </table:table-cell>
          <table:table-cell table:style-name="ce6" office:value-type="string">
            <text:p>Segmentación operativa para filtros de P3 y presentación al usuario final.</text:p>
          </table:table-cell>
          <table:table-cell table:style-name="ce6" office:value-type="string">
            <text:p>Conservador, Moderado, Dinámico</text:p>
          </table:table-cell>
          <table:table-cell table:number-columns-repeated="3" table:style-name="ce6" office:value-type="string">
            <text:p>Sí</text:p>
          </table:table-cell>
          <table:table-cell table:style-name="ce6" office:value-type="string">
            <text:p>Conservador (SRRI 1-2), Moderado (SRRI 3-4), Dinámico (SRRI 5-6), Agresivo (SRRI 7). Separar SRRI=7 como categoría propia por el salto cualitativo de riesgo que representa.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Recommended_Holding_Period</text:p>
          </table:table-cell>
          <table:table-cell table:style-name="ce5" office:value-type="string">
            <text:p>Perfil de Riesgo</text:p>
          </table:table-cell>
          <table:table-cell table:style-name="ce5" office:value-type="string">
            <text:p>¿Cuántos años recomienda el KIID mantener la inversión?</text:p>
          </table:table-cell>
          <table:table-cell table:style-name="ce5" office:value-type="string">
            <text:p>Extraído del texto KIID mediante patrones numéricos (años). Normalizado a entero.</text:p>
          </table:table-cell>
          <table:table-cell table:style-name="ce5" office:value-type="string">
            <text:p>Filtro de adecuación del fondo al horizonte temporal del inversor en P3.</text:p>
          </table:table-cell>
          <table:table-cell table:style-name="ce5" office:value-type="string">
            <text:p>Entero 1-10 (años)</text:p>
          </table:table-cell>
          <table:table-cell table:number-columns-repeated="2" table:style-name="ce5" office:value-type="string">
            <text:p>Sí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Valor numérico entero en años. NULL solo si el KIID no declara el período.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Geography</text:p>
          </table:table-cell>
          <table:table-cell table:style-name="ce6" office:value-type="string">
            <text:p>Exposición</text:p>
          </table:table-cell>
          <table:table-cell table:style-name="ce6" office:value-type="string">
            <text:p>¿En qué zona geográfica principal invierte el fondo?</text:p>
          </table:table-cell>
          <table:table-cell table:style-name="ce6" office:value-type="string">
            <text:p>Señales en nombre del fondo y texto objetivo del KIID. Jerarquía: señal de nombre &gt; señal de objetivo KIID.</text:p>
          </table:table-cell>
          <table:table-cell table:style-name="ce6" office:value-type="string">
            <text:p>Filtrar y agrupar fondos por zona para diversificación geográfica en P3.</text:p>
          </table:table-cell>
          <table:table-cell table:style-name="ce6" office:value-type="string">
            <text:p>Global, Europa, EEUU, Asia, Emergentes, China, Japón, India, Latinoamérica, Europa del Este, Rusia</text:p>
          </table:table-cell>
          <table:table-cell table:number-columns-repeated="2" table:style-name="ce6" office:value-type="string">
            <text:p>Sí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Global, Europa, EEUU, Asia-Pacífico, Emergentes, China, Japón, India, Latinoamérica, Europa del Este. Añadir inferencia desde Benchmark_Declared para fondos con Geography=NULL.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Investment_Universe</text:p>
          </table:table-cell>
          <table:table-cell table:style-name="ce5" office:value-type="string">
            <text:p>Exposición</text:p>
          </table:table-cell>
          <table:table-cell table:style-name="ce5" office:value-type="string">
            <text:p>¿Cuál es el ámbito geográfico del mandato de inversión?</text:p>
          </table:table-cell>
          <table:table-cell table:style-name="ce5" office:value-type="string">
            <text:p>Derivado de Geography y Fund_Nature: Liquidity para monetarios/RF corto, Country para geografías de un país, Regional para regiones, Global para cobertura mundial.</text:p>
          </table:table-cell>
          <table:table-cell table:style-name="ce5" office:value-type="string">
            <text:p>Abstracción operativa de Geography para segmentación de alto nivel en P3 y definición de universos comparables.</text:p>
          </table:table-cell>
          <table:table-cell table:style-name="ce5" office:value-type="string">
            <text:p>Global, Regional, Country, Sector, Thematic, Liquidity</text:p>
          </table:table-cell>
          <table:table-cell table:number-columns-repeated="3" table:style-name="ce5" office:value-type="string">
            <text:p>Sí</text:p>
          </table:table-cell>
          <table:table-cell table:style-name="ce5" office:value-type="string">
            <text:p>Global, Regional, Country, Liquidity — dimensión geográfica pura. Los valores 'Sector' y 'Thematic' se trasladan al nuevo atributo Investment_Focus (v17). Ver Añadir.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Theme</text:p>
          </table:table-cell>
          <table:table-cell table:style-name="ce6" office:value-type="string">
            <text:p>Exposición</text:p>
          </table:table-cell>
          <table:table-cell table:style-name="ce6" office:value-type="string">
            <text:p>¿En qué temática de inversión se especializa el fondo?</text:p>
          </table:table-cell>
          <table:table-cell table:style-name="ce6" office:value-type="string">
            <text:p>Señales del nombre del fondo (diccionario THEMATIC_MAP_EXTENDED) y del texto objetivo del KIID.</text:p>
          </table:table-cell>
          <table:table-cell table:style-name="ce6" office:value-type="string">
            <text:p>Identificar fondos temáticos para agrupación, filtrado y scoring específico en P3.</text:p>
          </table:table-cell>
          <table:table-cell table:style-name="ce6" office:value-type="string">
            <text:p>Technology, Artificial Intelligence, Digital, Robotics, Cybersecurity, Climate / Clean Energy, Energy, Healthcare / MedTech, Healthcare, Biotechnology, Water, Gold, Mining, Infrastructure, Real Estate, Financials, Consumer Brands, Consumer / Food &amp; Beverage, Silver Economy, Megatrends, Insurance, Inflación</text:p>
          </table:table-cell>
          <table:table-cell table:number-columns-repeated="3" table:style-name="ce6" office:value-type="string">
            <text:p>Sí</text:p>
          </table:table-cell>
          <table:table-cell table:style-name="ce6" office:value-type="string">
            <text:p>Mantener granularidad actual + añadir valor 'Core/General' para fondos no temáticos (reemplaza NULL semántico). NULL queda reservado para 'no procesado / indeterminado'.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Market_Cap_Focus</text:p>
          </table:table-cell>
          <table:table-cell table:style-name="ce5" office:value-type="string">
            <text:p>Exposición</text:p>
          </table:table-cell>
          <table:table-cell table:style-name="ce5" office:value-type="string">
            <text:p>¿En qué segmento de capitalización bursátil se centra el fondo?</text:p>
          </table:table-cell>
          <table:table-cell table:style-name="ce5" office:value-type="string">
            <text:p>Señales en nombre del fondo y texto objetivo del KIID. Solo aplicable a fondos de Renta Variable.</text:p>
          </table:table-cell>
          <table:table-cell table:style-name="ce5" office:value-type="string">
            <text:p>Filtrar fondos RV por segmento de capitalización para construir carteras con diversificación de tamaño.</text:p>
          </table:table-cell>
          <table:table-cell table:style-name="ce5" office:value-type="string">
            <text:p>Large Cap, Mid Cap, Small Cap, SMID Cap</text:p>
          </table:table-cell>
          <table:table-cell table:number-columns-repeated="2" table:style-name="ce5" office:value-type="string">
            <text:p>Sí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Large Cap, Mid Cap, Small Cap, SMID Cap, Multi Cap. Restringir a Fund_Nature=Renta Variable en validación.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Sector_Focus</text:p>
          </table:table-cell>
          <table:table-cell table:style-name="ce6" office:value-type="string">
            <text:p>Exposición</text:p>
          </table:table-cell>
          <table:table-cell table:style-name="ce6" office:value-type="string">
            <text:p>¿En qué sector de actividad económica se centra el fondo?</text:p>
          </table:table-cell>
          <table:table-cell table:style-name="ce6" office:value-type="string">
            <text:p>Derivado del Theme usando agrupación sectorial. Aplicable cuando Investment_Focus='Sector'.</text:p>
          </table:table-cell>
          <table:table-cell table:style-name="ce6" office:value-type="string">
            <text:p>Filtrar y comparar fondos sectoriales bajo nomenclatura estándar para P3.</text:p>
          </table:table-cell>
          <table:table-cell table:style-name="ce6" office:value-type="string">
            <text:p>Technology &amp; Innovation, Healthcare &amp; Life Sciences, Energy &amp; Resources, Real Assets, Financial Services, Consumer, Materials &amp; Mining, Utilities &amp; Environment</text:p>
          </table:table-cell>
          <table:table-cell table:number-columns-repeated="3" table:style-name="ce6" office:value-type="string">
            <text:p>Sí</text:p>
          </table:table-cell>
          <table:table-cell table:style-name="ce6" office:value-type="string">
            <text:p>Tecnología e Innovación, Salud y Ciencias de la Vida, Energía y Recursos, Real Assets, Servicios Financieros, Consumo, Materiales y Minería, Utilities y Medio Ambiente. Alinear con clasificación GICS. Obligatorio si Investment_Focus='Sector'.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Style_Profile</text:p>
          </table:table-cell>
          <table:table-cell table:style-name="ce5" office:value-type="string">
            <text:p>Estrategia</text:p>
          </table:table-cell>
          <table:table-cell table:style-name="ce5" office:value-type="string">
            <text:p>¿Qué estilo de inversión sigue el fondo?</text:p>
          </table:table-cell>
          <table:table-cell table:style-name="ce5" office:value-type="string">
            <text:p>Señales en nombre del fondo y texto KIID. Solo significativo para fondos de Renta Variable.</text:p>
          </table:table-cell>
          <table:table-cell table:style-name="ce5" office:value-type="string">
            <text:p>Diversificar estilos en la cartera RV de P3 (Value/Growth/Blend).</text:p>
          </table:table-cell>
          <table:table-cell table:style-name="ce5" office:value-type="string">
            <text:p>Value, Growth, Blend, Income, Momentum, Yield</text:p>
          </table:table-cell>
          <table:table-cell table:number-columns-repeated="2" table:style-name="ce5" office:value-type="string">
            <text:p>Sí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Value, Growth, Blend, Income, Yield. Solo informar para Fund_Nature=Renta Variable. NULL válido para el resto.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Exposure_Bias</text:p>
          </table:table-cell>
          <table:table-cell table:style-name="ce6" office:value-type="string">
            <text:p>Estrategia</text:p>
          </table:table-cell>
          <table:table-cell table:style-name="ce6" office:value-type="string">
            <text:p>¿Qué sesgo sistemático de exposición presenta el fondo?</text:p>
          </table:table-cell>
          <table:table-cell table:style-name="ce6" office:value-type="string">
            <text:p>Señales estructurales del KIID sobre la política de inversión (largo/corto, neutral, direccional).</text:p>
          </table:table-cell>
          <table:table-cell table:style-name="ce6" office:value-type="string">
            <text:p>Identificar fondos con sesgos estructurales relevantes para la construcción de carteras defensivas en P3.</text:p>
          </table:table-cell>
          <table:table-cell table:style-name="ce6" office:value-type="string">
            <text:p>Long Only, Long/Short, Market Neutral, Directional, Credit Bias, Macro, Commodity</text:p>
          </table:table-cell>
          <table:table-cell table:style-name="ce6" office:value-type="string">
            <text:p>Sí</text:p>
          </table:table-cell>
          <table:table-cell table:number-columns-repeated="2" table:style-name="ce6" office:value-type="string">
            <text:p>No</text:p>
          </table:table-cell>
          <table:table-cell table:style-name="ce6" office:value-type="string">
            <text:p>—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Strategy</text:p>
          </table:table-cell>
          <table:table-cell table:style-name="ce5" office:value-type="string">
            <text:p>Estrategia</text:p>
          </table:table-cell>
          <table:table-cell table:style-name="ce5" office:value-type="string">
            <text:p>¿Qué tipo de gestión implementa el fondo?</text:p>
          </table:table-cell>
          <table:table-cell table:style-name="ce5" office:value-type="string">
            <text:p>Señales de réplica, nombre y texto KIID sobre el enfoque de gestión.</text:p>
          </table:table-cell>
          <table:table-cell table:style-name="ce5" office:value-type="string">
            <text:p>Distinguir gestión activa de pasiva / indexada para evaluación de valor añadido en P3.</text:p>
          </table:table-cell>
          <table:table-cell table:style-name="ce5" office:value-type="string">
            <text:p>Active, Passive, Index, ETF, Quant, Systematic</text:p>
          </table:table-cell>
          <table:table-cell table:number-columns-repeated="2" table:style-name="ce5" office:value-type="string">
            <text:p>Sí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ctive, Passive, Index, Quant/Systematic. Simplificar eliminando solapamientos entre Index y Passive.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Fund_Currency</text:p>
          </table:table-cell>
          <table:table-cell table:style-name="ce6" office:value-type="string">
            <text:p>Estructura del Producto</text:p>
          </table:table-cell>
          <table:table-cell table:style-name="ce6" office:value-type="string">
            <text:p>¿En qué divisa está denominado el fondo?</text:p>
          </table:table-cell>
          <table:table-cell table:style-name="ce6" office:value-type="string">
            <text:p>Extraído del texto KIID. Completado con inferencia desde nombre y benchmark cuando es NULL.</text:p>
          </table:table-cell>
          <table:table-cell table:style-name="ce6" office:value-type="string">
            <text:p>Base de cálculo de retornos en divisa local y gestión del riesgo divisa en P2/P3.</text:p>
          </table:table-cell>
          <table:table-cell table:style-name="ce6" office:value-type="string">
            <text:p>EUR, USD, GBP, CHF, JPY, CNH</text:p>
          </table:table-cell>
          <table:table-cell table:style-name="ce6" office:value-type="string">
            <text:p>Sí</text:p>
          </table:table-cell>
          <table:table-cell table:number-columns-repeated="2" table:style-name="ce6" office:value-type="string">
            <text:p>No</text:p>
          </table:table-cell>
          <table:table-cell table:style-name="ce6" office:value-type="string">
            <text:p>—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Portfolio_Currency</text:p>
          </table:table-cell>
          <table:table-cell table:style-name="ce5" office:value-type="string">
            <text:p>Estructura del Producto</text:p>
          </table:table-cell>
          <table:table-cell table:style-name="ce5" office:value-type="string">
            <text:p>¿En qué divisa están denominados los activos en cartera?</text:p>
          </table:table-cell>
          <table:table-cell table:style-name="ce5" office:value-type="string">
            <text:p>Extraído del texto KIID. Cobertura muy baja (~1.3%).</text:p>
          </table:table-cell>
          <table:table-cell table:style-name="ce5" office:value-type="string">
            <text:p>Indicador del riesgo divisa intrínseco de la cartera vs divisa del fondo. Relevante para P2.</text:p>
          </table:table-cell>
          <table:table-cell table:style-name="ce5" office:value-type="string">
            <text:p>USD, EUR (98.66% NULL)</text:p>
          </table:table-cell>
          <table:table-cell table:style-name="ce5" office:value-type="string">
            <text:p>Sí</text:p>
          </table:table-cell>
          <table:table-cell table:number-columns-repeated="2" table:style-name="ce5" office:value-type="string">
            <text:p>No</text:p>
          </table:table-cell>
          <table:table-cell table:style-name="ce5" office:value-type="string">
            <text:p>Mantener en esquema. Marcar como 'no implementado' en P3. No invertir en mejorar cobertura hasta disponer de fuente fiable.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Hedging_Policy</text:p>
          </table:table-cell>
          <table:table-cell table:style-name="ce6" office:value-type="string">
            <text:p>Estructura del Producto</text:p>
          </table:table-cell>
          <table:table-cell table:style-name="ce6" office:value-type="string">
            <text:p>¿Cubre el fondo el riesgo divisa de sus posiciones?</text:p>
          </table:table-cell>
          <table:table-cell table:style-name="ce6" office:value-type="string">
            <text:p>Extraído del texto KIID y del sufijo de clase en el nombre del fondo.</text:p>
          </table:table-cell>
          <table:table-cell table:style-name="ce6" office:value-type="string">
            <text:p>Evaluar el riesgo divisa real del fondo para la construcción de carteras en P3.</text:p>
          </table:table-cell>
          <table:table-cell table:style-name="ce6" office:value-type="string">
            <text:p>Hedged, Unhedged, Partially Hedged</text:p>
          </table:table-cell>
          <table:table-cell table:number-columns-repeated="3" table:style-name="ce6" office:value-type="string">
            <text:p>Sí</text:p>
          </table:table-cell>
          <table:table-cell table:style-name="ce6" office:value-type="string">
            <text:p>Totalmente Cubierto, Parcialmente Cubierto, No Cubierto. Ampliar desde binario a tres valores para capturar cobertura parcial.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Currency_Hedged</text:p>
          </table:table-cell>
          <table:table-cell table:style-name="ce5" office:value-type="string">
            <text:p>Estructura del Producto</text:p>
          </table:table-cell>
          <table:table-cell table:style-name="ce5" office:value-type="string">
            <text:p>¿Indica el nombre del fondo que tiene cobertura de divisa?</text:p>
          </table:table-cell>
          <table:table-cell table:style-name="ce5" office:value-type="string">
            <text:p>Detección del sufijo 'H', 'Hdg', '(EUR Hedged)' en el nombre de la clase.</text:p>
          </table:table-cell>
          <table:table-cell table:style-name="ce5" office:value-type="string">
            <text:p>Señal rápida de cobertura extraída del nombre cuando Hedging_Policy no está disponible.</text:p>
          </table:table-cell>
          <table:table-cell table:style-name="ce5" office:value-type="string">
            <text:p>Yes, No</text:p>
          </table:table-cell>
          <table:table-cell table:style-name="ce5" office:value-type="string">
            <text:p>Sí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Sí</text:p>
          </table:table-cell>
          <table:table-cell table:style-name="ce5" office:value-type="string">
            <text:p>Mantener a corto plazo como señal complementaria de Hedging_Policy. Deprecar cuando Hedging_Policy alcance cobertura suficiente.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Replication_Method</text:p>
          </table:table-cell>
          <table:table-cell table:style-name="ce6" office:value-type="string">
            <text:p>Estructura del Producto</text:p>
          </table:table-cell>
          <table:table-cell table:style-name="ce6" office:value-type="string">
            <text:p>¿Cómo replica el fondo su índice o cartera objetivo?</text:p>
          </table:table-cell>
          <table:table-cell table:style-name="ce6" office:value-type="string">
            <text:p>Extraído del texto KIID: réplica física, sintética o muestreo.</text:p>
          </table:table-cell>
          <table:table-cell table:style-name="ce6" office:value-type="string">
            <text:p>Evaluar riesgo de contraparte y diferencias de tracking en fondos pasivos.</text:p>
          </table:table-cell>
          <table:table-cell table:style-name="ce6" office:value-type="string">
            <text:p>Physical, Synthetic, Sampling</text:p>
          </table:table-cell>
          <table:table-cell table:style-name="ce6" office:value-type="string">
            <text:p>Sí</text:p>
          </table:table-cell>
          <table:table-cell table:number-columns-repeated="2" table:style-name="ce6" office:value-type="string">
            <text:p>No</text:p>
          </table:table-cell>
          <table:table-cell table:style-name="ce6" office:value-type="string">
            <text:p>—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Derivatives_Usage</text:p>
          </table:table-cell>
          <table:table-cell table:style-name="ce5" office:value-type="string">
            <text:p>Estructura del Producto</text:p>
          </table:table-cell>
          <table:table-cell table:style-name="ce5" office:value-type="string">
            <text:p>¿Utiliza el fondo instrumentos derivados?</text:p>
          </table:table-cell>
          <table:table-cell table:style-name="ce5" office:value-type="string">
            <text:p>Extraído del texto KIID mediante patrones de uso de derivados (cobertura, inversión, ambos).</text:p>
          </table:table-cell>
          <table:table-cell table:style-name="ce5" office:value-type="string">
            <text:p>Evaluar riesgo adicional por uso de derivados y apalancamiento implícito.</text:p>
          </table:table-cell>
          <table:table-cell table:style-name="ce5" office:value-type="string">
            <text:p>Yes, No, Hedging Only, Limited</text:p>
          </table:table-cell>
          <table:table-cell table:number-columns-repeated="2" table:style-name="ce5" office:value-type="string">
            <text:p>Sí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Hedging Only, Investment, Both, No Usage. Cuatro valores más precisos que Yes/No.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Leverage_Used</text:p>
          </table:table-cell>
          <table:table-cell table:style-name="ce6" office:value-type="string">
            <text:p>Estructura del Producto</text:p>
          </table:table-cell>
          <table:table-cell table:style-name="ce6" office:value-type="string">
            <text:p>¿Utiliza el fondo apalancamiento explícito?</text:p>
          </table:table-cell>
          <table:table-cell table:style-name="ce6" office:value-type="string">
            <text:p>Extraído del texto KIID mediante patrones de lenguaje de derivados y apalancamiento.</text:p>
          </table:table-cell>
          <table:table-cell table:style-name="ce6" office:value-type="string">
            <text:p>Flag de riesgo estructural elevado para exclusión o penalización en carteras defensivas de P3.</text:p>
          </table:table-cell>
          <table:table-cell table:style-name="ce6" office:value-type="string">
            <text:p>Yes, No</text:p>
          </table:table-cell>
          <table:table-cell table:style-name="ce6" office:value-type="string">
            <text:p>Sí</text:p>
          </table:table-cell>
          <table:table-cell table:number-columns-repeated="2" table:style-name="ce6" office:value-type="string">
            <text:p>No</text:p>
          </table:table-cell>
          <table:table-cell table:style-name="ce6" office:value-type="string">
            <text:p>—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Liquidity_Profile</text:p>
          </table:table-cell>
          <table:table-cell table:style-name="ce5" office:value-type="string">
            <text:p>Estructura del Producto</text:p>
          </table:table-cell>
          <table:table-cell table:style-name="ce5" office:value-type="string">
            <text:p>¿Con qué frecuencia puede el inversor suscribir o reembolsar participaciones?</text:p>
          </table:table-cell>
          <table:table-cell table:style-name="ce5" office:value-type="string">
            <text:p>Extraído del texto KIID sobre frecuencia de valoración y reembolso.</text:p>
          </table:table-cell>
          <table:table-cell table:style-name="ce5" office:value-type="string">
            <text:p>Filtro de adecuación operativa del fondo al horizonte y necesidades de liquidez del inversor.</text:p>
          </table:table-cell>
          <table:table-cell table:style-name="ce5" office:value-type="string">
            <text:p>Daily, Weekly, Monthly, Quarterly</text:p>
          </table:table-cell>
          <table:table-cell table:number-columns-repeated="2" table:style-name="ce5" office:value-type="string">
            <text:p>Sí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iaria, Semanal, Quincenal, Mensual, Trimestral. Valores en español para consistencia con resto del modelo.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Accumulation_Policy</text:p>
          </table:table-cell>
          <table:table-cell table:style-name="ce6" office:value-type="string">
            <text:p>Estructura del Producto</text:p>
          </table:table-cell>
          <table:table-cell table:style-name="ce6" office:value-type="string">
            <text:p>¿Acumula o distribuye rentas el fondo?</text:p>
          </table:table-cell>
          <table:table-cell table:style-name="ce6" office:value-type="string">
            <text:p>Detectado desde sufijos de clase en el nombre (Acc/Dist/Inc/Cap/Rte) y texto KIID.</text:p>
          </table:table-cell>
          <table:table-cell table:style-name="ce6" office:value-type="string">
            <text:p>Diferenciar clases acumulativas de distributivas para comparabilidad de retornos en P2.</text:p>
          </table:table-cell>
          <table:table-cell table:style-name="ce6" office:value-type="string">
            <text:p>Accumulation, Distribution</text:p>
          </table:table-cell>
          <table:table-cell table:number-columns-repeated="2" table:style-name="ce6" office:value-type="string">
            <text:p>Sí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Acumulación, Distribución. Estandarizar a español para consistencia.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Distribution_Frequency</text:p>
          </table:table-cell>
          <table:table-cell table:style-name="ce5" office:value-type="string">
            <text:p>Estructura del Producto</text:p>
          </table:table-cell>
          <table:table-cell table:style-name="ce5" office:value-type="string">
            <text:p>¿Con qué periodicidad distribuye rentas el fondo?</text:p>
          </table:table-cell>
          <table:table-cell table:style-name="ce5" office:value-type="string">
            <text:p>Extraído del texto KIID. Solo aplicable cuando Accumulation_Policy=Distribution.</text:p>
          </table:table-cell>
          <table:table-cell table:style-name="ce5" office:value-type="string">
            <text:p>Complementar Accumulation_Policy para análisis de rentas periódicas.</text:p>
          </table:table-cell>
          <table:table-cell table:style-name="ce5" office:value-type="string">
            <text:p>Monthly, Quarterly, Semi-Annual, Annual</text:p>
          </table:table-cell>
          <table:table-cell table:number-columns-repeated="2" table:style-name="ce5" office:value-type="string">
            <text:p>Sí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ensual, Trimestral, Semestral, Anual. Solo informar si Accumulation_Policy=Distribución.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Ongoing_Charge</text:p>
          </table:table-cell>
          <table:table-cell table:style-name="ce6" office:value-type="string">
            <text:p>Costes y Comisiones</text:p>
          </table:table-cell>
          <table:table-cell table:style-name="ce6" office:value-type="string">
            <text:p>¿Cuál es el coste total recurrente anual del fondo (TER)?</text:p>
          </table:table-cell>
          <table:table-cell table:style-name="ce6" office:value-type="string">
            <text:p>Extraído del texto KIID (sección 'Gastos corrientes'). Valor numérico decimal.</text:p>
          </table:table-cell>
          <table:table-cell table:style-name="ce6" office:value-type="string">
            <text:p>Indicador crítico de coste estructural — impacta directamente la rentabilidad neta a largo plazo. Filtro y penalización en scoring P3.</text:p>
          </table:table-cell>
          <table:table-cell table:style-name="ce6" office:value-type="string">
            <text:p>Numérico decimal [0.0006, 0.092] (26.2% NULL)</text:p>
          </table:table-cell>
          <table:table-cell table:style-name="ce6" office:value-type="string">
            <text:p>Sí</text:p>
          </table:table-cell>
          <table:table-cell table:number-columns-repeated="2" table:style-name="ce6" office:value-type="string">
            <text:p>No</text:p>
          </table:table-cell>
          <table:table-cell table:style-name="ce6" office:value-type="string">
            <text:p>—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Entry_Fee_Pct</text:p>
          </table:table-cell>
          <table:table-cell table:style-name="ce5" office:value-type="string">
            <text:p>Costes y Comisiones</text:p>
          </table:table-cell>
          <table:table-cell table:style-name="ce5" office:value-type="string">
            <text:p>¿Cuál es la comisión máxima de entrada?</text:p>
          </table:table-cell>
          <table:table-cell table:style-name="ce5" office:value-type="string">
            <text:p>Extraído del texto KIID (sección 'Gastos de entrada'). Valor numérico decimal.</text:p>
          </table:table-cell>
          <table:table-cell table:style-name="ce5" office:value-type="string">
            <text:p>Coste de rotación de cartera en P3. La comisión de entrada puede alcanzar el 6% y es material para el modelo de costes de transacción.</text:p>
          </table:table-cell>
          <table:table-cell table:style-name="ce5" office:value-type="string">
            <text:p>Numérico decimal [0.004, 0.06] (64.8% NULL — no distingue 'no encontrado' de 'sin comisión')</text:p>
          </table:table-cell>
          <table:table-cell table:number-columns-repeated="3" table:style-name="ce5" office:value-type="string">
            <text:p>Sí</text:p>
          </table:table-cell>
          <table:table-cell table:style-name="ce5" office:value-type="string">
            <text:p>Numérico decimal. Añadir lógica en parser para registrar 0.0 cuando el KIID declara explícitamente 'sin comisión de entrada', dejando NULL solo para 'no extraído'.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Exit_Fee_Pct</text:p>
          </table:table-cell>
          <table:table-cell table:style-name="ce6" office:value-type="string">
            <text:p>Costes y Comisiones</text:p>
          </table:table-cell>
          <table:table-cell table:style-name="ce6" office:value-type="string">
            <text:p>¿Cuál es la comisión máxima de salida?</text:p>
          </table:table-cell>
          <table:table-cell table:style-name="ce6" office:value-type="string">
            <text:p>Extraído del texto KIID (sección 'Gastos de salida'). Valor numérico decimal.</text:p>
          </table:table-cell>
          <table:table-cell table:style-name="ce6" office:value-type="string">
            <text:p>Coste de rotación de cartera en P3.</text:p>
          </table:table-cell>
          <table:table-cell table:style-name="ce6" office:value-type="string">
            <text:p>Numérico decimal [0.0, 0.05] (39.8% NULL)</text:p>
          </table:table-cell>
          <table:table-cell table:style-name="ce6" office:value-type="string">
            <text:p>Sí</text:p>
          </table:table-cell>
          <table:table-cell table:number-columns-repeated="2" table:style-name="ce6" office:value-type="string">
            <text:p>No</text:p>
          </table:table-cell>
          <table:table-cell table:style-name="ce6" office:value-type="string">
            <text:p>—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Sfdr_Article</text:p>
          </table:table-cell>
          <table:table-cell table:style-name="ce5" office:value-type="string">
            <text:p>Regulación y Sostenibilidad</text:p>
          </table:table-cell>
          <table:table-cell table:style-name="ce5" office:value-type="string">
            <text:p>¿Bajo qué artículo del Reglamento SFDR está clasificado el fondo?</text:p>
          </table:table-cell>
          <table:table-cell table:style-name="ce5" office:value-type="string">
            <text:p>Extraído del texto KIID y, cuando no disponible, imputado: fondos con Is_ESG=1→Art.8, resto→Art.6.</text:p>
          </table:table-cell>
          <table:table-cell table:style-name="ce5" office:value-type="string">
            <text:p>Clasificación regulatoria ESG para filtros de P3 y reporting de sostenibilidad.</text:p>
          </table:table-cell>
          <table:table-cell table:style-name="ce5" office:value-type="string">
            <text:p>6, 8, 9</text:p>
          </table:table-cell>
          <table:table-cell table:style-name="ce5" office:value-type="string">
            <text:p>Sí</text:p>
          </table:table-cell>
          <table:table-cell table:number-columns-repeated="2" table:style-name="ce5" office:value-type="string">
            <text:p>No</text:p>
          </table:table-cell>
          <table:table-cell table:style-name="ce5" office:value-type="string">
            <text:p>—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Is_ESG</text:p>
          </table:table-cell>
          <table:table-cell table:style-name="ce6" office:value-type="string">
            <text:p>Regulación y Sostenibilidad</text:p>
          </table:table-cell>
          <table:table-cell table:style-name="ce6" office:value-type="string">
            <text:p>¿Incorpora el fondo criterios ESG en su denominación o política de inversión declarada?</text:p>
          </table:table-cell>
          <table:table-cell table:style-name="ce6" office:value-type="string">
            <text:p>Detección de términos ESG/SRI/Sustainable/Responsible en el nombre del fondo.</text:p>
          </table:table-cell>
          <table:table-cell table:style-name="ce6" office:value-type="string">
            <text:p>Señal rápida de orientación ESG complementaria al Sfdr_Article. Captura fondos con naming ESG independientemente de su artículo SFDR.</text:p>
          </table:table-cell>
          <table:table-cell table:style-name="ce6" office:value-type="string">
            <text:p>0, 1 (booleano entero)</text:p>
          </table:table-cell>
          <table:table-cell table:number-columns-repeated="2" table:style-name="ce6" office:value-type="string">
            <text:p>Sí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0 / 1. Mantener como señal complementaria de Sfdr_Article, no como sustituto. Un fondo puede ser Art.8 sin naming ESG y viceversa.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Benchmark_Declared</text:p>
          </table:table-cell>
          <table:table-cell table:style-name="ce5" office:value-type="string">
            <text:p>Regulación y Sostenibilidad</text:p>
          </table:table-cell>
          <table:table-cell table:style-name="ce5" office:value-type="string">
            <text:p>¿Qué benchmark declara el fondo en su KIID?</text:p>
          </table:table-cell>
          <table:table-cell table:style-name="ce5" office:value-type="string">
            <text:p>Extraído del texto KIID y normalizado por benchmark_normalizer (~97% cobertura de variantes).</text:p>
          </table:table-cell>
          <table:table-cell table:style-name="ce5" office:value-type="string">
            <text:p>Fuente de datos para cálculo de alpha, tracking error y clasificación de Geography en P2.</text:p>
          </table:table-cell>
          <table:table-cell table:style-name="ce5" office:value-type="string">
            <text:p>Texto libre normalizado (MSCI World, Bloomberg Euro Agg, EURIBOR 3M...)</text:p>
          </table:table-cell>
          <table:table-cell table:style-name="ce5" office:value-type="string">
            <text:p>Sí</text:p>
          </table:table-cell>
          <table:table-cell table:number-columns-repeated="2" table:style-name="ce5" office:value-type="string">
            <text:p>No</text:p>
          </table:table-cell>
          <table:table-cell table:style-name="ce5" office:value-type="string">
            <text:p>—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Benchmark_Type</text:p>
          </table:table-cell>
          <table:table-cell table:style-name="ce6" office:value-type="string">
            <text:p>Regulación y Sostenibilidad</text:p>
          </table:table-cell>
          <table:table-cell table:style-name="ce6" office:value-type="string">
            <text:p>¿Cuál es el rol del benchmark declarado para el fondo?</text:p>
          </table:table-cell>
          <table:table-cell table:style-name="ce6" office:value-type="string">
            <text:p>Derivado del Benchmark_Declared y Replication_Method.</text:p>
          </table:table-cell>
          <table:table-cell table:style-name="ce6" office:value-type="string">
            <text:p>Determinar si el benchmark es una referencia de gestión activa, un objetivo de replicación o una tasa mínima.</text:p>
          </table:table-cell>
          <table:table-cell table:style-name="ce6" office:value-type="string">
            <text:p>Reference, Target, Absolute, None</text:p>
          </table:table-cell>
          <table:table-cell table:number-columns-repeated="2" table:style-name="ce6" office:value-type="string">
            <text:p>Sí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Reference (gestión activa), Target (réplica), Hurdle Rate (retorno absoluto), None.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Heuristic_Block</text:p>
          </table:table-cell>
          <table:table-cell table:style-name="ce5" office:value-type="string">
            <text:p>Control y Trazabilidad</text:p>
          </table:table-cell>
          <table:table-cell table:style-name="ce5" office:value-type="string">
            <text:p>¿Qué bloque del pipeline clasificó este fondo?</text:p>
          </table:table-cell>
          <table:table-cell table:style-name="ce5" office:value-type="string">
            <text:p>Asignado por el pipeline en el momento de clasificación.</text:p>
          </table:table-cell>
          <table:table-cell table:style-name="ce5" office:value-type="string">
            <text:p>Trazabilidad completa de la clasificación para auditoría, debugging y análisis de distribución por bloque.</text:p>
          </table:table-cell>
          <table:table-cell table:style-name="ce5" office:value-type="string">
            <text:p>monetarios, rf_corto, rf_flexible, renta_variable, mixtos, alternativos, restantes</text:p>
          </table:table-cell>
          <table:table-cell table:style-name="ce5" office:value-type="string">
            <text:p>Sí</text:p>
          </table:table-cell>
          <table:table-cell table:number-columns-repeated="2" table:style-name="ce5" office:value-type="string">
            <text:p>No</text:p>
          </table:table-cell>
          <table:table-cell table:style-name="ce5" office:value-type="string">
            <text:p>—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Heuristic_Core</text:p>
          </table:table-cell>
          <table:table-cell table:style-name="ce6" office:value-type="string">
            <text:p>Control y Trazabilidad</text:p>
          </table:table-cell>
          <table:table-cell table:style-name="ce6" office:value-type="string">
            <text:p>¿Fue clasificado el fondo por señales core del bloque o por señales de cobertura ampliada?</text:p>
          </table:table-cell>
          <table:table-cell table:style-name="ce6" office:value-type="string">
            <text:p>Flag binario asignado por el bloque: 1=señales core, 0=señales de cobertura.</text:p>
          </table:table-cell>
          <table:table-cell table:style-name="ce6" office:value-type="string">
            <text:p>Indicador de confianza de la clasificación — fondos con Heuristic_Core=0 son candidatos prioritarios a revisión.</text:p>
          </table:table-cell>
          <table:table-cell table:style-name="ce6" office:value-type="string">
            <text:p>0, 1</text:p>
          </table:table-cell>
          <table:table-cell table:style-name="ce6" office:value-type="string">
            <text:p>Sí</text:p>
          </table:table-cell>
          <table:table-cell table:number-columns-repeated="2" table:style-name="ce6" office:value-type="string">
            <text:p>No</text:p>
          </table:table-cell>
          <table:table-cell table:style-name="ce6" office:value-type="string">
            <text:p>—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SRRI_Quality_Flag</text:p>
          </table:table-cell>
          <table:table-cell table:style-name="ce5" office:value-type="string">
            <text:p>Control y Trazabilidad</text:p>
          </table:table-cell>
          <table:table-cell table:style-name="ce5" office:value-type="string">
            <text:p>¿Cuál es la calidad del SRRI extraído?</text:p>
          </table:table-cell>
          <table:table-cell table:style-name="ce5" office:value-type="string">
            <text:p>Determinado por la lógica de validación cruzada visual/textual de srri_text.py.</text:p>
          </table:table-cell>
          <table:table-cell table:style-name="ce5" office:value-type="string">
            <text:p>Indicador de fiabilidad del SRRI para priorizar revisiones manuales y ponderar el dato en P3.</text:p>
          </table:table-cell>
          <table:table-cell table:style-name="ce5" office:value-type="string">
            <text:p>HIGH (MATCH), MEDIUM_VISUAL (solo visual), MEDIUM_TEXT (solo textual), LOW (CONFLICT), NONE</text:p>
          </table:table-cell>
          <table:table-cell table:style-name="ce5" office:value-type="string">
            <text:p>Sí</text:p>
          </table:table-cell>
          <table:table-cell table:number-columns-repeated="2" table:style-name="ce5" office:value-type="string">
            <text:p>No</text:p>
          </table:table-cell>
          <table:table-cell table:style-name="ce5" office:value-type="string">
            <text:p>—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Data_Quality_Flag</text:p>
          </table:table-cell>
          <table:table-cell table:style-name="ce6" office:value-type="string">
            <text:p>Control y Trazabilidad</text:p>
          </table:table-cell>
          <table:table-cell table:style-name="ce6" office:value-type="string">
            <text:p>¿Cuál es la calidad general del dato del fondo?</text:p>
          </table:table-cell>
          <table:table-cell table:style-name="ce6" office:value-type="string">
            <text:p>Asignado por el pipeline en función de gaps críticos en atributos obligatorios.</text:p>
          </table:table-cell>
          <table:table-cell table:style-name="ce6" office:value-type="string">
            <text:p>Filtro de calidad mínima en P3 y priorización de fondos para re-ingesta.</text:p>
          </table:table-cell>
          <table:table-cell table:style-name="ce6" office:value-type="string">
            <text:p>OK, WARN, ERROR</text:p>
          </table:table-cell>
          <table:table-cell table:style-name="ce6" office:value-type="string">
            <text:p>Sí</text:p>
          </table:table-cell>
          <table:table-cell table:number-columns-repeated="2" table:style-name="ce6" office:value-type="string">
            <text:p>No</text:p>
          </table:table-cell>
          <table:table-cell table:style-name="ce6" office:value-type="string">
            <text:p>—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Inference_Trace</text:p>
          </table:table-cell>
          <table:table-cell table:style-name="ce5" office:value-type="string">
            <text:p>Control y Trazabilidad</text:p>
          </table:table-cell>
          <table:table-cell table:style-name="ce5" office:value-type="string">
            <text:p>¿Qué señales concretas determinaron la clasificación del fondo?</text:p>
          </table:table-cell>
          <table:table-cell table:style-name="ce5" office:value-type="string">
            <text:p>Texto serializado por el pipeline con las señales activas que produjeron la clasificación.</text:p>
          </table:table-cell>
          <table:table-cell table:style-name="ce5" office:value-type="string">
            <text:p>Trazabilidad detallada para debugging y análisis de heurísticas.</text:p>
          </table:table-cell>
          <table:table-cell table:style-name="ce5" office:value-type="string">
            <text:p>Texto libre serializado</text:p>
          </table:table-cell>
          <table:table-cell table:style-name="ce5" office:value-type="string">
            <text:p>Sí</text:p>
          </table:table-cell>
          <table:table-cell table:number-columns-repeated="2" table:style-name="ce5" office:value-type="string">
            <text:p>No</text:p>
          </table:table-cell>
          <table:table-cell table:style-name="ce5" office:value-type="string">
            <text:p>—</text:p>
          </table:table-cell>
          <table:table-cell table:number-columns-repeated="1014"/>
        </table:table-row>
        <table:table-row table:style-name="ro4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ñadir" table:style-name="ta1">
        <table:table-column table:style-name="co3" table:number-columns-repeated="6" table:default-cell-style-name="Cell"/>
        <table:table-row table:style-name="ro5">
          <table:table-cell table:style-name="Header" office:value-type="string">
            <text:p>Nombre</text:p>
          </table:table-cell>
          <table:table-cell table:style-name="Header" office:value-type="string">
            <text:p>Grupo</text:p>
          </table:table-cell>
          <table:table-cell table:style-name="Header" office:value-type="string">
            <text:p>Pregunta</text:p>
          </table:table-cell>
          <table:table-cell table:style-name="Header" office:value-type="string">
            <text:p>Criterio</text:p>
          </table:table-cell>
          <table:table-cell table:style-name="Header" office:value-type="string">
            <text:p>Objeto</text:p>
          </table:table-cell>
          <table:table-cell table:style-name="Header" office:value-type="string">
            <text:p>Población</text:p>
          </table:table-cell>
        </table:table-row>
        <table:table-row table:style-name="ro5">
          <table:table-cell office:value-type="string">
            <text:p>Investment_Focus</text:p>
          </table:table-cell>
          <table:table-cell office:value-type="string">
            <text:p>Exposición</text:p>
          </table:table-cell>
          <table:table-cell office:value-type="string">
            <text:p>¿Invierte el fondo en mercado amplio, en un sector específico o en una temática transversal?</text:p>
          </table:table-cell>
          <table:table-cell office:value-type="string">
            <text:p>Derivado del Theme ya calculado: Theme en _SECTOR_THEMES→Sector; Theme en _CROSS_THEMATIC→Thematic; Theme='Core/General'→Broad; Liquidity_Nature→NULL.</text:p>
          </table:table-cell>
          <table:table-cell office:value-type="string">
            <text:p>Segunda dimensión de exposición, ortogonal a Investment_Universe. Permite cruzar ámbito geográfico (IU) con tipo de exposición (IF) sin colapsar ambas en un solo campo. Esencial para P3: un fondo Global+Sector y uno Global+Broad son productos muy distintos.</text:p>
          </table:table-cell>
          <table:table-cell office:value-type="string">
            <text:p>Broad, Sector, Thematic</text:p>
          </table:table-cell>
        </table:table-row>
        <table:table-row table:style-name="ro5">
          <table:table-cell table:style-name="CellAlt" office:value-type="string">
            <text:p>Credit_Quality</text:p>
          </table:table-cell>
          <table:table-cell table:style-name="CellAlt" office:value-type="string">
            <text:p>Exposición</text:p>
          </table:table-cell>
          <table:table-cell table:style-name="CellAlt" office:value-type="string">
            <text:p>¿Qué calidad crediticia tiene la cartera del fondo (para fondos de renta fija)?</text:p>
          </table:table-cell>
          <table:table-cell table:style-name="CellAlt" office:value-type="string">
            <text:p>Extraído del texto objetivo del KIID mediante patrones de calificación (Investment Grade, High Yield, Grado de Inversión).</text:p>
          </table:table-cell>
          <table:table-cell table:style-name="CellAlt" office:value-type="string">
            <text:p>Filtro de riesgo crediticio en P3 para carteras conservadoras. Diferencia fondos RF de crédito solvente de los de alto rendimiento.</text:p>
          </table:table-cell>
          <table:table-cell table:style-name="CellAlt" office:value-type="string">
            <text:p>Investment Grade, High Yield, Mixed, No aplica</text:p>
          </table:table-cell>
        </table:table-row>
        <table:table-row table:style-name="ro5">
          <table:table-cell office:value-type="string">
            <text:p>Fee_Known_Flag</text:p>
          </table:table-cell>
          <table:table-cell office:value-type="string">
            <text:p>Costes y Comisiones</text:p>
          </table:table-cell>
          <table:table-cell office:value-type="string">
            <text:p>¿Se ha podido extraer la comisión de entrada del KIID?</text:p>
          </table:table-cell>
          <table:table-cell office:value-type="string">
            <text:p>Flag derivado del parser: EXTRACTED cuando se encontró valor numérico, ZERO_CONFIRMED cuando el KIID declara explícitamente sin comisión, NOT_FOUND cuando el parser no localizó la sección.</text:p>
          </table:table-cell>
          <table:table-cell office:value-type="string">
            <text:p>Distingue 'no cobra comisión de entrada (0%)' de 'no sabemos si cobra'. Crítico para el modelo de costes de rotación en P3 donde la comisión de entrada puede ser hasta 6%.</text:p>
          </table:table-cell>
          <table:table-cell office:value-type="string">
            <text:p>EXTRACTED, ZERO_CONFIRMED, NOT_FOUND</text:p>
          </table:table-cell>
        </table:table-row>
      </table:table>
      <table:table table:name="DiccionarioDeValores" table:style-name="ta1">
        <table:table-column table:style-name="co3" table:number-columns-repeated="2" table:default-cell-style-name="Cell"/>
        <table:table-row table:style-name="ro5">
          <table:table-cell table:style-name="Header" office:value-type="string">
            <text:p>Atributo</text:p>
          </table:table-cell>
          <table:table-cell table:style-name="Header" office:value-type="string">
            <text:p>Valor</text:p>
          </table:table-cell>
        </table:table-row>
        <table:table-row table:style-name="ro5">
          <table:table-cell office:value-type="string">
            <text:p>Fund_Nature</text:p>
          </table:table-cell>
          <table:table-cell office:value-type="string">
            <text:p>Renta Variable, Mixtos, Renta Fija Flexible, Renta Fija Corto Plazo, Monetario, Alternativo, Restantes, Estructurado</text:p>
          </table:table-cell>
        </table:table-row>
        <table:table-row table:style-name="ro5">
          <table:table-cell table:style-name="CellAlt" office:value-type="string">
            <text:p>Profile</text:p>
          </table:table-cell>
          <table:table-cell table:style-name="CellAlt" office:value-type="string">
            <text:p>Conservador, Moderado, Dinámico, Agresivo</text:p>
          </table:table-cell>
        </table:table-row>
        <table:table-row table:style-name="ro5">
          <table:table-cell office:value-type="string">
            <text:p>Investment_Universe</text:p>
          </table:table-cell>
          <table:table-cell office:value-type="string">
            <text:p>Global, Regional, Country, Liquidity</text:p>
          </table:table-cell>
        </table:table-row>
        <table:table-row table:style-name="ro5">
          <table:table-cell table:style-name="CellAlt" office:value-type="string">
            <text:p>Investment_Focus</text:p>
          </table:table-cell>
          <table:table-cell table:style-name="CellAlt" office:value-type="string">
            <text:p>Broad, Sector, Thematic</text:p>
          </table:table-cell>
        </table:table-row>
        <table:table-row table:style-name="ro5">
          <table:table-cell office:value-type="string">
            <text:p>Theme</text:p>
          </table:table-cell>
          <table:table-cell office:value-type="string">
            <text:p>Core/General, Technology, Artificial Intelligence, Digital, Robotics, Cybersecurity, Climate / Clean Energy, Energy, Healthcare / MedTech, Healthcare, Biotechnology, Water, Gold, Mining, Infrastructure, Real Estate, Financials, Consumer Brands, Consumer / Food &amp; Beverage, Silver Economy, Megatrends, Insurance, Inflación</text:p>
          </table:table-cell>
        </table:table-row>
        <table:table-row table:style-name="ro5">
          <table:table-cell table:style-name="CellAlt" office:value-type="string">
            <text:p>Geography</text:p>
          </table:table-cell>
          <table:table-cell table:style-name="CellAlt" office:value-type="string">
            <text:p>Global, Europa, EEUU, Asia-Pacífico, Emergentes, China, Japón, India, Latinoamérica, Europa del Este</text:p>
          </table:table-cell>
        </table:table-row>
        <table:table-row table:style-name="ro5">
          <table:table-cell office:value-type="string">
            <text:p>Sector_Focus</text:p>
          </table:table-cell>
          <table:table-cell office:value-type="string">
            <text:p>Tecnología e Innovación, Salud y Ciencias de la Vida, Energía y Recursos, Real Assets, Servicios Financieros, Consumo, Materiales y Minería, Utilities y Medio Ambiente</text:p>
          </table:table-cell>
        </table:table-row>
        <table:table-row table:style-name="ro5">
          <table:table-cell table:style-name="CellAlt" office:value-type="string">
            <text:p>Market_Cap_Focus</text:p>
          </table:table-cell>
          <table:table-cell table:style-name="CellAlt" office:value-type="string">
            <text:p>Large Cap, Mid Cap, Small Cap, SMID Cap, Multi Cap</text:p>
          </table:table-cell>
        </table:table-row>
        <table:table-row table:style-name="ro5">
          <table:table-cell office:value-type="string">
            <text:p>Style_Profile</text:p>
          </table:table-cell>
          <table:table-cell office:value-type="string">
            <text:p>Value, Growth, Blend, Income, Yield</text:p>
          </table:table-cell>
        </table:table-row>
        <table:table-row table:style-name="ro5">
          <table:table-cell table:style-name="CellAlt" office:value-type="string">
            <text:p>Exposure_Bias</text:p>
          </table:table-cell>
          <table:table-cell table:style-name="CellAlt" office:value-type="string">
            <text:p>Long Only, Long/Short, Market Neutral, Directional, Credit Bias, Macro, Commodity</text:p>
          </table:table-cell>
        </table:table-row>
        <table:table-row table:style-name="ro5">
          <table:table-cell office:value-type="string">
            <text:p>Strategy</text:p>
          </table:table-cell>
          <table:table-cell office:value-type="string">
            <text:p>Active, Passive, Index, Quant/Systematic</text:p>
          </table:table-cell>
        </table:table-row>
        <table:table-row table:style-name="ro5">
          <table:table-cell table:style-name="CellAlt" office:value-type="string">
            <text:p>Type</text:p>
          </table:table-cell>
          <table:table-cell table:style-name="CellAlt" office:value-type="string">
            <text:p>Equity, Fixed Income, Balanced, Absolute Return, Index, ETF, Fund of Funds, Commodity, Real Estate, Multi-Asset, Money Market</text:p>
          </table:table-cell>
        </table:table-row>
        <table:table-row table:style-name="ro5">
          <table:table-cell office:value-type="string">
            <text:p>SRRI</text:p>
          </table:table-cell>
          <table:table-cell office:value-type="string">
            <text:p>1, 2, 3, 4, 5, 6, 7</text:p>
          </table:table-cell>
        </table:table-row>
        <table:table-row table:style-name="ro5">
          <table:table-cell table:style-name="CellAlt" office:value-type="string">
            <text:p>Sfdr_Article</text:p>
          </table:table-cell>
          <table:table-cell table:style-name="CellAlt" office:value-type="string">
            <text:p>6, 8, 9</text:p>
          </table:table-cell>
        </table:table-row>
        <table:table-row table:style-name="ro5">
          <table:table-cell office:value-type="string">
            <text:p>Is_ESG</text:p>
          </table:table-cell>
          <table:table-cell office:value-type="string">
            <text:p>0, 1</text:p>
          </table:table-cell>
        </table:table-row>
        <table:table-row table:style-name="ro5">
          <table:table-cell table:style-name="CellAlt" office:value-type="string">
            <text:p>Fund_Currency</text:p>
          </table:table-cell>
          <table:table-cell table:style-name="CellAlt" office:value-type="string">
            <text:p>EUR, USD, GBP, CHF, JPY, CNH</text:p>
          </table:table-cell>
        </table:table-row>
        <table:table-row table:style-name="ro5">
          <table:table-cell office:value-type="string">
            <text:p>Hedging_Policy</text:p>
          </table:table-cell>
          <table:table-cell office:value-type="string">
            <text:p>Totalmente Cubierto, Parcialmente Cubierto, No Cubierto</text:p>
          </table:table-cell>
        </table:table-row>
        <table:table-row table:style-name="ro5">
          <table:table-cell table:style-name="CellAlt" office:value-type="string">
            <text:p>Currency_Hedged</text:p>
          </table:table-cell>
          <table:table-cell table:style-name="CellAlt" office:value-type="string">
            <text:p>Yes, No</text:p>
          </table:table-cell>
        </table:table-row>
        <table:table-row table:style-name="ro5">
          <table:table-cell office:value-type="string">
            <text:p>Replication_Method</text:p>
          </table:table-cell>
          <table:table-cell office:value-type="string">
            <text:p>Physical, Synthetic, Sampling</text:p>
          </table:table-cell>
        </table:table-row>
        <table:table-row table:style-name="ro5">
          <table:table-cell table:style-name="CellAlt" office:value-type="string">
            <text:p>Derivatives_Usage</text:p>
          </table:table-cell>
          <table:table-cell table:style-name="CellAlt" office:value-type="string">
            <text:p>Hedging Only, Investment, Both, No Usage</text:p>
          </table:table-cell>
        </table:table-row>
        <table:table-row table:style-name="ro5">
          <table:table-cell office:value-type="string">
            <text:p>Leverage_Used</text:p>
          </table:table-cell>
          <table:table-cell office:value-type="string">
            <text:p>Yes, No</text:p>
          </table:table-cell>
        </table:table-row>
        <table:table-row table:style-name="ro5">
          <table:table-cell table:style-name="CellAlt" office:value-type="string">
            <text:p>Accumulation_Policy</text:p>
          </table:table-cell>
          <table:table-cell table:style-name="CellAlt" office:value-type="string">
            <text:p>Acumulación, Distribución</text:p>
          </table:table-cell>
        </table:table-row>
        <table:table-row table:style-name="ro5">
          <table:table-cell office:value-type="string">
            <text:p>Distribution_Frequency</text:p>
          </table:table-cell>
          <table:table-cell office:value-type="string">
            <text:p>Mensual, Trimestral, Semestral, Anual</text:p>
          </table:table-cell>
        </table:table-row>
        <table:table-row table:style-name="ro5">
          <table:table-cell table:style-name="CellAlt" office:value-type="string">
            <text:p>Liquidity_Profile</text:p>
          </table:table-cell>
          <table:table-cell table:style-name="CellAlt" office:value-type="string">
            <text:p>Diaria, Semanal, Quincenal, Mensual, Trimestral</text:p>
          </table:table-cell>
        </table:table-row>
        <table:table-row table:style-name="ro5">
          <table:table-cell office:value-type="string">
            <text:p>Benchmark_Type</text:p>
          </table:table-cell>
          <table:table-cell office:value-type="string">
            <text:p>Reference, Target, Hurdle Rate, None</text:p>
          </table:table-cell>
        </table:table-row>
        <table:table-row table:style-name="ro5">
          <table:table-cell table:style-name="CellAlt" office:value-type="string">
            <text:p>Credit_Quality</text:p>
          </table:table-cell>
          <table:table-cell table:style-name="CellAlt" office:value-type="string">
            <text:p>Investment Grade, High Yield, Mixed, No aplica</text:p>
          </table:table-cell>
        </table:table-row>
        <table:table-row table:style-name="ro5">
          <table:table-cell office:value-type="string">
            <text:p>Fee_Known_Flag</text:p>
          </table:table-cell>
          <table:table-cell office:value-type="string">
            <text:p>EXTRACTED, ZERO_CONFIRMED, NOT_FOUND</text:p>
          </table:table-cell>
        </table:table-row>
        <table:table-row table:style-name="ro5">
          <table:table-cell table:style-name="CellAlt" office:value-type="string">
            <text:p>Heuristic_Block</text:p>
          </table:table-cell>
          <table:table-cell table:style-name="CellAlt" office:value-type="string">
            <text:p>monetarios, rf_corto, rf_flexible, renta_variable, mixtos, alternativos, restantes</text:p>
          </table:table-cell>
        </table:table-row>
        <table:table-row table:style-name="ro5">
          <table:table-cell office:value-type="string">
            <text:p>Heuristic_Core</text:p>
          </table:table-cell>
          <table:table-cell office:value-type="string">
            <text:p>0, 1</text:p>
          </table:table-cell>
        </table:table-row>
        <table:table-row table:style-name="ro5">
          <table:table-cell table:style-name="CellAlt" office:value-type="string">
            <text:p>SRRI_Quality_Flag</text:p>
          </table:table-cell>
          <table:table-cell table:style-name="CellAlt" office:value-type="string">
            <text:p>HIGH, MEDIUM_VISUAL, MEDIUM_TEXT, LOW, NONE</text:p>
          </table:table-cell>
        </table:table-row>
        <table:table-row table:style-name="ro5">
          <table:table-cell office:value-type="string">
            <text:p>Data_Quality_Flag</text:p>
          </table:table-cell>
          <table:table-cell office:value-type="string">
            <text:p>OK, WARN, ERROR</text:p>
          </table:table-cell>
        </table:table-row>
      </table:table>
      <table:table table:name="Comparativa" table:style-name="ta1">
        <table:table-column table:style-name="co3" table:number-columns-repeated="8" table:default-cell-style-name="Cell"/>
        <table:table-row table:style-name="ro5">
          <table:table-cell table:style-name="Header" office:value-type="string">
            <text:p>Atributo</text:p>
          </table:table-cell>
          <table:table-cell table:style-name="Header" office:value-type="string">
            <text:p>ObjetoGemini</text:p>
          </table:table-cell>
          <table:table-cell table:style-name="Header" office:value-type="string">
            <text:p>ObjetoChatGpt</text:p>
          </table:table-cell>
          <table:table-cell table:style-name="Header" office:value-type="string">
            <text:p>ObjetoClaude</text:p>
          </table:table-cell>
          <table:table-cell table:style-name="Header" office:value-type="string">
            <text:p>PobActual</text:p>
          </table:table-cell>
          <table:table-cell table:style-name="Header" office:value-type="string">
            <text:p>PobGemini</text:p>
          </table:table-cell>
          <table:table-cell table:style-name="Header" office:value-type="string">
            <text:p>PobChatGpt</text:p>
          </table:table-cell>
          <table:table-cell table:style-name="Header" office:value-type="string">
            <text:p>PobClaude</text:p>
          </table:table-cell>
        </table:table-row>
        <table:table-row table:style-name="ro5">
          <table:table-cell office:value-type="string">
            <text:p>Fund_Nature</text:p>
          </table:table-cell>
          <table:table-cell office:value-type="string">
            <text:p>Naturaleza económica del fondo.</text:p>
          </table:table-cell>
          <table:table-cell office:value-type="string">
            <text:p>Tipo de activo principal del fondo.</text:p>
          </table:table-cell>
          <table:table-cell office:value-type="string">
            <text:p>Naturaleza financiera principal — primer nivel de clasificación secuencial excluyente.</text:p>
          </table:table-cell>
          <table:table-cell office:value-type="string">
            <text:p>Renta Variable, Mixtos, Renta Fija Flexible, Renta Fija Corto Plazo, Monetario, Alternativo, Restantes, Estructurado</text:p>
          </table:table-cell>
          <table:table-cell office:value-type="string">
            <text:p>Renta Variable, Renta Fija, Mixto, Alternativo, Monetario</text:p>
          </table:table-cell>
          <table:table-cell office:value-type="string">
            <text:p>Monetario, Renta Fija Corto Plazo, Renta Fija Flexible, Renta Fija Largo Plazo, Renta Variable, Mixto, Alternativo</text:p>
          </table:table-cell>
          <table:table-cell office:value-type="string">
            <text:p>Renta Variable, Mixtos, Renta Fija Flexible, Renta Fija Corto Plazo, Monetario, Alternativo, Restantes, Estructurado</text:p>
          </table:table-cell>
        </table:table-row>
        <table:table-row table:style-name="ro5">
          <table:table-cell table:style-name="CellAlt" office:value-type="string">
            <text:p>Profile</text:p>
          </table:table-cell>
          <table:table-cell table:style-name="CellAlt" office:value-type="string">
            <text:p>Perfil de riesgo calculado paramétricamenmte desde SRRI y volatilidad.</text:p>
          </table:table-cell>
          <table:table-cell table:style-name="CellAlt" office:value-type="string">
            <text:p>Perfil de riesgo genérico derivado del SRRI.</text:p>
          </table:table-cell>
          <table:table-cell table:style-name="CellAlt" office:value-type="string">
            <text:p>Segmentación operativa del riesgo para filtros de P3 — derivado exclusivamente del SRRI.</text:p>
          </table:table-cell>
          <table:table-cell table:style-name="CellAlt" office:value-type="string">
            <text:p>Conservador, Moderado, Dinámico</text:p>
          </table:table-cell>
          <table:table-cell table:style-name="CellAlt" office:value-type="string">
            <text:p>Conservador, Moderado, Dinámico, Agresivo</text:p>
          </table:table-cell>
          <table:table-cell table:style-name="CellAlt" office:value-type="string">
            <text:p>Conservador, Moderado, Dinámico</text:p>
          </table:table-cell>
          <table:table-cell table:style-name="CellAlt" office:value-type="string">
            <text:p>Conservador, Moderado, Dinámico, Agresivo</text:p>
          </table:table-cell>
        </table:table-row>
        <table:table-row table:style-name="ro5">
          <table:table-cell office:value-type="string">
            <text:p>Investment_Universe</text:p>
          </table:table-cell>
          <table:table-cell office:value-type="string">
            <text:p>Universo de inversión geográfico: Global, Regional, Sector, Temático.</text:p>
          </table:table-cell>
          <table:table-cell office:value-type="string">
            <text:p>Tipo de universo de activos: Global Diversificado, RV Desarrollada, RV Emergente, RF Gobierno, RF Corporativa, High Yield, Mixto Global, Alternativos.</text:p>
          </table:table-cell>
          <table:table-cell office:value-type="string">
            <text:p>Ámbito geográfico del mandato — dimensión geográfica pura, desacoplada del tipo de exposición.</text:p>
          </table:table-cell>
          <table:table-cell office:value-type="string">
            <text:p>Global, Regional, Country, Sector, Thematic, Liquidity</text:p>
          </table:table-cell>
          <table:table-cell office:value-type="string">
            <text:p>Global, Regional, Sector, Temático</text:p>
          </table:table-cell>
          <table:table-cell office:value-type="string">
            <text:p>Global Diversificado, Renta Variable Desarrollada, Renta Variable Emergente, Renta Fija Gobierno, Renta Fija Corporativa, High Yield, Mixto Global, Alternativos</text:p>
          </table:table-cell>
          <table:table-cell office:value-type="string">
            <text:p>Global, Regional, Country, Liquidity</text:p>
          </table:table-cell>
        </table:table-row>
        <table:table-row table:style-name="ro5">
          <table:table-cell table:style-name="CellAlt" office:value-type="string">
            <text:p>Investment_Focus (NUEVO)</text:p>
          </table:table-cell>
          <table:table-cell table:number-columns-repeated="2" table:style-name="CellAlt" office:value-type="string">
            <text:p>No propuesto</text:p>
          </table:table-cell>
          <table:table-cell table:style-name="CellAlt" office:value-type="string">
            <text:p>Tipo de exposición: mercado amplio, sector específico o temática transversal — dimensión ortogonal a Investment_Universe.</text:p>
          </table:table-cell>
          <table:table-cell table:number-columns-repeated="3" table:style-name="CellAlt" office:value-type="string">
            <text:p>No existe</text:p>
          </table:table-cell>
          <table:table-cell table:style-name="CellAlt" office:value-type="string">
            <text:p>Broad, Sector, Thematic</text:p>
          </table:table-cell>
        </table:table-row>
        <table:table-row table:style-name="ro5">
          <table:table-cell office:value-type="string">
            <text:p>Theme</text:p>
          </table:table-cell>
          <table:table-cell office:value-type="string">
            <text:p>Temática de inversión. Fondos sin tema → 'Core/General'.</text:p>
          </table:table-cell>
          <table:table-cell office:value-type="string">
            <text:p>Temática de inversión. Lista restringida.</text:p>
          </table:table-cell>
          <table:table-cell office:value-type="string">
            <text:p>Temática de inversión granular. Fondos no temáticos → 'Core/General'. NULL reservado para 'no procesado'.</text:p>
          </table:table-cell>
          <table:table-cell office:value-type="string">
            <text:p>Technology, Artificial Intelligence, Digital, Robotics, Cybersecurity, Climate / Clean Energy, Energy, Healthcare / MedTech, Healthcare, Biotechnology, Water, Gold, Mining, Infrastructure, Real Estate, Financials, Consumer Brands, Consumer / Food &amp; Beverage, Silver Economy, Megatrends, Insurance, Inflación</text:p>
          </table:table-cell>
          <table:table-cell office:value-type="string">
            <text:p>Core/General, Tecnología, Salud, Ecología, Demografía, Infraestructuras, Inmobiliario, Megatendencias</text:p>
          </table:table-cell>
          <table:table-cell office:value-type="string">
            <text:p>Tecnología, Salud, Energía, ESG, Infraestructura, Consumo, Fintech, Agua, Oro, Clima</text:p>
          </table:table-cell>
          <table:table-cell office:value-type="string">
            <text:p>Core/General, Technology, Artificial Intelligence, Digital, Robotics, Cybersecurity, Climate / Clean Energy, Energy, Healthcare / MedTech, Healthcare, Biotechnology, Water, Gold, Mining, Infrastructure, Real Estate, Financials, Consumer Brands, Consumer / Food &amp; Beverage, Silver Economy, Megatrends, Insurance, Inflación</text:p>
          </table:table-cell>
        </table:table-row>
        <table:table-row table:style-name="ro5">
          <table:table-cell table:style-name="CellAlt" office:value-type="string">
            <text:p>Geography</text:p>
          </table:table-cell>
          <table:table-cell table:style-name="CellAlt" office:value-type="string">
            <text:p>Zona geográfica basada en la cartera real, no solo en el nombre.</text:p>
          </table:table-cell>
          <table:table-cell table:style-name="CellAlt" office:value-type="string">
            <text:p>Zona geográfica. Lista cerrada.</text:p>
          </table:table-cell>
          <table:table-cell table:style-name="CellAlt" office:value-type="string">
            <text:p>Zona geográfica principal — extraída de nombre y texto objetivo KIID. Completada desde Benchmark_Declared para NULL.</text:p>
          </table:table-cell>
          <table:table-cell table:style-name="CellAlt" office:value-type="string">
            <text:p>Global, Europa, EEUU, Asia, Emergentes, China, Japón, India, Latinoamérica, Europa del Este, Rusia</text:p>
          </table:table-cell>
          <table:table-cell table:style-name="CellAlt" office:value-type="string">
            <text:p>Global, Norteamérica, Europa, Mercados Emergentes, Asia-Pacífico, Latinoamérica, Japón</text:p>
          </table:table-cell>
          <table:table-cell table:style-name="CellAlt" office:value-type="string">
            <text:p>Global, Europa, USA, Norteamérica, Emergentes, Asia, Japón, Latinoamérica, África, Oriente Medio</text:p>
          </table:table-cell>
          <table:table-cell table:style-name="CellAlt" office:value-type="string">
            <text:p>Global, Europa, EEUU, Asia-Pacífico, Emergentes, China, Japón, India, Latinoamérica, Europa del Este</text:p>
          </table:table-cell>
        </table:table-row>
        <table:table-row table:style-name="ro5">
          <table:table-cell office:value-type="string">
            <text:p>Sector_Focus</text:p>
          </table:table-cell>
          <table:table-cell office:value-type="string">
            <text:p>Sector según GICS. Obligatorio si Investment_Universe='Sector'.</text:p>
          </table:table-cell>
          <table:table-cell office:value-type="string">
            <text:p>Sector de actividad económica.</text:p>
          </table:table-cell>
          <table:table-cell office:value-type="string">
            <text:p>Sector bajo nomenclatura GICS. Obligatorio si Investment_Focus='Sector'. Derivado del Theme.</text:p>
          </table:table-cell>
          <table:table-cell office:value-type="string">
            <text:p>Technology &amp; Innovation, Healthcare &amp; Life Sciences, Energy &amp; Resources, Real Assets, Financial Services, Consumer, Materials &amp; Mining, Utilities &amp; Environment</text:p>
          </table:table-cell>
          <table:table-cell office:value-type="string">
            <text:p>Tecnología, Salud, Energía, Finanzas, Consumo Discrecional, Consumo Básico, Materiales, Industria, Telecomunicaciones, Servicios Públicos, Inmobiliario</text:p>
          </table:table-cell>
          <table:table-cell office:value-type="string">
            <text:p>Tecnología, Financiero, Salud, Energía, Industrial, Consumo, Materiales, Utilities, Telecomunicaciones, Inmobiliario</text:p>
          </table:table-cell>
          <table:table-cell office:value-type="string">
            <text:p>Tecnología e Innovación, Salud y Ciencias de la Vida, Energía y Recursos, Real Assets, Servicios Financieros, Consumo, Materiales y Minería, Utilities y Medio Ambiente</text:p>
          </table:table-cell>
        </table:table-row>
        <table:table-row table:style-name="ro5">
          <table:table-cell table:style-name="CellAlt" office:value-type="string">
            <text:p>Market_Cap_Focus</text:p>
          </table:table-cell>
          <table:table-cell table:style-name="CellAlt" office:value-type="string">
            <text:p>Capitalización bursátil. Solo aplicable a RV.</text:p>
          </table:table-cell>
          <table:table-cell table:style-name="CellAlt" office:value-type="string">
            <text:p>Segmento de capitalización.</text:p>
          </table:table-cell>
          <table:table-cell table:style-name="CellAlt" office:value-type="string">
            <text:p>Capitalización bursátil. Solo informar para Fund_Nature=Renta Variable.</text:p>
          </table:table-cell>
          <table:table-cell table:style-name="CellAlt" office:value-type="string">
            <text:p>Large Cap, Mid Cap, Small Cap, SMID Cap</text:p>
          </table:table-cell>
          <table:table-cell table:style-name="CellAlt" office:value-type="string">
            <text:p>Large Cap, Mid Cap, Small Cap, Multi Cap</text:p>
          </table:table-cell>
          <table:table-cell table:style-name="CellAlt" office:value-type="string">
            <text:p>Large Cap, Mid Cap, Small Cap, All Cap</text:p>
          </table:table-cell>
          <table:table-cell table:style-name="CellAlt" office:value-type="string">
            <text:p>Large Cap, Mid Cap, Small Cap, SMID Cap, Multi Cap</text:p>
          </table:table-cell>
        </table:table-row>
        <table:table-row table:style-name="ro5">
          <table:table-cell office:value-type="string">
            <text:p>Style_Profile</text:p>
          </table:table-cell>
          <table:table-cell office:value-type="string">
            <text:p>Estilo de gestión. Obligatorio solo para RV. Valores: Value, Growth, Blend, Momentum, Yield.</text:p>
          </table:table-cell>
          <table:table-cell office:value-type="string">
            <text:p>Estilo de gestión (Strategic, Tactical, Active, Passive) — diferente taxonomía.</text:p>
          </table:table-cell>
          <table:table-cell office:value-type="string">
            <text:p>Estilo de inversión. Solo informar para Fund_Nature=Renta Variable.</text:p>
          </table:table-cell>
          <table:table-cell office:value-type="string">
            <text:p>Value, Growth, Blend, Income, Momentum, Yield</text:p>
          </table:table-cell>
          <table:table-cell office:value-type="string">
            <text:p>Value, Growth, Blend, Momentum, Yield</text:p>
          </table:table-cell>
          <table:table-cell office:value-type="string">
            <text:p>Strategic, Tactical, Active, Passive</text:p>
          </table:table-cell>
          <table:table-cell office:value-type="string">
            <text:p>Value, Growth, Blend, Income, Yield</text:p>
          </table:table-cell>
        </table:table-row>
        <table:table-row table:style-name="ro5">
          <table:table-cell table:style-name="CellAlt" office:value-type="string">
            <text:p>Exposure_Bias</text:p>
          </table:table-cell>
          <table:table-cell table:style-name="CellAlt" office:value-type="string">
            <text:p>Sesgo de exposición redefinido: Sesgo Calidad, Cíclico, Defensivo, Retorno Absoluto, Sin Sesgo.</text:p>
          </table:table-cell>
          <table:table-cell table:style-name="CellAlt" office:value-type="string">
            <text:p>Tipo de exposición de mercado: Long Only, Long/Short, Market Neutral, Directional, Credit Bias, Macro.</text:p>
          </table:table-cell>
          <table:table-cell table:style-name="CellAlt" office:value-type="string">
            <text:p>Sesgo estructural de la cartera para identificar fondos con mandatos asimétricos.</text:p>
          </table:table-cell>
          <table:table-cell table:style-name="CellAlt" office:value-type="string">
            <text:p>Long Only, Long/Short, Market Neutral, Directional, Credit Bias, Macro, Commodity</text:p>
          </table:table-cell>
          <table:table-cell table:style-name="CellAlt" office:value-type="string">
            <text:p>Sesgo Calidad, Sesgo Cíclico, Sesgo Defensivo, Sesgo Retorno Absoluto, Sin Sesgo</text:p>
          </table:table-cell>
          <table:table-cell table:style-name="CellAlt" office:value-type="string">
            <text:p>Long Only, Long/Short, Market Neutral, Directional, Credit Bias, Macro</text:p>
          </table:table-cell>
          <table:table-cell table:style-name="CellAlt" office:value-type="string">
            <text:p>Long Only, Long/Short, Market Neutral, Directional, Credit Bias, Macro, Commodity</text:p>
          </table:table-cell>
        </table:table-row>
        <table:table-row table:style-name="ro5">
          <table:table-cell office:value-type="string">
            <text:p>Hedging_Policy</text:p>
          </table:table-cell>
          <table:table-cell office:value-type="string">
            <text:p>Cobertura de divisa: Totalmente cubierto, Parcialmente cubierto, No cubierto.</text:p>
          </table:table-cell>
          <table:table-cell office:value-type="string">
            <text:p>Cobertura de divisa: Hedged, Unhedged.</text:p>
          </table:table-cell>
          <table:table-cell office:value-type="string">
            <text:p>Política de cobertura de divisa — tres valores para capturar cobertura parcial.</text:p>
          </table:table-cell>
          <table:table-cell office:value-type="string">
            <text:p>Hedged, Unhedged</text:p>
          </table:table-cell>
          <table:table-cell office:value-type="string">
            <text:p>Totalmente cubierto, Parcialmente cubierto, No cubierto</text:p>
          </table:table-cell>
          <table:table-cell office:value-type="string">
            <text:p>Hedged, Unhedged</text:p>
          </table:table-cell>
          <table:table-cell office:value-type="string">
            <text:p>Totalmente Cubierto, Parcialmente Cubierto, No Cubierto</text:p>
          </table:table-cell>
        </table:table-row>
        <table:table-row table:style-name="ro5">
          <table:table-cell table:style-name="CellAlt" office:value-type="string">
            <text:p>Derivatives_Usage</text:p>
          </table:table-cell>
          <table:table-cell table:style-name="CellAlt" office:value-type="string">
            <text:p>Uso de derivados: Hedging, Investment, Both, No Usage.</text:p>
          </table:table-cell>
          <table:table-cell table:style-name="CellAlt" office:value-type="string">
            <text:p>Uso de derivados: Yes, No, Limited.</text:p>
          </table:table-cell>
          <table:table-cell table:style-name="CellAlt" office:value-type="string">
            <text:p>Propósito del uso de derivados — distingue cobertura de inversión.</text:p>
          </table:table-cell>
          <table:table-cell table:style-name="CellAlt" office:value-type="string">
            <text:p>Yes, No, Hedging Only, Limited</text:p>
          </table:table-cell>
          <table:table-cell table:style-name="CellAlt" office:value-type="string">
            <text:p>Hedging, Investment, Both, No Usage</text:p>
          </table:table-cell>
          <table:table-cell table:style-name="CellAlt" office:value-type="string">
            <text:p>Yes, No, Limited</text:p>
          </table:table-cell>
          <table:table-cell table:style-name="CellAlt" office:value-type="string">
            <text:p>Hedging Only, Investment, Both, No Usage</text:p>
          </table:table-cell>
        </table:table-row>
        <table:table-row table:style-name="ro5">
          <table:table-cell office:value-type="string">
            <text:p>Benchmark_Type</text:p>
          </table:table-cell>
          <table:table-cell office:value-type="string">
            <text:p>Tipo de benchmark: Reference, Target, Hurdle Rate.</text:p>
          </table:table-cell>
          <table:table-cell office:value-type="string">
            <text:p>Tipo de benchmark: Reference, Target, None.</text:p>
          </table:table-cell>
          <table:table-cell office:value-type="string">
            <text:p>Rol del benchmark en la política de gestión.</text:p>
          </table:table-cell>
          <table:table-cell office:value-type="string">
            <text:p>Reference, Target, Absolute, None</text:p>
          </table:table-cell>
          <table:table-cell office:value-type="string">
            <text:p>Reference, Target, Hurdle Rate</text:p>
          </table:table-cell>
          <table:table-cell office:value-type="string">
            <text:p>Reference, Target, None</text:p>
          </table:table-cell>
          <table:table-cell office:value-type="string">
            <text:p>Reference, Target, Hurdle Rate, None</text:p>
          </table:table-cell>
        </table:table-row>
        <table:table-row table:style-name="ro5">
          <table:table-cell table:style-name="CellAlt" office:value-type="string">
            <text:p>Accumulation_Policy</text:p>
          </table:table-cell>
          <table:table-cell table:style-name="CellAlt" office:value-type="string">
            <text:p>Política de distribución: Acumulación, Distribución.</text:p>
          </table:table-cell>
          <table:table-cell table:style-name="CellAlt" office:value-type="string">
            <text:p>Política de distribución: Accumulation, Distribution.</text:p>
          </table:table-cell>
          <table:table-cell table:style-name="CellAlt" office:value-type="string">
            <text:p>Política de distribución de rentas — base para comparabilidad de retornos en P2.</text:p>
          </table:table-cell>
          <table:table-cell table:style-name="CellAlt" office:value-type="string">
            <text:p>Accumulation, Distribution</text:p>
          </table:table-cell>
          <table:table-cell table:style-name="CellAlt" office:value-type="string">
            <text:p>Acumulación, Distribución</text:p>
          </table:table-cell>
          <table:table-cell table:style-name="CellAlt" office:value-type="string">
            <text:p>Accumulation, Distribution</text:p>
          </table:table-cell>
          <table:table-cell table:style-name="CellAlt" office:value-type="string">
            <text:p>Acumulación, Distribución</text:p>
          </table:table-cell>
        </table:table-row>
        <table:table-row table:style-name="ro5">
          <table:table-cell office:value-type="string">
            <text:p>Liquidity_Profile</text:p>
          </table:table-cell>
          <table:table-cell office:value-type="string">
            <text:p>Frecuencia de reembolso: Diaria, Semanal, Quincenal, Mensual, Trimestral.</text:p>
          </table:table-cell>
          <table:table-cell office:value-type="string">
            <text:p>Perfil de liquidez: Alta, Media, Baja.</text:p>
          </table:table-cell>
          <table:table-cell office:value-type="string">
            <text:p>Frecuencia operativa de suscripción/reembolso — filtro de adecuación operativa en P3.</text:p>
          </table:table-cell>
          <table:table-cell office:value-type="string">
            <text:p>Daily, Weekly, Monthly, Quarterly</text:p>
          </table:table-cell>
          <table:table-cell office:value-type="string">
            <text:p>Diaria, Semanal, Quincenal, Mensual, Trimestral</text:p>
          </table:table-cell>
          <table:table-cell office:value-type="string">
            <text:p>Alta, Media, Baja</text:p>
          </table:table-cell>
          <table:table-cell office:value-type="string">
            <text:p>Diaria, Semanal, Quincenal, Mensual, Trimestral</text:p>
          </table:table-cell>
        </table:table-row>
        <table:table-row table:style-name="ro5">
          <table:table-cell table:style-name="CellAlt" office:value-type="string">
            <text:p>Replication_Method</text:p>
          </table:table-cell>
          <table:table-cell table:style-name="CellAlt" office:value-type="string">
            <text:p>Método de réplica: Physical, Synthetic, Sampling.</text:p>
          </table:table-cell>
          <table:table-cell table:style-name="CellAlt" office:value-type="string">
            <text:p>Método de réplica: Physical, Synthetic.</text:p>
          </table:table-cell>
          <table:table-cell table:style-name="CellAlt" office:value-type="string">
            <text:p>Método de construcción de la cartera — riesgo de contraparte en sintéticos.</text:p>
          </table:table-cell>
          <table:table-cell table:style-name="CellAlt" office:value-type="string">
            <text:p>Physical, Synthetic</text:p>
          </table:table-cell>
          <table:table-cell table:style-name="CellAlt" office:value-type="string">
            <text:p>Physical, Synthetic, Sampling</text:p>
          </table:table-cell>
          <table:table-cell table:style-name="CellAlt" office:value-type="string">
            <text:p>Physical, Synthetic</text:p>
          </table:table-cell>
          <table:table-cell table:style-name="CellAlt" office:value-type="string">
            <text:p>Physical, Synthetic, Sampling</text:p>
          </table:table-cell>
        </table:table-row>
        <table:table-row table:style-name="ro5">
          <table:table-cell office:value-type="string">
            <text:p>Is_ESG</text:p>
          </table:table-cell>
          <table:table-cell office:value-type="string">
            <text:p>Sustituir íntegramente por Sfdr_Article. Un Sí/No es insuficiente.</text:p>
          </table:table-cell>
          <table:table-cell office:value-type="string">
            <text:p>Indicador ESG booleano: Yes, No.</text:p>
          </table:table-cell>
          <table:table-cell office:value-type="string">
            <text:p>Señal de naming ESG complementaria a Sfdr_Article. Mantener: captura fondos con denominación ESG independientemente de su artículo SFDR.</text:p>
          </table:table-cell>
          <table:table-cell office:value-type="string">
            <text:p>0, 1</text:p>
          </table:table-cell>
          <table:table-cell office:value-type="string">
            <text:p>Eliminado (sustituir por Sfdr_Article)</text:p>
          </table:table-cell>
          <table:table-cell office:value-type="string">
            <text:p>Yes, No</text:p>
          </table:table-cell>
          <table:table-cell office:value-type="string">
            <text:p>0, 1</text:p>
          </table:table-cell>
        </table:table-row>
        <table:table-row table:style-name="ro5">
          <table:table-cell table:style-name="CellAlt" office:value-type="string">
            <text:p>Sfdr_Article</text:p>
          </table:table-cell>
          <table:table-cell table:style-name="CellAlt" office:value-type="string">
            <text:p>Clasificación SFDR: Artículo 6, Artículo 8, Artículo 9.</text:p>
          </table:table-cell>
          <table:table-cell table:style-name="CellAlt" office:value-type="string">
            <text:p>Clasificación SFDR: Article 6, Article 8, Article 9.</text:p>
          </table:table-cell>
          <table:table-cell table:style-name="CellAlt" office:value-type="string">
            <text:p>Marco regulatorio de sostenibilidad. Imputación automática: Is_ESG=1→Art.8, resto→Art.6.</text:p>
          </table:table-cell>
          <table:table-cell table:style-name="CellAlt" office:value-type="string">
            <text:p>6, 8, 9</text:p>
          </table:table-cell>
          <table:table-cell table:style-name="CellAlt" office:value-type="string">
            <text:p>Artículo 6, Artículo 8, Artículo 9</text:p>
          </table:table-cell>
          <table:table-cell table:style-name="CellAlt" office:value-type="string">
            <text:p>Article 6, Article 8, Article 9</text:p>
          </table:table-cell>
          <table:table-cell table:style-name="CellAlt" office:value-type="string">
            <text:p>6, 8, 9</text:p>
          </table:table-cell>
        </table:table-row>
        <table:table-row table:style-name="ro5">
          <table:table-cell office:value-type="string">
            <text:p>Leverage_Used</text:p>
          </table:table-cell>
          <table:table-cell office:value-type="string">
            <text:p>Apalancamiento: Yes/No insuficiente — propone % esperado.</text:p>
          </table:table-cell>
          <table:table-cell office:value-type="string">
            <text:p>Apalancamiento: Yes, No.</text:p>
          </table:table-cell>
          <table:table-cell office:value-type="string">
            <text:p>Flag de apalancamiento explícito. Booleano suficiente para P1 — el % cuantitativo pertenece a P2.</text:p>
          </table:table-cell>
          <table:table-cell office:value-type="string">
            <text:p>Yes, No</text:p>
          </table:table-cell>
          <table:table-cell office:value-type="string">
            <text:p>% apalancamiento (0%, 50%, 200%...)</text:p>
          </table:table-cell>
          <table:table-cell table:number-columns-repeated="2" office:value-type="string">
            <text:p>Yes, No</text:p>
          </table:table-cell>
        </table:table-row>
        <table:table-row table:style-name="ro5">
          <table:table-cell table:style-name="CellAlt" office:value-type="string">
            <text:p>Entry_Fee_Pct</text:p>
          </table:table-cell>
          <table:table-cell table:style-name="CellAlt" office:value-type="string">
            <text:p>Coste real aplicado, no solo máximo legal.</text:p>
          </table:table-cell>
          <table:table-cell table:style-name="CellAlt" office:value-type="string">
            <text:p>Sin modificación.</text:p>
          </table:table-cell>
          <table:table-cell table:style-name="CellAlt" office:value-type="string">
            <text:p>Máximo legal según KIID. Añadir Fee_Known_Flag para distinguir 'sin comisión (0%)' de 'no extraído (NULL)'.</text:p>
          </table:table-cell>
          <table:table-cell table:style-name="CellAlt" office:value-type="string">
            <text:p>Numérico decimal [0.004, 0.06] — 64.8% NULL</text:p>
          </table:table-cell>
          <table:table-cell table:style-name="CellAlt" office:value-type="string">
            <text:p>Coste real aplicado (numérico decimal)</text:p>
          </table:table-cell>
          <table:table-cell table:style-name="CellAlt" office:value-type="string">
            <text:p>Numérico decimal</text:p>
          </table:table-cell>
          <table:table-cell table:style-name="CellAlt" office:value-type="string">
            <text:p>Numérico decimal — 0.0 si KIID declara sin comisión, NULL si no extraído</text:p>
          </table:table-cell>
        </table:table-row>
        <table:table-row table:style-name="ro5">
          <table:table-cell office:value-type="string">
            <text:p>Credit_Quality (NUEVO)</text:p>
          </table:table-cell>
          <table:table-cell office:value-type="string">
            <text:p>No propuesto explícitamente</text:p>
          </table:table-cell>
          <table:table-cell office:value-type="string">
            <text:p>IG / HY / Mixed — propuesto como nuevo atributo.</text:p>
          </table:table-cell>
          <table:table-cell office:value-type="string">
            <text:p>Calidad crediticia de la cartera — extraíble del KIID para fondos RF. Filtro de riesgo crediticio en P3.</text:p>
          </table:table-cell>
          <table:table-cell table:number-columns-repeated="2" office:value-type="string">
            <text:p>No existe</text:p>
          </table:table-cell>
          <table:table-cell office:value-type="string">
            <text:p>Investment Grade, High Yield, Mixto</text:p>
          </table:table-cell>
          <table:table-cell office:value-type="string">
            <text:p>Investment Grade, High Yield, Mixed, No aplica</text:p>
          </table:table-cell>
        </table:table-row>
        <table:table-row table:style-name="ro5">
          <table:table-cell table:style-name="CellAlt" office:value-type="string">
            <text:p>Fee_Known_Flag (NUEVO)</text:p>
          </table:table-cell>
          <table:table-cell table:number-columns-repeated="2" table:style-name="CellAlt" office:value-type="string">
            <text:p>No propuesto</text:p>
          </table:table-cell>
          <table:table-cell table:style-name="CellAlt" office:value-type="string">
            <text:p>Flag que distingue coste de entrada conocido (extraído/cero confirmado) de desconocido.</text:p>
          </table:table-cell>
          <table:table-cell table:number-columns-repeated="3" table:style-name="CellAlt" office:value-type="string">
            <text:p>No existe</text:p>
          </table:table-cell>
          <table:table-cell table:style-name="CellAlt" office:value-type="string">
            <text:p>EXTRACTED, ZERO_CONFIRMED, NOT_FOUN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2">02/04/2026</text:date>, <text:time>00:11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6$Win32 OpenOffice.org_project/4116m3$Build-9816</meta:generator>
    <dc:date>2026-04-02T00:11:29.51</dc:date>
    <dc:creator>Jose Antonio Cormenzana Elosua</dc:creator>
    <meta:editing-duration>PT2M36S</meta:editing-duration>
    <meta:editing-cycles>1</meta:editing-cycles>
    <meta:document-statistic meta:table-count="5" meta:cell-count="712" meta:object-count="0"/>
  </office:meta>
</office:document-meta>
</file>