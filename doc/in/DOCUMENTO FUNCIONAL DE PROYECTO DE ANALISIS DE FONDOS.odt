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5cm" table:align="left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5.091cm"/>
    </style:style>
    <style:style style:name="Tabla1.C" style:family="table-column">
      <style:table-column-properties style:column-width="4.33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1">
      <style:paragraph-properties fo:margin-top="0cm" fo:margin-bottom="0cm"/>
    </style:style>
    <style:style style:name="P34" style:family="paragraph" style:parent-style-name="Text_20_body" style:list-style-name="L2">
      <style:paragraph-properties fo:margin-top="0cm" fo:margin-bottom="0cm"/>
    </style:style>
    <style:style style:name="P35" style:family="paragraph" style:parent-style-name="Text_20_body" style:list-style-name="L3">
      <style:paragraph-properties fo:margin-top="0cm" fo:margin-bottom="0cm"/>
    </style:style>
    <style:style style:name="P36" style:family="paragraph" style:parent-style-name="Text_20_body" style:list-style-name="L4">
      <style:paragraph-properties fo:margin-top="0cm" fo:margin-bottom="0cm"/>
    </style:style>
    <style:style style:name="P37" style:family="paragraph" style:parent-style-name="Text_20_body" style:list-style-name="L5">
      <style:paragraph-properties fo:margin-top="0cm" fo:margin-bottom="0cm"/>
    </style:style>
    <style:style style:name="P38" style:family="paragraph" style:parent-style-name="Text_20_body" style:list-style-name="L6">
      <style:paragraph-properties fo:margin-top="0cm" fo:margin-bottom="0cm"/>
    </style:style>
    <style:style style:name="P39" style:family="paragraph" style:parent-style-name="Text_20_body" style:list-style-name="L7">
      <style:paragraph-properties fo:margin-top="0cm" fo:margin-bottom="0cm"/>
    </style:style>
    <style:style style:name="P40" style:family="paragraph" style:parent-style-name="Text_20_body" style:list-style-name="L8">
      <style:paragraph-properties fo:margin-top="0cm" fo:margin-bottom="0cm"/>
    </style:style>
    <style:style style:name="P41" style:family="paragraph" style:parent-style-name="Text_20_body" style:list-style-name="L9">
      <style:paragraph-properties fo:margin-top="0cm" fo:margin-bottom="0cm"/>
    </style:style>
    <style:style style:name="P42" style:family="paragraph" style:parent-style-name="Text_20_body" style:list-style-name="L10">
      <style:paragraph-properties fo:margin-top="0cm" fo:margin-bottom="0cm"/>
    </style:style>
    <style:style style:name="P43" style:family="paragraph" style:parent-style-name="Text_20_body" style:list-style-name="L11">
      <style:paragraph-properties fo:margin-top="0cm" fo:margin-bottom="0cm"/>
    </style:style>
    <style:style style:name="P44" style:family="paragraph" style:parent-style-name="Text_20_body" style:list-style-name="L12">
      <style:paragraph-properties fo:margin-top="0cm" fo:margin-bottom="0cm"/>
    </style:style>
    <style:style style:name="P45" style:family="paragraph" style:parent-style-name="Text_20_body" style:list-style-name="L13">
      <style:paragraph-properties fo:margin-top="0cm" fo:margin-bottom="0cm"/>
    </style:style>
    <style:style style:name="P46" style:family="paragraph" style:parent-style-name="Text_20_body" style:list-style-name="L14">
      <style:paragraph-properties fo:margin-top="0cm" fo:margin-bottom="0cm"/>
    </style:style>
    <style:style style:name="P47" style:family="paragraph" style:parent-style-name="Text_20_body" style:list-style-name="L15">
      <style:paragraph-properties fo:margin-top="0cm" fo:margin-bottom="0cm"/>
    </style:style>
    <style:style style:name="P48" style:family="paragraph" style:parent-style-name="Text_20_body" style:list-style-name="L16">
      <style:paragraph-properties fo:margin-top="0cm" fo:margin-bottom="0cm"/>
    </style:style>
    <style:style style:name="P49" style:family="paragraph" style:parent-style-name="Text_20_body" style:list-style-name="L17">
      <style:paragraph-properties fo:margin-top="0cm" fo:margin-bottom="0cm"/>
    </style:style>
    <style:style style:name="P50" style:family="paragraph" style:parent-style-name="Text_20_body" style:list-style-name="L18">
      <style:paragraph-properties fo:margin-top="0cm" fo:margin-bottom="0cm"/>
    </style:style>
    <style:style style:name="P51" style:family="paragraph" style:parent-style-name="Text_20_body" style:list-style-name="L19">
      <style:paragraph-properties fo:margin-top="0cm" fo:margin-bottom="0cm"/>
    </style:style>
    <style:style style:name="P52" style:family="paragraph" style:parent-style-name="Text_20_body" style:list-style-name="L20">
      <style:paragraph-properties fo:margin-top="0cm" fo:margin-bottom="0cm"/>
    </style:style>
    <style:style style:name="P53" style:family="paragraph" style:parent-style-name="Text_20_body" style:list-style-name="L21">
      <style:paragraph-properties fo:margin-top="0cm" fo:margin-bottom="0cm"/>
    </style:style>
    <style:style style:name="P54" style:family="paragraph" style:parent-style-name="Text_20_body" style:list-style-name="L22">
      <style:paragraph-properties fo:margin-top="0cm" fo:margin-bottom="0cm"/>
    </style:style>
    <style:style style:name="P55" style:family="paragraph" style:parent-style-name="Text_20_body" style:list-style-name="L23">
      <style:paragraph-properties fo:margin-top="0cm" fo:margin-bottom="0cm"/>
    </style:style>
    <style:style style:name="P56" style:family="paragraph" style:parent-style-name="Text_20_body" style:list-style-name="L24">
      <style:paragraph-properties fo:margin-top="0cm" fo:margin-bottom="0cm"/>
    </style:style>
    <style:style style:name="P57" style:family="paragraph" style:parent-style-name="Text_20_body" style:list-style-name="L25">
      <style:paragraph-properties fo:margin-top="0cm" fo:margin-bottom="0cm"/>
    </style:style>
    <style:style style:name="P58" style:family="paragraph" style:parent-style-name="Text_20_body" style:list-style-name="L26">
      <style:paragraph-properties fo:margin-top="0cm" fo:margin-bottom="0cm"/>
    </style:style>
    <style:style style:name="P59" style:family="paragraph" style:parent-style-name="Text_20_body" style:list-style-name="L27">
      <style:paragraph-properties fo:margin-top="0cm" fo:margin-bottom="0cm"/>
    </style:style>
    <style:style style:name="P60" style:family="paragraph" style:parent-style-name="Text_20_body" style:list-style-name="L28">
      <style:paragraph-properties fo:margin-top="0cm" fo:margin-bottom="0cm"/>
    </style:style>
    <style:style style:name="P61" style:family="paragraph" style:parent-style-name="Text_20_body" style:list-style-name="L29">
      <style:paragraph-properties fo:margin-top="0cm" fo:margin-bottom="0cm"/>
    </style:style>
    <style:style style:name="P62" style:family="paragraph" style:parent-style-name="Text_20_body" style:list-style-name="L30">
      <style:paragraph-properties fo:margin-top="0cm" fo:margin-bottom="0cm"/>
    </style:style>
    <style:style style:name="P63" style:family="paragraph" style:parent-style-name="Text_20_body" style:list-style-name="L31">
      <style:paragraph-properties fo:margin-top="0cm" fo:margin-bottom="0cm"/>
    </style:style>
    <style:style style:name="P64" style:family="paragraph" style:parent-style-name="Text_20_body" style:list-style-name="L32">
      <style:paragraph-properties fo:margin-top="0cm" fo:margin-bottom="0cm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ESPECIFICACIÓN FUNCIONAL DEL SISTEMA DE SELECCIÓN DE FONDOS</text:span></text:h>
      <text:p text:style-name="Horizontal_20_Line"/>
      <text:h text:style-name="Heading_20_2" text:outline-level="2"><text:span text:style-name="Strong_20_Emphasis">1. Ámbito y objeto del sistema</text:span></text:h>
      <text:h text:style-name="Heading_20_3" text:outline-level="3"><text:span text:style-name="Strong_20_Emphasis">1.1 Ámbito</text:span></text:h>
      <text:p text:style-name="Text_20_body">El sistema cubre el ciclo completo de construcción de un <text:span text:style-name="Strong_20_Emphasis">universo estructurado, consistente y analíticamente explotable de fondos de inversión</text:span>, a partir de:</text:p>
      <text:list xml:id="list5638366292120345439" text:style-name="L1">
        <text:list-item>
          <text:p text:style-name="P33">fuentes regulatorias (KIID/KID), </text:p>
        </text:list-item>
        <text:list-item>
          <text:p text:style-name="P33">información maestra de fondos, </text:p>
        </text:list-item>
        <text:list-item>
          <text:p text:style-name="P1">y procesamiento estructurado y secuencial. </text:p>
        </text:list-item>
      </text:list>
      <text:p text:style-name="Text_20_body">El sistema está diseñado como una <text:span text:style-name="Strong_20_Emphasis">arquitectura modular en tres capas independientes</text:span>, con flujo unidireccional de datos.</text:p>
      <text:p text:style-name="Horizontal_20_Line"/>
      <text:h text:style-name="Heading_20_3" text:outline-level="3"><text:span text:style-name="Strong_20_Emphasis">1.2 Objeto</text:span></text:h>
      <text:p text:style-name="Text_20_body">El objeto del sistema es:</text:p>
      <text:p text:style-name="Quotations"><text:span text:style-name="Strong_20_Emphasis">transformar información heterogénea y no estructurada en un dataset estructurado, trazable y explotable para análisis cuantitativo y toma de decisiones.</text:span></text:p>
      <text:p text:style-name="Text_20_body">Esto implica:</text:p>
      <text:list xml:id="list9055475888573823888" text:style-name="L2">
        <text:list-item>
          <text:p text:style-name="P34">estructurar el universo de fondos, </text:p>
        </text:list-item>
        <text:list-item>
          <text:p text:style-name="P34">clasificarlo de forma consistente, </text:p>
        </text:list-item>
        <text:list-item>
          <text:p text:style-name="P34">enriquecerlo con métricas, </text:p>
        </text:list-item>
        <text:list-item>
          <text:p text:style-name="P2">y habilitar su explotación analítica. </text:p>
        </text:list-item>
      </text:list>
      <text:p text:style-name="Horizontal_20_Line"/>
      <text:h text:style-name="Heading_20_3" text:outline-level="3"><text:span text:style-name="Strong_20_Emphasis">1.3 Resultado esperado</text:span></text:h>
      <text:p text:style-name="Text_20_body">El sistema produce:</text:p>
      <text:list xml:id="list3844355925629523953" text:style-name="L3">
        <text:list-item>
          <text:p text:style-name="P35">un <text:span text:style-name="Strong_20_Emphasis">modelo de datos canónico de fondos</text:span>, </text:p>
        </text:list-item>
        <text:list-item>
          <text:p text:style-name="P35">métricas cuantitativas consistentes, </text:p>
        </text:list-item>
        <text:list-item>
          <text:p text:style-name="P3">y capacidades de análisis avanzado sobre universos homogéneos. </text:p>
        </text:list-item>
      </text:list>
      <text:p text:style-name="Horizontal_20_Line"/>
      <text:h text:style-name="Heading_20_3" text:outline-level="3"><text:span text:style-name="Strong_20_Emphasis">1.4 Principios estructurales del sistema</text:span></text:h>
      <text:list xml:id="list3106427961574875493" text:style-name="L4">
        <text:list-item>
          <text:p text:style-name="P36"><text:span text:style-name="Strong_20_Emphasis">Separación estricta de responsabilidades</text:span> </text:p>
        </text:list-item>
        <text:list-item>
          <text:p text:style-name="P36"><text:span text:style-name="Strong_20_Emphasis">Flujo unidireccional de datos</text:span> </text:p>
        </text:list-item>
        <text:list-item>
          <text:p text:style-name="P36"><text:span text:style-name="Strong_20_Emphasis">Trazabilidad completa</text:span> </text:p>
        </text:list-item>
        <text:list-item>
          <text:p text:style-name="P36"><text:soft-page-break/><text:span text:style-name="Strong_20_Emphasis">Conservadurismo semántico</text:span> </text:p>
        </text:list-item>
        <text:list-item>
          <text:p text:style-name="P4"><text:span text:style-name="Strong_20_Emphasis">Reproducibilidad</text:span> </text:p>
        </text:list-item>
      </text:list>
      <text:p text:style-name="Horizontal_20_Line"/>
      <text:h text:style-name="Heading_20_2" text:outline-level="2"><text:span text:style-name="Strong_20_Emphasis">2. Arquitectura funcional del sistema</text:span></text:h>
      <text:p text:style-name="Text_20_body">El sistema se estructura en tres proyect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Proyecto</text:p>
            </table:table-cell>
            <table:table-cell table:style-name="Tabla1.A1" office:value-type="string">
              <text:p text:style-name="Table_20_Heading">Rol</text:p>
            </table:table-cell>
            <table:table-cell table:style-name="Tabla1.A1" office:value-type="string">
              <text:p text:style-name="Table_20_Heading">Naturaleza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Proyecto 1</text:span></text:p>
          </table:table-cell>
          <table:table-cell table:style-name="Tabla1.A1" office:value-type="string">
            <text:p text:style-name="Table_20_Contents">Construcción del dato</text:p>
          </table:table-cell>
          <table:table-cell table:style-name="Tabla1.A1" office:value-type="string">
            <text:p text:style-name="Table_20_Contents">Núcleo industria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oyecto 2</text:span></text:p>
          </table:table-cell>
          <table:table-cell table:style-name="Tabla1.A1" office:value-type="string">
            <text:p text:style-name="Table_20_Contents">Enriquecimiento cuantitativo</text:p>
          </table:table-cell>
          <table:table-cell table:style-name="Tabla1.A1" office:value-type="string">
            <text:p text:style-name="Table_20_Contents">Capa analítica básic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oyecto 3</text:span></text:p>
          </table:table-cell>
          <table:table-cell table:style-name="Tabla1.A1" office:value-type="string">
            <text:p text:style-name="Table_20_Contents">Explotación avanzada</text:p>
          </table:table-cell>
          <table:table-cell table:style-name="Tabla1.A1" office:value-type="string">
            <text:p text:style-name="Table_20_Contents">Capa analítica avanzada</text:p>
          </table:table-cell>
        </table:table-row>
      </table:table>
      <text:p text:style-name="Text_20_body">Flujo:</text:p>
      <text:section text:style-name="Sect1" text:name="code-block-viewer">
        <text:p text:style-name="Preformatted_20_Text">Fuentes → Proyecto 1 → Proyecto 2 → Proyecto 3</text:p>
      </text:section>
      <text:p text:style-name="Horizontal_20_Line"/>
      <text:h text:style-name="Heading_20_1" text:outline-level="1"><text:span text:style-name="Strong_20_Emphasis">3. Proyecto 1 – Núcleo industrial</text:span></text:h>
      <text:p text:style-name="Horizontal_20_Line"/>
      <text:h text:style-name="Heading_20_2" text:outline-level="2"><text:span text:style-name="Strong_20_Emphasis">3.1 Ámbito</text:span></text:h>
      <text:p text:style-name="Text_20_body">Construcción del <text:span text:style-name="Strong_20_Emphasis">dataset estructural base de fondos</text:span> a partir de fuentes primarias.</text:p>
      <text:p text:style-name="Text_20_body">Incluye:</text:p>
      <text:list xml:id="list5820259403230731809" text:style-name="L5">
        <text:list-item>
          <text:p text:style-name="P37">ingesta de datos, </text:p>
        </text:list-item>
        <text:list-item>
          <text:p text:style-name="P37">parsing documental, </text:p>
        </text:list-item>
        <text:list-item>
          <text:p text:style-name="P37">clasificación estructural, </text:p>
        </text:list-item>
        <text:list-item>
          <text:p text:style-name="P5">persistencia. </text:p>
        </text:list-item>
      </text:list>
      <text:p text:style-name="Horizontal_20_Line"/>
      <text:h text:style-name="Heading_20_2" text:outline-level="2"><text:span text:style-name="Strong_20_Emphasis">3.2 Objeto</text:span></text:h>
      <text:p text:style-name="Text_20_body">El objeto de Proyecto 1 es:</text:p>
      <text:p text:style-name="Quotations"><text:span text:style-name="Strong_20_Emphasis">producir una representación estructurada, única, coherente y trazable de cada fondo (ISIN)</text:span>.</text:p>
      <text:p text:style-name="Horizontal_20_Line"/>
      <text:h text:style-name="Heading_20_2" text:outline-level="2"><text:span text:style-name="Strong_20_Emphasis">3.3 Inputs</text:span></text:h>
      <text:list xml:id="list6060961003980568890" text:style-name="L6">
        <text:list-item>
          <text:p text:style-name="P38">Maestro de fondos (ISIN, nombre, gestora) </text:p>
        </text:list-item>
        <text:list-item>
          <text:p text:style-name="P38">Documentos KIID/KID (PDF) </text:p>
        </text:list-item>
        <text:list-item>
          <text:p text:style-name="P6">Heurísticas de clasificación consolidadas </text:p>
        </text:list-item>
      </text:list>
      <text:p text:style-name="Horizontal_20_Line"/>
      <text:h text:style-name="Heading_20_2" text:outline-level="2"><text:soft-page-break/><text:span text:style-name="Strong_20_Emphasis">3.4 Outputs</text:span></text:h>
      <text:list xml:id="list5465334479433211844" text:style-name="L7">
        <text:list-item>
          <text:p text:style-name="P39">Base de datos estructurada (tabla <text:span text:style-name="Source_20_Text">fund_master</text:span>) </text:p>
        </text:list-item>
        <text:list-item>
          <text:p text:style-name="P39">Metadatos documentales (<text:span text:style-name="Source_20_Text">fund_kiid_metadata</text:span>) </text:p>
        </text:list-item>
        <text:list-item>
          <text:p text:style-name="P39">Logs operativos </text:p>
        </text:list-item>
        <text:list-item>
          <text:p text:style-name="P7">Dataset listo para consumo analítico </text:p>
        </text:list-item>
      </text:list>
      <text:p text:style-name="Horizontal_20_Line"/>
      <text:h text:style-name="Heading_20_2" text:outline-level="2"><text:span text:style-name="Strong_20_Emphasis">3.5 Funciones principales</text:span></text:h>
      <text:h text:style-name="Heading_20_3" text:outline-level="3"><text:span text:style-name="Strong_20_Emphasis">3.5.1 Ingesta</text:span></text:h>
      <text:list xml:id="list7074179425804300445" text:style-name="L8">
        <text:list-item>
          <text:p text:style-name="P40">carga del universo </text:p>
        </text:list-item>
        <text:list-item>
          <text:p text:style-name="P8">descarga y versionado de KIID </text:p>
        </text:list-item>
      </text:list>
      <text:h text:style-name="Heading_20_3" text:outline-level="3"><text:span text:style-name="Strong_20_Emphasis">3.5.2 Parsing documental</text:span></text:h>
      <text:list xml:id="list2251242841468983566" text:style-name="L9">
        <text:list-item>
          <text:p text:style-name="P41">extracción de texto </text:p>
        </text:list-item>
        <text:list-item>
          <text:p text:style-name="P41">normalización OCR </text:p>
        </text:list-item>
        <text:list-item>
          <text:p text:style-name="P9">extracción de atributos regulatorios (SRRI, derivados, benchmark, etc.) </text:p>
        </text:list-item>
      </text:list>
      <text:h text:style-name="Heading_20_3" text:outline-level="3"><text:span text:style-name="Strong_20_Emphasis">3.5.3 Clasificación estructural</text:span></text:h>
      <text:list xml:id="list37517808302682841" text:style-name="L10">
        <text:list-item>
          <text:p text:style-name="P42">modelo secuencial por bloques </text:p>
        </text:list-item>
        <text:list-item>
          <text:p text:style-name="P42">clasificación excluyente </text:p>
        </text:list-item>
        <text:list-item>
          <text:p text:style-name="P10">asignación de atributos canónicos </text:p>
        </text:list-item>
      </text:list>
      <text:h text:style-name="Heading_20_3" text:outline-level="3"><text:span text:style-name="Strong_20_Emphasis">3.5.4 Persistencia</text:span></text:h>
      <text:list xml:id="list3303849335277371714" text:style-name="L11">
        <text:list-item>
          <text:p text:style-name="P43">almacenamiento en modelo relacional </text:p>
        </text:list-item>
        <text:list-item>
          <text:p text:style-name="P11">trazabilidad completa </text:p>
        </text:list-item>
      </text:list>
      <text:p text:style-name="Horizontal_20_Line"/>
      <text:h text:style-name="Heading_20_2" text:outline-level="2"><text:span text:style-name="Strong_20_Emphasis">3.6 Modelo de clasificación</text:span></text:h>
      <text:p text:style-name="Text_20_body">Basado en:</text:p>
      <text:h text:style-name="Heading_20_3" text:outline-level="3"><text:span text:style-name="Strong_20_Emphasis">Bloques secuenciales</text:span></text:h>
      <text:list xml:id="list2196685904245870981" text:style-name="L12">
        <text:list-item>
          <text:p text:style-name="P44">Monetarios </text:p>
        </text:list-item>
        <text:list-item>
          <text:p text:style-name="P44">RF Corto </text:p>
        </text:list-item>
        <text:list-item>
          <text:p text:style-name="P44">RF Flexible </text:p>
        </text:list-item>
        <text:list-item>
          <text:p text:style-name="P44">Renta Variable </text:p>
        </text:list-item>
        <text:list-item>
          <text:p text:style-name="P44">Mixtos </text:p>
        </text:list-item>
        <text:list-item>
          <text:p text:style-name="P44">Alternativos </text:p>
        </text:list-item>
        <text:list-item>
          <text:p text:style-name="P12">Restantes </text:p>
        </text:list-item>
      </text:list>
      <text:h text:style-name="Heading_20_3" text:outline-level="3"><text:soft-page-break/><text:span text:style-name="Strong_20_Emphasis">Propiedades</text:span></text:h>
      <text:list xml:id="list7104363818903739478" text:style-name="L13">
        <text:list-item>
          <text:p text:style-name="P45">excluyente </text:p>
        </text:list-item>
        <text:list-item>
          <text:p text:style-name="P45">determinista </text:p>
        </text:list-item>
        <text:list-item>
          <text:p text:style-name="P13">trazable </text:p>
        </text:list-item>
      </text:list>
      <text:p text:style-name="Horizontal_20_Line"/>
      <text:h text:style-name="Heading_20_2" text:outline-level="2"><text:span text:style-name="Strong_20_Emphasis">3.7 Modelo de datos</text:span></text:h>
      <text:p text:style-name="Text_20_body">Tabla principal: <text:span text:style-name="Source_20_Text">fund_master</text:span></text:p>
      <text:p text:style-name="Text_20_body">Contiene:</text:p>
      <text:list xml:id="list8197930285397254329" text:style-name="L14">
        <text:list-item>
          <text:p text:style-name="P46">identidad (ISIN) </text:p>
        </text:list-item>
        <text:list-item>
          <text:p text:style-name="P46">clasificación estructural </text:p>
        </text:list-item>
        <text:list-item>
          <text:p text:style-name="P46">atributos documentales </text:p>
        </text:list-item>
        <text:list-item>
          <text:p text:style-name="P14">trazabilidad </text:p>
        </text:list-item>
      </text:list>
      <text:p text:style-name="Text_20_body">Tabla auxiliar: <text:span text:style-name="Source_20_Text">fund_kiid_metadata</text:span></text:p>
      <text:list xml:id="list3875099270605473456" text:style-name="L15">
        <text:list-item>
          <text:p text:style-name="P47">versionado documental </text:p>
        </text:list-item>
        <text:list-item>
          <text:p text:style-name="P15">evidencia de parsing </text:p>
        </text:list-item>
      </text:list>
      <text:p text:style-name="Horizontal_20_Line"/>
      <text:h text:style-name="Heading_20_2" text:outline-level="2"><text:span text:style-name="Strong_20_Emphasis">3.8 Reglas clave</text:span></text:h>
      <text:list xml:id="list8459304004461088224" text:style-name="L16">
        <text:list-item>
          <text:p text:style-name="P48">“Mejor None que incorrecto” </text:p>
        </text:list-item>
        <text:list-item>
          <text:p text:style-name="P48">no duplicación semántica </text:p>
        </text:list-item>
        <text:list-item>
          <text:p text:style-name="P48">clasificación estructural (no temática) </text:p>
        </text:list-item>
        <text:list-item>
          <text:p text:style-name="P16">SRRI domina Profile </text:p>
        </text:list-item>
      </text:list>
      <text:p text:style-name="Horizontal_20_Line"/>
      <text:h text:style-name="Heading_20_2" text:outline-level="2"><text:span text:style-name="Strong_20_Emphasis">3.9 Output funcional de Proyecto 1</text:span></text:h>
      <text:p text:style-name="Quotations">Dataset estructurado, estable y sin ambigüedad semántica.</text:p>
      <text:p text:style-name="Horizontal_20_Line"/>
      <text:h text:style-name="Heading_20_1" text:outline-level="1"><text:span text:style-name="Strong_20_Emphasis">4. Proyecto 2 – Métricas cuantitativas</text:span></text:h>
      <text:p text:style-name="Horizontal_20_Line"/>
      <text:h text:style-name="Heading_20_2" text:outline-level="2"><text:span text:style-name="Strong_20_Emphasis">4.1 Ámbito</text:span></text:h>
      <text:p text:style-name="Text_20_body">Cálculo y persistencia de <text:span text:style-name="Strong_20_Emphasis">métricas financieras y series temporales</text:span> sobre el dataset generado en Proyecto 1.</text:p>
      <text:p text:style-name="Horizontal_20_Line"/>
      <text:h text:style-name="Heading_20_2" text:outline-level="2"><text:soft-page-break/><text:span text:style-name="Strong_20_Emphasis">4.2 Objeto</text:span></text:h>
      <text:p text:style-name="Text_20_body">El objeto de Proyecto 2 es:</text:p>
      <text:p text:style-name="Quotations"><text:span text:style-name="Strong_20_Emphasis">transformar datos estructurales en información cuantitativa medible y comparable.</text:span></text:p>
      <text:p text:style-name="Horizontal_20_Line"/>
      <text:h text:style-name="Heading_20_2" text:outline-level="2"><text:span text:style-name="Strong_20_Emphasis">4.3 Inputs</text:span></text:h>
      <text:list xml:id="list4249280240127712803" text:style-name="L17">
        <text:list-item>
          <text:p text:style-name="P49">dataset estructural (Proyecto 1) </text:p>
        </text:list-item>
        <text:list-item>
          <text:p text:style-name="P49">Indices Benchmark por fondo</text:p>
        </text:list-item>
        <text:list-item>
          <text:p text:style-name="P49">series temporales de evolución de fondos (rentabilidad, drawdown, indice sharpe y sortino) </text:p>
        </text:list-item>
        <text:list-item>
          <text:p text:style-name="P49">series temporales indicadores macroeconómicos (inflacción, Masa monetaria M2, indices de producción industrial, deuda, deficit fiscal) segmentada por España, Europa,Estados Unidos, China y Japon</text:p>
        </text:list-item>
        <text:list-item>
          <text:p text:style-name="P17">series temporales de evolución de indicadores de materias primas (oro y petroleo)</text:p>
        </text:list-item>
      </text:list>
      <text:h text:style-name="Heading_20_2" text:outline-level="2"><text:span text:style-name="Strong_20_Emphasis">4.4 Outputs</text:span></text:h>
      <text:list xml:id="list7484123370976226824" text:style-name="L18">
        <text:list-item>
          <text:p text:style-name="P50">tabla <text:span text:style-name="Source_20_Text">fund_metrics</text:span> </text:p>
        </text:list-item>
        <text:list-item>
          <text:p text:style-name="P50">series temporales normalizadas, segmentadas por nodo, incluyendo indicadores calculados como betas y alphas</text:p>
        </text:list-item>
        <text:list-item>
          <text:p text:style-name="P18">indicadores comparables entre fondos </text:p>
        </text:list-item>
      </text:list>
      <text:p text:style-name="Horizontal_20_Line"/>
      <text:h text:style-name="Heading_20_2" text:outline-level="2"><text:span text:style-name="Strong_20_Emphasis">4.5 Funciones principales</text:span></text:h>
      <text:h text:style-name="Heading_20_3" text:outline-level="3"><text:span text:style-name="Strong_20_Emphasis">4.5.1 Cálculo de métricas</text:span></text:h>
      <text:list xml:id="list484183754926975288" text:style-name="L19">
        <text:list-item>
          <text:p text:style-name="P51">rentabilidad </text:p>
        </text:list-item>
        <text:list-item>
          <text:p text:style-name="P51">volatilidad </text:p>
        </text:list-item>
        <text:list-item>
          <text:p text:style-name="P51">drawdown </text:p>
        </text:list-item>
        <text:list-item>
          <text:p text:style-name="P19">ratios (Sharpe, Sortino)</text:p>
        </text:list-item>
        <text:list-item>
          <text:p text:style-name="P19">Alphas y Betas por fondo, etc ...</text:p>
        </text:list-item>
      </text:list>
      <text:h text:style-name="Heading_20_3" text:outline-level="3"><text:span text:style-name="Strong_20_Emphasis">4.5.2 Análisis temporal</text:span></text:h>
      <text:list xml:id="list7778838105768138725" text:style-name="L20">
        <text:list-item>
          <text:p text:style-name="P52">agregaciones por horizonte </text:p>
        </text:list-item>
        <text:list-item>
          <text:p text:style-name="P20">consistencia histórica </text:p>
        </text:list-item>
      </text:list>
      <text:h text:style-name="Heading_20_3" text:outline-level="3"><text:span text:style-name="Strong_20_Emphasis">4.5.3 Normalización</text:span></text:h>
      <text:list xml:id="list5970873624283090573" text:style-name="L21">
        <text:list-item>
          <text:p text:style-name="P53">homogeneización de métricas </text:p>
        </text:list-item>
        <text:list-item>
          <text:p text:style-name="P21">comparabilidad inter-fondos </text:p>
        </text:list-item>
      </text:list>
      <text:p text:style-name="Horizontal_20_Line"/>
      <text:h text:style-name="Heading_20_2" text:outline-level="2"><text:soft-page-break/><text:span text:style-name="Strong_20_Emphasis">4.6 Restricciones</text:span></text:h>
      <text:p text:style-name="Text_20_body">Proyecto 2:</text:p>
      <text:list xml:id="list5831668276612555002" text:style-name="L22">
        <text:list-item>
          <text:p text:style-name="P54">no modifica clasificación </text:p>
        </text:list-item>
        <text:list-item>
          <text:p text:style-name="P54">no ingiere fuentes primarias </text:p>
        </text:list-item>
        <text:list-item>
          <text:p text:style-name="P22">no redefine atributos estructurales </text:p>
        </text:list-item>
      </text:list>
      <text:p text:style-name="Horizontal_20_Line"/>
      <text:h text:style-name="Heading_20_2" text:outline-level="2"><text:span text:style-name="Strong_20_Emphasis">4.7 Output funcional</text:span></text:h>
      <text:p text:style-name="Quotations">Dataset enriquecido con métricas cuantitativas consistentes y explotables.</text:p>
      <text:p text:style-name="Horizontal_20_Line"/>
      <text:h text:style-name="Heading_20_1" text:outline-level="1"><text:span text:style-name="Strong_20_Emphasis">5. Proyecto 3 – Explotación analítica</text:span></text:h>
      <text:p text:style-name="Horizontal_20_Line"/>
      <text:h text:style-name="Heading_20_2" text:outline-level="2"><text:span text:style-name="Strong_20_Emphasis">5.1 Ámbito</text:span></text:h>
      <text:p text:style-name="Text_20_body">Explotación avanzada del dataset estructurado y cuantitativo.</text:p>
      <text:p text:style-name="Text_20_body">Incluye análisis, segmentación y construcción de conocimiento.</text:p>
      <text:p text:style-name="Text_20_body">Implementación de un criterio de selección de fondos en base al ciclo económico vigente en cada momento, que integre la funcionalidad que reaccione rápidamente ante cambios en el regimen económico y que pondere o filtre las métricas calculadas sobre los periodos históricos en los que el regimen vigente era similar al existente en el momento en el que se invoca este análisis, y que también pondere más el comportamiento reciente que el histórico completo.</text:p>
      <text:p text:style-name="Horizontal_20_Line"/>
      <text:h text:style-name="Heading_20_2" text:outline-level="2"><text:span text:style-name="Strong_20_Emphasis">5.2 Objeto</text:span></text:h>
      <text:p text:style-name="Text_20_body">El objeto de Proyecto 3 es:</text:p>
      <text:p text:style-name="Quotations"><text:span text:style-name="Strong_20_Emphasis">extraer valor analítico, patrones y conocimiento del universo de fondos.</text:span></text:p>
      <text:p text:style-name="Horizontal_20_Line"/>
      <text:h text:style-name="Heading_20_2" text:outline-level="2"><text:span text:style-name="Strong_20_Emphasis">5.3 Inputs</text:span></text:h>
      <text:list xml:id="list6562956616781697617" text:style-name="L23">
        <text:list-item>
          <text:p text:style-name="P55">datos estructurales (Proyecto 1) </text:p>
        </text:list-item>
        <text:list-item>
          <text:p text:style-name="P23">métricas cuantitativas (Proyecto 2) </text:p>
        </text:list-item>
      </text:list>
      <text:p text:style-name="Horizontal_20_Line"/>
      <text:h text:style-name="Heading_20_2" text:outline-level="2"><text:span text:style-name="Strong_20_Emphasis">5.4 Outputs</text:span></text:h>
      <text:list xml:id="list3760820950337981909" text:style-name="L24">
        <text:list-item>
          <text:p text:style-name="P56">segmentaciones </text:p>
        </text:list-item>
        <text:list-item>
          <text:p text:style-name="P56">clusters </text:p>
        </text:list-item>
        <text:list-item>
          <text:p text:style-name="P56"><text:soft-page-break/>universos analíticos </text:p>
        </text:list-item>
        <text:list-item>
          <text:p text:style-name="P56">modelos analíticos </text:p>
        </text:list-item>
        <text:list-item>
          <text:p text:style-name="P24">dashboards </text:p>
        </text:list-item>
      </text:list>
      <text:p text:style-name="Horizontal_20_Line"/>
      <text:h text:style-name="Heading_20_2" text:outline-level="2"><text:span text:style-name="Strong_20_Emphasis">5.5 Funciones principales</text:span></text:h>
      <text:h text:style-name="Heading_20_3" text:outline-level="3"><text:span text:style-name="Strong_20_Emphasis">5.5.1 Segmentación</text:span></text:h>
      <text:list xml:id="list6956532097320370820" text:style-name="L25">
        <text:list-item>
          <text:p text:style-name="P57">clustering de fondos </text:p>
        </text:list-item>
        <text:list-item>
          <text:p text:style-name="P25">tipologías </text:p>
        </text:list-item>
      </text:list>
      <text:h text:style-name="Heading_20_3" text:outline-level="3"><text:span text:style-name="Strong_20_Emphasis">5.5.2 Análisis avanzado</text:span></text:h>
      <text:list xml:id="list1146383400391222614" text:style-name="L26">
        <text:list-item>
          <text:p text:style-name="P58">factores </text:p>
        </text:list-item>
        <text:list-item>
          <text:p text:style-name="P58">temáticas </text:p>
        </text:list-item>
        <text:list-item>
          <text:p text:style-name="P26">comportamiento </text:p>
        </text:list-item>
      </text:list>
      <text:h text:style-name="Heading_20_3" text:outline-level="3"><text:span text:style-name="Strong_20_Emphasis">5.5.3 Explotación</text:span></text:h>
      <text:list xml:id="list3346197387042669564" text:style-name="L27">
        <text:list-item>
          <text:p text:style-name="P59">reporting </text:p>
        </text:list-item>
        <text:list-item>
          <text:p text:style-name="P59">visualización </text:p>
        </text:list-item>
        <text:list-item>
          <text:p text:style-name="P27">soporte a decisión </text:p>
        </text:list-item>
      </text:list>
      <text:p text:style-name="Horizontal_20_Line"/>
      <text:h text:style-name="Heading_20_2" text:outline-level="2"><text:span text:style-name="Strong_20_Emphasis">5.6 Restricciones</text:span></text:h>
      <text:p text:style-name="Text_20_body">Proyecto 3:</text:p>
      <text:list xml:id="list1597918663322245819" text:style-name="L28">
        <text:list-item>
          <text:p text:style-name="P60">no altera datos base </text:p>
        </text:list-item>
        <text:list-item>
          <text:p text:style-name="P60">no corrige clasificación </text:p>
        </text:list-item>
        <text:list-item>
          <text:p text:style-name="P28">no reinterpreta Proyecto 1 </text:p>
        </text:list-item>
      </text:list>
      <text:p text:style-name="Horizontal_20_Line"/>
      <text:h text:style-name="Heading_20_2" text:outline-level="2"><text:span text:style-name="Strong_20_Emphasis">5.7 Output funcional</text:span></text:h>
      <text:p text:style-name="Quotations">Conocimiento estructurado y explotable para análisis y decisión.</text:p>
      <text:p text:style-name="Horizontal_20_Line"/>
      <text:h text:style-name="Heading_20_1" text:outline-level="1"><text:span text:style-name="Strong_20_Emphasis">6. Integración entre proyectos</text:span></text:h>
      <text:p text:style-name="Horizontal_20_Line"/>
      <text:h text:style-name="Heading_20_2" text:outline-level="2"><text:span text:style-name="Strong_20_Emphasis">6.1 Flujo de datos</text:span></text:h>
      <text:section text:style-name="Sect1" text:name="Sección1">
        <text:p text:style-name="Preformatted_20_Text"><text:bookmark text:name="code-block-viewer"/>Proyecto 1 → Proyecto 2 → Proyecto 3</text:p>
      </text:section>
      <text:p text:style-name="Horizontal_20_Line"/>
      <text:h text:style-name="Heading_20_2" text:outline-level="2"><text:soft-page-break/><text:span text:style-name="Strong_20_Emphasis">6.2 Contrato entre capas</text:span></text:h>
      <text:h text:style-name="Heading_20_3" text:outline-level="3">Proyecto 1 → Proyecto 2</text:h>
      <text:list xml:id="list2693337604065434062" text:style-name="L29">
        <text:list-item>
          <text:p text:style-name="P61">dataset estructural cerrado </text:p>
        </text:list-item>
        <text:list-item>
          <text:p text:style-name="P29">atributos estables </text:p>
        </text:list-item>
      </text:list>
      <text:h text:style-name="Heading_20_3" text:outline-level="3">Proyecto 2 → Proyecto 3</text:h>
      <text:list xml:id="list453027392225981561" text:style-name="L30">
        <text:list-item>
          <text:p text:style-name="P62">métricas normalizadas </text:p>
        </text:list-item>
        <text:list-item>
          <text:p text:style-name="P30">series consistentes </text:p>
        </text:list-item>
      </text:list>
      <text:p text:style-name="Horizontal_20_Line"/>
      <text:h text:style-name="Heading_20_2" text:outline-level="2"><text:span text:style-name="Strong_20_Emphasis">6.3 Propiedades del sistema completo</text:span></text:h>
      <text:list xml:id="list3755197530384712026" text:style-name="L31">
        <text:list-item>
          <text:p text:style-name="P63">modular </text:p>
        </text:list-item>
        <text:list-item>
          <text:p text:style-name="P63">desacoplado </text:p>
        </text:list-item>
        <text:list-item>
          <text:p text:style-name="P63">escalable </text:p>
        </text:list-item>
        <text:list-item>
          <text:p text:style-name="P31">auditable </text:p>
        </text:list-item>
      </text:list>
      <text:p text:style-name="Horizontal_20_Line"/>
      <text:h text:style-name="Heading_20_1" text:outline-level="1"><text:span text:style-name="Strong_20_Emphasis">7. Conclusión funcional</text:span></text:h>
      <text:p text:style-name="Text_20_body">El sistema define una arquitectura completa cuyo objetivo es:</text:p>
      <text:p text:style-name="Quotations"><text:span text:style-name="Strong_20_Emphasis">convertir datos regulatorios y operativos en una plataforma estructurada de análisis de fondos, basada en rigor semántico, trazabilidad y explotabilidad analítica.</text:span></text:p>
      <text:p text:style-name="Text_20_body">Cada proyecto cumple un rol específico:</text:p>
      <text:list xml:id="list1947004318453601829" text:style-name="L32">
        <text:list-item>
          <text:p text:style-name="P64"><text:span text:style-name="Strong_20_Emphasis">Proyecto 1</text:span>: construye el dato </text:p>
        </text:list-item>
        <text:list-item>
          <text:p text:style-name="P64"><text:span text:style-name="Strong_20_Emphasis">Proyecto 2</text:span>: lo cuantifica </text:p>
        </text:list-item>
        <text:list-item>
          <text:p text:style-name="P32"><text:span text:style-name="Strong_20_Emphasis">Proyecto 3</text:span>: lo explota </text:p>
        </text:list-item>
      </text:list>
      <text:p text:style-name="Text_20_body">Sin solapamientos ni ambigüedad funcion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Antonio Cormenzana Elosua</meta:initial-creator>
    <meta:creation-date>2026-04-03T13:46:39.54</meta:creation-date>
    <dc:date>2026-04-03T14:27:05.37</dc:date>
    <dc:creator>Jose Antonio Cormenzana Elosua</dc:creator>
    <meta:editing-duration>PT40M25S</meta:editing-duration>
    <meta:editing-cycles>2</meta:editing-cycles>
    <meta:generator>OpenOffice/4.1.16$Win32 OpenOffice.org_project/4116m3$Build-9816</meta:generator>
    <meta:document-statistic meta:table-count="1" meta:image-count="0" meta:object-count="0" meta:page-count="8" meta:paragraph-count="204" meta:word-count="982" meta:character-count="6621"/>
  </office:meta>
</office:document-meta>
</file>