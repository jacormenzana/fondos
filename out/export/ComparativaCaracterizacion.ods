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8.274cm"/>
    </style:style>
    <style:style style:name="co3" style:family="table-column">
      <style:table-column-properties fo:break-before="auto" style:column-width="7.486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5.05cm"/>
    </style:style>
    <style:style style:name="co6" style:family="table-column">
      <style:table-column-properties fo:break-before="auto" style:column-width="1.707cm"/>
    </style:style>
    <style:style style:name="ro1" style:family="table-row">
      <style:table-row-properties style:row-height="1.129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1.526cm" fo:break-before="auto" style:use-optimal-row-height="true"/>
    </style:style>
    <style:style style:name="ro7" style:family="table-row">
      <style:table-row-properties style:row-height="2.632cm" fo:break-before="auto" style:use-optimal-row-height="true"/>
    </style:style>
    <style:style style:name="ro8" style:family="table-row">
      <style:table-row-properties style:row-height="0.369cm" fo:break-before="auto" style:use-optimal-row-height="true"/>
    </style:style>
    <style:style style:name="ta1" style:family="table" style:master-page-name="PageStyle_5f_Comparativa">
      <style:table-properties table:display="true" style:writing-mode="lr-tb"/>
    </style:style>
    <style:style style:name="ce1" style:family="table-cell" style:parent-style-name="Excel_20_Built-in_20_Normal">
      <style:table-cell-properties fo:background-color="#1f3864" style:diagonal-bl-tr="none" style:diagonal-tl-br="none" style:text-align-source="fix" style:repeat-content="false" fo:wrap-option="wrap" fo:border="0.035cm solid #bdd7e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Excel_20_Built-in_20_Normal">
      <style:table-cell-properties fo:background-color="#ebf3fb" style:diagonal-bl-tr="none" style:diagonal-tl-br="none" style:text-align-source="value-type" style:repeat-content="false" fo:wrap-option="wrap" fo:border="0.035cm solid #bdd7e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Excel_20_Built-in_20_Normal">
      <style:table-cell-properties fo:background-color="#fff2cc" style:diagonal-bl-tr="none" style:diagonal-tl-br="none" style:text-align-source="value-type" style:repeat-content="false" fo:wrap-option="wrap" fo:border="0.035cm solid #bdd7e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Excel_20_Built-in_20_Normal">
      <style:table-cell-properties fo:border-bottom="0.035cm solid #bdd7ee" style:diagonal-bl-tr="none" style:diagonal-tl-br="none" fo:border-left="none" fo:border-right="0.035cm solid #bdd7ee" style:rotation-align="none" fo:border-top="0.035cm solid #bdd7ee"/>
      <style:text-properties fo:font-size="8pt" style:font-size-asian="8pt" style:font-size-complex="8pt"/>
    </style:style>
    <style:style style:name="ce2" style:family="table-cell" style:parent-style-name="Excel_20_Built-in_20_Normal">
      <style:table-cell-properties fo:background-color="#2e75b6" style:diagonal-bl-tr="none" style:diagonal-tl-br="none" style:text-align-source="fix" style:repeat-content="false" fo:wrap-option="no-wrap" fo:border="0.035cm solid #bdd7e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bdd7e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Excel_20_Built-in_20_Normal">
      <style:table-cell-properties fo:background-color="#ebf3fb" style:diagonal-bl-tr="none" style:diagonal-tl-br="none" style:text-align-source="value-type" style:repeat-content="false" fo:wrap-option="wrap" fo:border="0.035cm solid #bdd7e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Excel_20_Built-in_20_Normal">
      <style:table-cell-properties fo:background-color="#fff2cc" style:diagonal-bl-tr="none" style:diagonal-tl-br="none" style:text-align-source="value-type" style:repeat-content="false" fo:wrap-option="wrap" fo:border="0.035cm solid #bdd7ee" style:direction="ltr" style:rotation-angle="0" style:rotation-align="none" style:shrink-to-fit="false" style:vertical-align="top"/>
      <style:paragraph-properties fo:margin-left="0cm" style:writing-mode="page"/>
      <style:text-properties fo:color="#7f4f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Excel_20_Built-in_20_Normal">
      <style:text-properties fo:font-size="8pt" style:font-size-asian="8pt" style:font-size-complex="8pt"/>
    </style:style>
    <style:style style:name="ce7" style:family="table-cell" style:parent-style-name="Excel_20_Built-in_20_Normal">
      <style:table-cell-properties fo:border="none"/>
      <style:text-properties fo:color="#666666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Excel_20_Built-in_20_Normal">
      <style:table-cell-properties fo:border-bottom="0.035cm solid #bdd7ee" style:diagonal-bl-tr="none" style:diagonal-tl-br="none" fo:border-left="none" fo:border-right="none" style:rotation-align="none" fo:border-top="0.035cm solid #bdd7ee"/>
      <style:text-properties fo:font-size="8pt" style:font-size-asian="8pt" style:font-size-complex="8pt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bdd7e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parativa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4" table:default-cell-style-name="ce6"/>
        <table:table-row table:style-name="ro1">
          <table:table-cell table:style-name="ce1" office:value-type="string">
            <text:p>Atributo</text:p>
          </table:table-cell>
          <table:table-cell table:style-name="ce1" office:value-type="string">
            <text:p>ObjetoGemini</text:p>
          </table:table-cell>
          <table:table-cell table:style-name="ce1" office:value-type="string">
            <text:p>ObjetoChatGpt</text:p>
          </table:table-cell>
          <table:table-cell table:style-name="ce1" office:value-type="string">
            <text:p>ObjetoChatClaude</text:p>
          </table:table-cell>
          <table:table-cell table:style-name="ce1" office:value-type="string">
            <text:p>PobActual</text:p>
          </table:table-cell>
          <table:table-cell table:style-name="ce1" office:value-type="string">
            <text:p>PobGemini</text:p>
          </table:table-cell>
          <table:table-cell table:style-name="ce1" office:value-type="string">
            <text:p>PobChatGpt</text:p>
          </table:table-cell>
          <table:table-cell table:style-name="ce1" office:value-type="string">
            <text:p>PobChatClaude</text:p>
          </table:table-cell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── IDENTIDAD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3">
          <table:table-cell table:style-name="ce3" office:value-type="string">
            <text:p>ISIN</text:p>
          </table:table-cell>
          <table:table-cell table:style-name="ce9" office:value-type="string">
            <text:p>Clave primaria para cruce de datos y operaciones.</text:p>
          </table:table-cell>
          <table:table-cell table:style-name="ce9" office:value-type="string">
            <text:p>Identificar unívocamente el fondo.</text:p>
          </table:table-cell>
          <table:table-cell table:style-name="ce9" office:value-type="string">
            <text:p>Clave primaria para todas las operaciones de cruce y referencia.</text:p>
          </table:table-cell>
          <table:table-cell table:number-columns-repeated="4" table:style-name="ce9" office:value-type="string">
            <text:p>LU0123456789 (ISO 6166)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Fund_Name</text:p>
          </table:table-cell>
          <table:table-cell table:number-columns-repeated="2" table:style-name="ce10" office:value-type="string">
            <text:p>No analizado explícitamente.</text:p>
          </table:table-cell>
          <table:table-cell table:style-name="ce10" office:value-type="string">
            <text:p>Referencia legible para operadores y reporting.</text:p>
          </table:table-cell>
          <table:table-cell table:number-columns-repeated="4" table:style-name="ce10" office:value-type="string">
            <text:p>Texto libr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Management_Company</text:p>
          </table:table-cell>
          <table:table-cell table:number-columns-repeated="2" table:style-name="ce9" office:value-type="string">
            <text:p>No analizado explícitamente.</text:p>
          </table:table-cell>
          <table:table-cell table:style-name="ce9" office:value-type="string">
            <text:p>Permitir análisis de concentración por gestora y aplicar reglas de familia.</text:p>
          </table:table-cell>
          <table:table-cell table:number-columns-repeated="4" table:style-name="ce9" office:value-type="string">
            <text:p>Texto libre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fund_family_id</text:p>
          </table:table-cell>
          <table:table-cell table:style-name="ce10" office:value-type="string">
            <text:p>Agrupar por gestora para análisis de concentración (confunde con Family semántico).</text:p>
          </table:table-cell>
          <table:table-cell table:style-name="ce10" office:value-type="string">
            <text:p>Agrupación interna de clases del mismo fondo.</text:p>
          </table:table-cell>
          <table:table-cell table:style-name="ce10" office:value-type="string">
            <text:p>Agrupar clases de un mismo vehículo para deduplicación en P3 y análisis de consistencia.</text:p>
          </table:table-cell>
          <table:table-cell table:style-name="ce10" office:value-type="string">
            <text:p>FAM_000001 … FAM_999999 (clave técnica)</text:p>
          </table:table-cell>
          <table:table-cell table:style-name="ce10" office:value-type="string">
            <text:p>Consolidar: Gestora_ID y Gestora_Nombre (propuesta incorrecta — confunde roles)</text:p>
          </table:table-cell>
          <table:table-cell table:style-name="ce10" office:value-type="string">
            <text:p>FAM_000001 … (clave técnica)</text:p>
          </table:table-cell>
          <table:table-cell table:style-name="ce10" office:value-type="string">
            <text:p>FAM_000001 … FAM_999999 (clave técnica)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Family</text:p>
          </table:table-cell>
          <table:table-cell table:style-name="ce9" office:value-type="string">
            <text:p>Agrupar por gestora (confunde con fund_family_id técnico).</text:p>
          </table:table-cell>
          <table:table-cell table:style-name="ce9" office:value-type="string">
            <text:p>Línea de producto / subgrupo semántico. Propone lista cerrada o eliminar.</text:p>
          </table:table-cell>
          <table:table-cell table:style-name="ce9" office:value-type="string">
            <text:p>Línea de producto semántica dentro de la gestora — complementaria a fund_family_id técnico.</text:p>
          </table:table-cell>
          <table:table-cell table:style-name="ce9" office:value-type="string">
            <text:p>Nombres descriptivos: Retorno Absoluto, Global Equity, Income, etc.</text:p>
          </table:table-cell>
          <table:table-cell table:style-name="ce9" office:value-type="string">
            <text:p>Consolidar con fund_family_id (propuesta incorrecta)</text:p>
          </table:table-cell>
          <table:table-cell table:style-name="ce9" office:value-type="string">
            <text:p>Income, Growth, Balanced, Defensive, Opportunistic</text:p>
          </table:table-cell>
          <table:table-cell table:style-name="ce9" office:value-type="string">
            <text:p>Texto descriptivo libre — nombres de línea de producto de la gestora</text:p>
          </table:table-cell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── CLASIFICACIÓN ESTRUCTURAL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5">
          <table:table-cell table:style-name="ce3" office:value-type="string">
            <text:p>Fund_Nature</text:p>
          </table:table-cell>
          <table:table-cell table:style-name="ce9" office:value-type="string">
            <text:p>Agrupar fondos a primer nivel macroeconómico.</text:p>
          </table:table-cell>
          <table:table-cell table:style-name="ce9" office:value-type="string">
            <text:p>Naturaleza del activo principal del fondo.</text:p>
          </table:table-cell>
          <table:table-cell table:style-name="ce9" office:value-type="string">
            <text:p>Primer nivel de clasificación — determina el bloque de tratamiento y los filtros de P3.</text:p>
          </table:table-cell>
          <table:table-cell table:style-name="ce9" office:value-type="string">
            <text:p>Renta Variable, Mixtos, Renta Fija Flexible, Renta Fija Corto Plazo, Monetario, Alternativo, Restantes, Estructurado</text:p>
          </table:table-cell>
          <table:table-cell table:style-name="ce9" office:value-type="string">
            <text:p>Renta Variable, Renta Fija, Mixto, Alternativo, Monetario</text:p>
          </table:table-cell>
          <table:table-cell table:style-name="ce9" office:value-type="string">
            <text:p>Monetario, RF Corto, RF Flexible, RF Largo, RV, Mixto, Alternativo</text:p>
          </table:table-cell>
          <table:table-cell table:style-name="ce9" office:value-type="string">
            <text:p>Renta Variable, Mixtos, Renta Fija Flexible, Renta Fija Corto Plazo, Monetario, Alternativo, Restantes, Estructurado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Type</text:p>
          </table:table-cell>
          <table:table-cell table:style-name="ce10" office:value-type="string">
            <text:p>Aterrizar el Fund_Nature a un nivel operativo. Evitar solapamiento con Fund_Nature.</text:p>
          </table:table-cell>
          <table:table-cell table:style-name="ce10" office:value-type="string">
            <text:p>Estructura del vehículo: Allocation, Absolute Return, Equity, Fixed Income, Multi-Asset, Index, ETF, Fund of Funds.</text:p>
          </table:table-cell>
          <table:table-cell table:style-name="ce10" office:value-type="string">
            <text:p>Segundo nivel de clasificación — refina Fund_Nature para comparabilidad intra-categoría.</text:p>
          </table:table-cell>
          <table:table-cell table:style-name="ce10" office:value-type="string">
            <text:p>Equity, Fixed Income, Balanced, Absolute Return, Index, ETF, Fund of Funds, Commodity, Real Estate, Multi-Asset, Money Market</text:p>
          </table:table-cell>
          <table:table-cell table:style-name="ce10" office:value-type="string">
            <text:p>Revisar diccionario interno para evitar redundancias con Fund_Nature</text:p>
          </table:table-cell>
          <table:table-cell table:style-name="ce10" office:value-type="string">
            <text:p>Allocation, Absolute Return, Equity, Fixed Income, Multi-Asset, Index, ETF, Fund of Funds</text:p>
          </table:table-cell>
          <table:table-cell table:style-name="ce10" office:value-type="string">
            <text:p>Equity, Fixed Income, Balanced, Absolute Return, Index, ETF, Fund of Funds, Commodity, Real Estate, Multi-Asset, Money Market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ubtype</text:p>
          </table:table-cell>
          <table:table-cell table:style-name="ce9" office:value-type="string">
            <text:p>Aterrizar el Fund_Nature a un tercer nivel. Riesgo de solapamiento.</text:p>
          </table:table-cell>
          <table:table-cell table:style-name="ce9" office:value-type="string">
            <text:p>Refinamiento adicional de Type. Propone eliminar.</text:p>
          </table:table-cell>
          <table:table-cell table:style-name="ce9" office:value-type="string">
            <text:p>Tercer nivel opcional — solo para Alternativos donde la especificidad estructural es alta.</text:p>
          </table:table-cell>
          <table:table-cell table:style-name="ce9" office:value-type="string">
            <text:p>Uso excepcional — valores libres por bloque</text:p>
          </table:table-cell>
          <table:table-cell table:style-name="ce9" office:value-type="string">
            <text:p>Revisar; riesgo de redundancia</text:p>
          </table:table-cell>
          <table:table-cell table:style-name="ce9" office:value-type="string">
            <text:p>Eliminar</text:p>
          </table:table-cell>
          <table:table-cell table:style-name="ce9" office:value-type="string">
            <text:p>Mantener solo para Alternativos (Long/Short, Market Neutral, etc.)</text:p>
          </table:table-cell>
          <table:table-cell office:value-type="string">
            <text:p>Actual</text:p>
          </table:table-cell>
          <table:table-cell office:value-type="string">
            <text:p>Solo Aternativos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8" table:number-rows-spanned="1">
            <text:p>── PERFIL DE RIESGO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3">
          <table:table-cell table:style-name="ce3" office:value-type="string">
            <text:p>SRRI</text:p>
          </table:table-cell>
          <table:table-cell table:style-name="ce9" office:value-type="string">
            <text:p>Estandarizar el riesgo para el inversor minorista (UCITS).</text:p>
          </table:table-cell>
          <table:table-cell table:style-name="ce9" office:value-type="string">
            <text:p>Indicador de riesgo KIID regulatorio.</text:p>
          </table:table-cell>
          <table:table-cell table:style-name="ce9" office:value-type="string">
            <text:p>Indicador regulatorio obligatorio UCITS. Base primaria para el perfil de riesgo y filtros de P3.</text:p>
          </table:table-cell>
          <table:table-cell table:style-name="ce9" office:value-type="string">
            <text:p>1, 2, 3, 4, 5, 6, 7</text:p>
          </table:table-cell>
          <table:table-cell table:style-name="ce9" office:value-type="string">
            <text:p>SRI: 1, 2, 3, 4, 5, 6, 7 (evolucionar a PRIIPs SRI)</text:p>
          </table:table-cell>
          <table:table-cell table:number-columns-repeated="2" table:style-name="ce9" office:value-type="string">
            <text:p>1, 2, 3, 4, 5, 6, 7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Profile</text:p>
          </table:table-cell>
          <table:table-cell table:style-name="ce10" office:value-type="string">
            <text:p>Clasificación rápida para adecuación MiFID. Derivado paramétrico de SRRI.</text:p>
          </table:table-cell>
          <table:table-cell table:style-name="ce10" office:value-type="string">
            <text:p>Perfil de riesgo genérico derivado del SRRI.</text:p>
          </table:table-cell>
          <table:table-cell table:style-name="ce10" office:value-type="string">
            <text:p>Segmentación operativa del riesgo para filtros de P3 y presentación al usuario final.</text:p>
          </table:table-cell>
          <table:table-cell table:style-name="ce10" office:value-type="string">
            <text:p>Conservador, Moderado, Dinámico</text:p>
          </table:table-cell>
          <table:table-cell table:style-name="ce10" office:value-type="string">
            <text:p>Conservador, Moderado, Dinámico, Agresivo</text:p>
          </table:table-cell>
          <table:table-cell table:style-name="ce10" office:value-type="string">
            <text:p>Conservador, Moderado, Dinámico</text:p>
          </table:table-cell>
          <table:table-cell table:style-name="ce10" office:value-type="string">
            <text:p>Conservador, Moderado, Dinámico, Agresivo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Recommended_Holding_Period</text:p>
          </table:table-cell>
          <table:table-cell table:style-name="ce9" office:value-type="string">
            <text:p>Validar idoneidad y penalizar salidas tempranas en P3. Normalizar a entero numérico.</text:p>
          </table:table-cell>
          <table:table-cell table:style-name="ce9" office:value-type="string">
            <text:p>Horizonte temporal recomendado por el KIID.</text:p>
          </table:table-cell>
          <table:table-cell table:style-name="ce9" office:value-type="string">
            <text:p>Filtro de adecuación del fondo al horizonte temporal del inversor en P3.</text:p>
          </table:table-cell>
          <table:table-cell table:style-name="ce9" office:value-type="string">
            <text:p>Entero 1-10 (años)</text:p>
          </table:table-cell>
          <table:table-cell table:style-name="ce9" office:value-type="string">
            <text:p>Numérico entero (1, 3, 5, 7 años)</text:p>
          </table:table-cell>
          <table:table-cell table:style-name="ce9" office:value-type="string">
            <text:p>Sin modificación</text:p>
          </table:table-cell>
          <table:table-cell table:style-name="ce9" office:value-type="string">
            <text:p>Entero en años. NULL solo si el KIID no lo declara.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8" table:number-rows-spanned="1">
            <text:p>── EXPOSICIÓN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5">
          <table:table-cell table:style-name="ce3" office:value-type="string">
            <text:p>Geography</text:p>
          </table:table-cell>
          <table:table-cell table:style-name="ce9" office:value-type="string">
            <text:p>Medir riesgo país/región. Basarse en cartera real, no solo en nombre del fondo.</text:p>
          </table:table-cell>
          <table:table-cell table:style-name="ce9" office:value-type="string">
            <text:p>Zona geográfica de inversión.</text:p>
          </table:table-cell>
          <table:table-cell table:style-name="ce9" office:value-type="string">
            <text:p>Filtrar y agrupar fondos por zona para diversificación geográfica en P3. Completar desde Benchmark_Declared cuando Geography=NULL.</text:p>
          </table:table-cell>
          <table:table-cell table:style-name="ce9" office:value-type="string">
            <text:p>Global, Europa, EEUU, Asia, Emergentes, China, Japón, India, Latinoamérica, Europa del Este, Rusia</text:p>
          </table:table-cell>
          <table:table-cell table:style-name="ce9" office:value-type="string">
            <text:p>Global, Norteamérica, Europa, Mercados Emergentes, Asia-Pacífico, Latinoamérica, Japón</text:p>
          </table:table-cell>
          <table:table-cell table:style-name="ce9" office:value-type="string">
            <text:p>Global, Europa, USA, Norteamérica, Emergentes, Asia, Japón, Latinoamérica, África, Oriente Medio</text:p>
          </table:table-cell>
          <table:table-cell table:style-name="ce9" office:value-type="string">
            <text:p>Global, Europa, EEUU, Asia-Pacífico, Emergentes, China, Japón, India, Latinoamérica, Europa del Este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Investment_Universe</text:p>
          </table:table-cell>
          <table:table-cell table:style-name="ce10" office:value-type="string">
            <text:p>Diferenciar fondos nicho de generalistas: Global, Regional, Sector, Temático.</text:p>
          </table:table-cell>
          <table:table-cell table:style-name="ce10" office:value-type="string">
            <text:p>Universo de activos: Global Diversificado, RV Desarrollada, RV Emergente, RF Gobierno, RF Corporativa, High Yield, Mixto Global, Alternativos.</text:p>
          </table:table-cell>
          <table:table-cell table:style-name="ce10" office:value-type="string">
            <text:p>Ámbito geográfico del mandato — dimensión geográfica pura. Valores Sector y Thematic se trasladan a Investment_Focus (nuevo atributo v17).</text:p>
          </table:table-cell>
          <table:table-cell table:style-name="ce10" office:value-type="string">
            <text:p>Global, Regional, Country, Sector, Thematic, Liquidity</text:p>
          </table:table-cell>
          <table:table-cell table:style-name="ce10" office:value-type="string">
            <text:p>Global, Regional, Sector, Temático</text:p>
          </table:table-cell>
          <table:table-cell table:style-name="ce10" office:value-type="string">
            <text:p>Global Diversificado, Renta Variable Desarrollada, Renta Variable Emergente, Renta Fija Gobierno, Renta Fija Corporativa, High Yield, Mixto Global, Alternativos</text:p>
          </table:table-cell>
          <table:table-cell table:style-name="ce10" office:value-type="string">
            <text:p>Global, Regional, Country, Liquidity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Investment_Focus</text:p>
          </table:table-cell>
          <table:table-cell table:number-columns-repeated="2" table:style-name="ce11" office:value-type="string">
            <text:p>No propuesto.</text:p>
          </table:table-cell>
          <table:table-cell table:style-name="ce11" office:value-type="string">
            <text:p>Segunda dimensión ortogonal a Investment_Universe: tipo de exposición (amplio / sectorial / temático). Permite cruzar ámbito geográfico con tipo de exposición sin colapsarlos en un único campo.</text:p>
          </table:table-cell>
          <table:table-cell table:style-name="ce11" office:value-type="string">
            <text:p>No existe — NUEVO en v17</text:p>
          </table:table-cell>
          <table:table-cell table:number-columns-repeated="2" table:style-name="ce11" office:value-type="string">
            <text:p>No existe</text:p>
          </table:table-cell>
          <table:table-cell table:style-name="ce11" office:value-type="string">
            <text:p>Broad, Sector, Thematic</text:p>
          </table:table-cell>
          <table:table-cell table:number-columns-repeated="1016"/>
        </table:table-row>
        <table:table-row table:style-name="ro7">
          <table:table-cell table:style-name="ce4" office:value-type="string">
            <text:p>Theme</text:p>
          </table:table-cell>
          <table:table-cell table:style-name="ce10" office:value-type="string">
            <text:p>Identificar tendencias seculares. Fondos no temáticos → 'Core/General'.</text:p>
          </table:table-cell>
          <table:table-cell table:style-name="ce10" office:value-type="string">
            <text:p>Temática de inversión. Lista muy restringida.</text:p>
          </table:table-cell>
          <table:table-cell table:style-name="ce10" office:value-type="string">
            <text:p>Identificar fondos temáticos para agrupación y scoring en P3. Fondos no temáticos → 'Core/General'. NULL reservado para 'no procesado'.</text:p>
          </table:table-cell>
          <table:table-cell table:style-name="ce10" office:value-type="string">
            <text:p>Technology, Artificial Intelligence, Digital, Robotics, Cybersecurity, Climate / Clean Energy, Energy, Healthcare / MedTech, Healthcare, Biotechnology, Water, Gold, Mining, Infrastructure, Real Estate, Financials, Consumer Brands, Consumer / Food &amp; Beverage, Silver Economy, Megatrends, Insurance, Inflación</text:p>
          </table:table-cell>
          <table:table-cell table:style-name="ce10" office:value-type="string">
            <text:p>Core/General, Tecnología, Salud, Ecología, Demografía, Infraestructuras, Inmobiliario, Megatendencias</text:p>
          </table:table-cell>
          <table:table-cell table:style-name="ce10" office:value-type="string">
            <text:p>Tecnología, Salud, Energía, ESG, Infraestructura, Consumo, Fintech, Agua, Oro, Clima</text:p>
          </table:table-cell>
          <table:table-cell table:style-name="ce10" office:value-type="string">
            <text:p>Core/General, Technology, Artificial Intelligence, Digital, Robotics, Cybersecurity, Climate / Clean Energy, Energy, Healthcare / MedTech, Healthcare, Biotechnology, Water, Gold, Mining, Infrastructure, Real Estate, Financials, Consumer Brands, Consumer / Food &amp; Beverage, Silver Economy, Megatrends, Insurance, Inflación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ket_Cap_Focus</text:p>
          </table:table-cell>
          <table:table-cell table:style-name="ce9" office:value-type="string">
            <text:p>Medir riesgo de liquidez y potencial de crecimiento. Aplicar solo a RV.</text:p>
          </table:table-cell>
          <table:table-cell table:style-name="ce9" office:value-type="string">
            <text:p>Segmento de capitalización bursátil.</text:p>
          </table:table-cell>
          <table:table-cell table:style-name="ce9" office:value-type="string">
            <text:p>Filtrar fondos RV por capitalización para diversificación de tamaño en P3. Solo informar para Fund_Nature=Renta Variable.</text:p>
          </table:table-cell>
          <table:table-cell table:style-name="ce9" office:value-type="string">
            <text:p>Large Cap, Mid Cap, Small Cap, SMID Cap</text:p>
          </table:table-cell>
          <table:table-cell table:style-name="ce9" office:value-type="string">
            <text:p>Large Cap, Mid Cap, Small Cap, Multi Cap</text:p>
          </table:table-cell>
          <table:table-cell table:style-name="ce9" office:value-type="string">
            <text:p>Large Cap, Mid Cap, Small Cap, All Cap</text:p>
          </table:table-cell>
          <table:table-cell table:style-name="ce9" office:value-type="string">
            <text:p>Large Cap, Mid Cap, Small Cap, SMID Cap, Multi Cap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Sector_Focus</text:p>
          </table:table-cell>
          <table:table-cell table:style-name="ce10" office:value-type="string">
            <text:p>Medir riesgo sectorial. Obligatorio si Investment_Universe='Sector'. Nomenclatura GICS.</text:p>
          </table:table-cell>
          <table:table-cell table:style-name="ce10" office:value-type="string">
            <text:p>Sector de actividad económica del fondo.</text:p>
          </table:table-cell>
          <table:table-cell table:style-name="ce10" office:value-type="string">
            <text:p>Filtrar fondos sectoriales bajo nomenclatura GICS. Obligatorio si Investment_Focus='Sector'. Derivado del Theme.</text:p>
          </table:table-cell>
          <table:table-cell table:style-name="ce10" office:value-type="string">
            <text:p>Technology &amp; Innovation, Healthcare &amp; Life Sciences, Energy &amp; Resources, Real Assets, Financial Services, Consumer, Materials &amp; Mining, Utilities &amp; Environment</text:p>
          </table:table-cell>
          <table:table-cell table:style-name="ce10" office:value-type="string">
            <text:p>Tecnología, Salud, Energía, Finanzas, Consumo Discrecional, Consumo Básico, Materiales, Industria, Telecomunicaciones, Servicios Públicos, Inmobiliario</text:p>
          </table:table-cell>
          <table:table-cell table:style-name="ce10" office:value-type="string">
            <text:p>Tecnología, Financiero, Salud, Energía, Industrial, Consumo, Materiales, Utilities, Telecomunicaciones, Inmobiliario</text:p>
          </table:table-cell>
          <table:table-cell table:style-name="ce10" office:value-type="string">
            <text:p>Tecnología e Innovación, Salud y Ciencias de la Vida, Energía y Recursos, Real Assets, Servicios Financieros, Consumo, Materiales y Minería, Utilities y Medio Ambiente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Credit_Quality</text:p>
          </table:table-cell>
          <table:table-cell table:style-name="ce11" office:value-type="string">
            <text:p>No propuesto explícitamente.</text:p>
          </table:table-cell>
          <table:table-cell table:style-name="ce11" office:value-type="string">
            <text:p>Calidad crediticia: IG / HY / Mixed. Propuesto como nuevo atributo.</text:p>
          </table:table-cell>
          <table:table-cell table:style-name="ce11" office:value-type="string">
            <text:p>Filtro de riesgo crediticio en P3 para carteras conservadoras. Diferencia RF solvente de alto rendimiento.</text:p>
          </table:table-cell>
          <table:table-cell table:style-name="ce11" office:value-type="string">
            <text:p>No existe — NUEVO propuesto</text:p>
          </table:table-cell>
          <table:table-cell table:style-name="ce11" office:value-type="string">
            <text:p>No existe</text:p>
          </table:table-cell>
          <table:table-cell table:style-name="ce11" office:value-type="string">
            <text:p>Investment Grade, High Yield, Mixto</text:p>
          </table:table-cell>
          <table:table-cell table:style-name="ce11" office:value-type="string">
            <text:p>Investment Grade, High Yield, Mixed, No aplica</text:p>
          </table:table-cell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── ESTRATEGIA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5">
          <table:table-cell table:style-name="ce3" office:value-type="string">
            <text:p>Style_Profile</text:p>
          </table:table-cell>
          <table:table-cell table:style-name="ce9" office:value-type="string">
            <text:p>Analizar comportamiento en distintos ciclos. Solo obligatorio para RV. Value, Growth, Blend, Momentum, Yield.</text:p>
          </table:table-cell>
          <table:table-cell table:style-name="ce9" office:value-type="string">
            <text:p>Estilo de gestión. Propone Strategic, Tactical, Active, Passive (diferente taxonomía — solapan con Strategy).</text:p>
          </table:table-cell>
          <table:table-cell table:style-name="ce9" office:value-type="string">
            <text:p>Diversificar estilos en cartera RV de P3. Solo informar para Fund_Nature=Renta Variable. NULL válido para el resto.</text:p>
          </table:table-cell>
          <table:table-cell table:style-name="ce9" office:value-type="string">
            <text:p>Value, Growth, Blend, Income, Momentum, Yield</text:p>
          </table:table-cell>
          <table:table-cell table:style-name="ce9" office:value-type="string">
            <text:p>Value, Growth, Blend, Momentum, Yield</text:p>
          </table:table-cell>
          <table:table-cell table:style-name="ce9" office:value-type="string">
            <text:p>Strategic, Tactical, Passive, Active</text:p>
          </table:table-cell>
          <table:table-cell table:style-name="ce9" office:value-type="string">
            <text:p>Value, Growth, Blend, Income, Yield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Exposure_Bias</text:p>
          </table:table-cell>
          <table:table-cell table:style-name="ce10" office:value-type="string">
            <text:p>Identificar riesgos de concentración persistente. Propone redefinir: Sesgo Calidad, Cíclico, Defensivo, Retorno Absoluto, Sin Sesgo.</text:p>
          </table:table-cell>
          <table:table-cell table:style-name="ce10" office:value-type="string">
            <text:p>Sesgo estructural de exposición de mercado.</text:p>
          </table:table-cell>
          <table:table-cell table:style-name="ce10" office:value-type="string">
            <text:p>Identificar fondos con sesgos estructurales para construcción de carteras defensivas en P3.</text:p>
          </table:table-cell>
          <table:table-cell table:style-name="ce10" office:value-type="string">
            <text:p>Long Only, Long/Short, Market Neutral, Directional, Credit Bias, Macro, Commodity</text:p>
          </table:table-cell>
          <table:table-cell table:style-name="ce10" office:value-type="string">
            <text:p>Sesgo Calidad, Sesgo Cíclico, Sesgo Defensivo, Sesgo Retorno Absoluto, Sin Sesgo</text:p>
          </table:table-cell>
          <table:table-cell table:style-name="ce10" office:value-type="string">
            <text:p>Long Only, Long/Short, Market Neutral, Directional, Credit Bias, Macro</text:p>
          </table:table-cell>
          <table:table-cell table:style-name="ce10" office:value-type="string">
            <text:p>Long Only, Long/Short, Market Neutral, Directional, Credit Bias, Macro, Commodity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trategy</text:p>
          </table:table-cell>
          <table:table-cell table:style-name="ce9" office:value-type="string">
            <text:p>Complementar al Type con la táctica empleada.</text:p>
          </table:table-cell>
          <table:table-cell table:style-name="ce9" office:value-type="string">
            <text:p>Tipo de gestión: Active, Passive, Index, ETF, Quant, Systematic.</text:p>
          </table:table-cell>
          <table:table-cell table:style-name="ce9" office:value-type="string">
            <text:p>Distinguir gestión activa de pasiva/indexada para evaluación de valor añadido en P3.</text:p>
          </table:table-cell>
          <table:table-cell table:style-name="ce9" office:value-type="string">
            <text:p>Active, Passive, Index, ETF, Quant, Systematic</text:p>
          </table:table-cell>
          <table:table-cell table:style-name="ce9" office:value-type="string">
            <text:p>Sin valores definidos</text:p>
          </table:table-cell>
          <table:table-cell table:style-name="ce9" office:value-type="string">
            <text:p>Lista cerrada (Active, Passive, Index, ETF)</text:p>
          </table:table-cell>
          <table:table-cell table:style-name="ce9" office:value-type="string">
            <text:p>Active, Passive, Index, Quant/Systematic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8" table:number-rows-spanned="1">
            <text:p>── ESTRUCTURA DEL PRODUCTO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3">
          <table:table-cell table:style-name="ce3" office:value-type="string">
            <text:p>Fund_Currency</text:p>
          </table:table-cell>
          <table:table-cell table:style-name="ce9" office:value-type="string">
            <text:p>Clave para cruzar con sistema de liquidación. Divisas ISO estándar.</text:p>
          </table:table-cell>
          <table:table-cell table:style-name="ce9" office:value-type="string">
            <text:p>Divisa base del fondo.</text:p>
          </table:table-cell>
          <table:table-cell table:style-name="ce9" office:value-type="string">
            <text:p>Base de cálculo de retornos en divisa local y gestión del riesgo divisa en P2/P3.</text:p>
          </table:table-cell>
          <table:table-cell table:style-name="ce9" office:value-type="string">
            <text:p>EUR, USD, GBP, CHF, JPY, CNH</text:p>
          </table:table-cell>
          <table:table-cell table:style-name="ce9" office:value-type="string">
            <text:p>EUR, USD, GBP, JPY, CHF, CAD, AUD, NOK, SEK</text:p>
          </table:table-cell>
          <table:table-cell table:style-name="ce9" office:value-type="string">
            <text:p>EUR, USD, GBP, CHF, JPY</text:p>
          </table:table-cell>
          <table:table-cell table:style-name="ce9" office:value-type="string">
            <text:p>EUR, USD, GBP, CHF, JPY, CNH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Portfolio_Currency</text:p>
          </table:table-cell>
          <table:table-cell table:style-name="ce10" office:value-type="string">
            <text:p>Medir el riesgo divisa real de los activos en cartera.</text:p>
          </table:table-cell>
          <table:table-cell table:style-name="ce10" office:value-type="string">
            <text:p>Divisa de los activos en cartera. Propone alinear con Fund_Currency o eliminar.</text:p>
          </table:table-cell>
          <table:table-cell table:style-name="ce10" office:value-type="string">
            <text:p>Riesgo divisa intrínseco. Cobertura 1.3% — mantener en esquema, excluir de P3. No invertir en mejorar cobertura.</text:p>
          </table:table-cell>
          <table:table-cell table:style-name="ce10" office:value-type="string">
            <text:p>USD, EUR (98.66% NULL)</text:p>
          </table:table-cell>
          <table:table-cell table:style-name="ce10" office:value-type="string">
            <text:p>EUR, USD, GBP, JPY, CHF, CAD, AUD, NOK, SEK</text:p>
          </table:table-cell>
          <table:table-cell table:style-name="ce10" office:value-type="string">
            <text:p>Alinear con Fund_Currency o eliminar</text:p>
          </table:table-cell>
          <table:table-cell table:style-name="ce10" office:value-type="string">
            <text:p>EUR, USD, GBP, CHF, JPY (98.66% NULL — no implementado en P3)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Hedging_Policy</text:p>
          </table:table-cell>
          <table:table-cell table:style-name="ce9" office:value-type="string">
            <text:p>Identificar si el fondo neutraliza riesgos externos. Totalmente cubierto, Parcialmente cubierto, No cubierto.</text:p>
          </table:table-cell>
          <table:table-cell table:style-name="ce9" office:value-type="string">
            <text:p>Política de cobertura divisa: Hedged, Unhedged.</text:p>
          </table:table-cell>
          <table:table-cell table:style-name="ce9" office:value-type="string">
            <text:p>Evaluar riesgo divisa real del fondo para construcción de carteras en P3. Ampliar a tres valores.</text:p>
          </table:table-cell>
          <table:table-cell table:style-name="ce9" office:value-type="string">
            <text:p>Hedged, Unhedged, Partially Hedged</text:p>
          </table:table-cell>
          <table:table-cell table:style-name="ce9" office:value-type="string">
            <text:p>Totalmente cubierto, Parcialmente cubierto, No cubierto</text:p>
          </table:table-cell>
          <table:table-cell table:style-name="ce9" office:value-type="string">
            <text:p>Hedged, Unhedged</text:p>
          </table:table-cell>
          <table:table-cell table:style-name="ce9" office:value-type="string">
            <text:p>Totalmente Cubierto, Parcialmente Cubierto, No Cubierto</text:p>
          </table:table-cell>
          <table:table-cell office:value-type="string">
            <text:p>Gemini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Currency_Hedged</text:p>
          </table:table-cell>
          <table:table-cell table:style-name="ce10" office:value-type="string">
            <text:p>Evitar que el inversor asuma volatilidad cambiaria no deseada. Yes / No.</text:p>
          </table:table-cell>
          <table:table-cell table:style-name="ce10" office:value-type="string">
            <text:p>Indicador rápido de cobertura de divisa. Sin modificación.</text:p>
          </table:table-cell>
          <table:table-cell table:style-name="ce10" office:value-type="string">
            <text:p>Señal rápida de cobertura desde el nombre del fondo. Complementaria a Hedging_Policy. Deprecar cuando Hedging_Policy alcance cobertura suficiente.</text:p>
          </table:table-cell>
          <table:table-cell table:number-columns-repeated="4" table:style-name="ce10" office:value-type="string">
            <text:p>Yes, No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Replication_Method</text:p>
          </table:table-cell>
          <table:table-cell table:style-name="ce9" office:value-type="string">
            <text:p>Evaluar riesgo de contrapartida (mayor en sintética). Physical, Synthetic, Sampling.</text:p>
          </table:table-cell>
          <table:table-cell table:style-name="ce9" office:value-type="string">
            <text:p>Método de réplica del índice. Physical, Synthetic.</text:p>
          </table:table-cell>
          <table:table-cell table:style-name="ce9" office:value-type="string">
            <text:p>Evaluar riesgo de contraparte y diferencias de tracking en fondos pasivos.</text:p>
          </table:table-cell>
          <table:table-cell table:style-name="ce9" office:value-type="string">
            <text:p>Physical, Synthetic, Sampling</text:p>
          </table:table-cell>
          <table:table-cell table:style-name="ce9" office:value-type="string">
            <text:p>Physical, Synthetic, Sampling</text:p>
          </table:table-cell>
          <table:table-cell table:style-name="ce9" office:value-type="string">
            <text:p>Physical, Synthetic</text:p>
          </table:table-cell>
          <table:table-cell table:style-name="ce9" office:value-type="string">
            <text:p>Physical, Synthetic, Sampling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Derivatives_Usage</text:p>
          </table:table-cell>
          <table:table-cell table:style-name="ce10" office:value-type="string">
            <text:p>Diferenciar cobertura de inversión/apalancamiento. Hedging, Investment, Both, No Usage.</text:p>
          </table:table-cell>
          <table:table-cell table:style-name="ce10" office:value-type="string">
            <text:p>Uso de derivados. Yes, No, Limited.</text:p>
          </table:table-cell>
          <table:table-cell table:style-name="ce10" office:value-type="string">
            <text:p>Evaluar riesgo adicional por uso de derivados y apalancamiento implícito.</text:p>
          </table:table-cell>
          <table:table-cell table:style-name="ce10" office:value-type="string">
            <text:p>Yes, No, Hedging Only, Limited</text:p>
          </table:table-cell>
          <table:table-cell table:style-name="ce10" office:value-type="string">
            <text:p>Hedging, Investment, Both, No Usage</text:p>
          </table:table-cell>
          <table:table-cell table:style-name="ce10" office:value-type="string">
            <text:p>Yes, No, Limited</text:p>
          </table:table-cell>
          <table:table-cell table:style-name="ce10" office:value-type="string">
            <text:p>Hedging Only, Investment, Both, No Usage</text:p>
          </table:table-cell>
          <table:table-cell office:value-type="string">
            <text:p>Gemini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Leverage_Used</text:p>
          </table:table-cell>
          <table:table-cell table:style-name="ce9" office:value-type="string">
            <text:p>Medir amplificación del riesgo. Propone % de apalancamiento en lugar de booleano.</text:p>
          </table:table-cell>
          <table:table-cell table:style-name="ce9" office:value-type="string">
            <text:p>Uso de apalancamiento. Booleano: Yes, No.</text:p>
          </table:table-cell>
          <table:table-cell table:style-name="ce9" office:value-type="string">
            <text:p>Flag de riesgo estructural elevado para exclusión en carteras defensivas de P3. Booleano suficiente en P1 — cuantificación va a P2.</text:p>
          </table:table-cell>
          <table:table-cell table:style-name="ce9" office:value-type="string">
            <text:p>Yes, No</text:p>
          </table:table-cell>
          <table:table-cell table:style-name="ce9" office:value-type="string">
            <text:p>% de apalancamiento (0%, 50%, 200%...)</text:p>
          </table:table-cell>
          <table:table-cell table:number-columns-repeated="2" table:style-name="ce9" office:value-type="string">
            <text:p>Yes, No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Liquidity_Profile</text:p>
          </table:table-cell>
          <table:table-cell table:style-name="ce10" office:value-type="string">
            <text:p>Evaluar riesgo de mismatch entre activos y salidas de flujo. Frecuencia operativa real.</text:p>
          </table:table-cell>
          <table:table-cell table:style-name="ce10" office:value-type="string">
            <text:p>Nivel de liquidez: Alta, Media, Baja (abstracto).</text:p>
          </table:table-cell>
          <table:table-cell table:style-name="ce10" office:value-type="string">
            <text:p>Filtro de adecuación operativa del fondo a las necesidades del inversor.</text:p>
          </table:table-cell>
          <table:table-cell table:style-name="ce10" office:value-type="string">
            <text:p>Daily, Weekly, Monthly, Quarterly</text:p>
          </table:table-cell>
          <table:table-cell table:style-name="ce10" office:value-type="string">
            <text:p>Diaria, Semanal, Quincenal, Mensual, Trimestral</text:p>
          </table:table-cell>
          <table:table-cell table:style-name="ce10" office:value-type="string">
            <text:p>Alta, Media, Baja</text:p>
          </table:table-cell>
          <table:table-cell table:style-name="ce10" office:value-type="string">
            <text:p>Diaria, Semanal, Quincenal, Mensual, Trimestral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Accumulation_Policy</text:p>
          </table:table-cell>
          <table:table-cell table:style-name="ce9" office:value-type="string">
            <text:p>Impacta drásticamente en el cálculo de rentabilidad (P2/P3).</text:p>
          </table:table-cell>
          <table:table-cell table:style-name="ce9" office:value-type="string">
            <text:p>Política de distribución de rentas.</text:p>
          </table:table-cell>
          <table:table-cell table:style-name="ce9" office:value-type="string">
            <text:p>Diferenciar clases acumulativas de distributivas para comparabilidad de retornos en P2.</text:p>
          </table:table-cell>
          <table:table-cell table:style-name="ce9" office:value-type="string">
            <text:p>Accumulation, Distribution</text:p>
          </table:table-cell>
          <table:table-cell table:style-name="ce9" office:value-type="string">
            <text:p>Acumulación, Distribución</text:p>
          </table:table-cell>
          <table:table-cell table:style-name="ce9" office:value-type="string">
            <text:p>Acc, Dist</text:p>
          </table:table-cell>
          <table:table-cell table:style-name="ce9" office:value-type="string">
            <text:p>Acumulación, Distribución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Distribution_Frequency</text:p>
          </table:table-cell>
          <table:table-cell table:style-name="ce10" office:value-type="string">
            <text:p>Planificación de flujos de caja para el inversor. Solo si Accumulation_Policy=Distribución.</text:p>
          </table:table-cell>
          <table:table-cell table:style-name="ce10" office:value-type="string">
            <text:p>Periodicidad de distribución de rentas.</text:p>
          </table:table-cell>
          <table:table-cell table:style-name="ce10" office:value-type="string">
            <text:p>Complementar Accumulation_Policy para análisis de rentas periódicas. Solo informar si Accumulation_Policy=Distribución.</text:p>
          </table:table-cell>
          <table:table-cell table:style-name="ce10" office:value-type="string">
            <text:p>Monthly, Quarterly, Semi-Annual, Annual</text:p>
          </table:table-cell>
          <table:table-cell table:style-name="ce10" office:value-type="string">
            <text:p>Anual, Semestral, Trimestral, Mensual</text:p>
          </table:table-cell>
          <table:table-cell table:style-name="ce10" office:value-type="string">
            <text:p>Lista cerrada</text:p>
          </table:table-cell>
          <table:table-cell table:style-name="ce10" office:value-type="string">
            <text:p>Mensual, Trimestral, Semestral, Anual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8" table:number-rows-spanned="1">
            <text:p>── COSTES Y COMISIONES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3">
          <table:table-cell table:style-name="ce3" office:value-type="string">
            <text:p>Ongoing_Charge</text:p>
          </table:table-cell>
          <table:table-cell table:style-name="ce9" office:value-type="string">
            <text:p>No analizado explícitamente — Gemini lo propone como nuevo (TER).</text:p>
          </table:table-cell>
          <table:table-cell table:style-name="ce9" office:value-type="string">
            <text:p>No analizado explícitamente — ChatGPT lo propone como nuevo (TER).</text:p>
          </table:table-cell>
          <table:table-cell table:style-name="ce9" office:value-type="string">
            <text:p>Indicador crítico de coste estructural. Impacta directamente la rentabilidad neta. Filtro y penalización en scoring P3.</text:p>
          </table:table-cell>
          <table:table-cell table:style-name="ce9" office:value-type="string">
            <text:p>Numérico decimal [0.0006, 0.092] — 26.2% NULL</text:p>
          </table:table-cell>
          <table:table-cell table:style-name="ce9" office:value-type="string">
            <text:p>Nuevo propuesto: Ongoing_Charges (TER) — Valores numéricos decimales</text:p>
          </table:table-cell>
          <table:table-cell table:style-name="ce9" office:value-type="string">
            <text:p>Nuevo propuesto: Ongoing_Charges (TER) — Valores numéricos decimales</text:p>
          </table:table-cell>
          <table:table-cell table:style-name="ce9" office:value-type="string">
            <text:p>Numérico decimal. Ya existente — prioridad de cobertura.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Entry_Fee_Pct</text:p>
          </table:table-cell>
          <table:table-cell table:style-name="ce10" office:value-type="string">
            <text:p>Evaluar fricción de capital al operar. Propone registrar coste real aplicado, no solo máximo legal.</text:p>
          </table:table-cell>
          <table:table-cell table:style-name="ce10" office:value-type="string">
            <text:p>Comisión de entrada. Sin modificación propuesta.</text:p>
          </table:table-cell>
          <table:table-cell table:style-name="ce10" office:value-type="string">
            <text:p>Coste de rotación en P3. Material: alcanza 6%. Añadir Fee_Known_Flag para distinguir 'sin comisión (0%)' de 'no extraído (NULL)'.</text:p>
          </table:table-cell>
          <table:table-cell table:style-name="ce10" office:value-type="string">
            <text:p>Numérico decimal [0.004, 0.06] — 64.8% NULL</text:p>
          </table:table-cell>
          <table:table-cell table:style-name="ce10" office:value-type="string">
            <text:p>Coste real aplicado (descuentos institucionales), numérico decimal</text:p>
          </table:table-cell>
          <table:table-cell table:style-name="ce10" office:value-type="string">
            <text:p>Sin modificación</text:p>
          </table:table-cell>
          <table:table-cell table:style-name="ce10" office:value-type="string">
            <text:p>Numérico decimal. 0.0 si KIID declara sin comisión, NULL si no extraído.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Exit_Fee_Pct</text:p>
          </table:table-cell>
          <table:table-cell table:style-name="ce9" office:value-type="string">
            <text:p>Evaluar fricción de capital al operar.</text:p>
          </table:table-cell>
          <table:table-cell table:style-name="ce9" office:value-type="string">
            <text:p>Comisión de salida. Sin modificación propuesta.</text:p>
          </table:table-cell>
          <table:table-cell table:style-name="ce9" office:value-type="string">
            <text:p>Coste de rotación en P3.</text:p>
          </table:table-cell>
          <table:table-cell table:style-name="ce9" office:value-type="string">
            <text:p>Numérico decimal [0.0, 0.05] — 39.8% NULL</text:p>
          </table:table-cell>
          <table:table-cell table:style-name="ce9" office:value-type="string">
            <text:p>Coste real aplicado, numérico decimal</text:p>
          </table:table-cell>
          <table:table-cell table:style-name="ce9" office:value-type="string">
            <text:p>Sin modificación</text:p>
          </table:table-cell>
          <table:table-cell table:style-name="ce9" office:value-type="string">
            <text:p>Numérico decimal. 0.0 si KIID declara sin comisión, NULL si no extraído.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Fee_Known_Flag</text:p>
          </table:table-cell>
          <table:table-cell table:number-columns-repeated="2" table:style-name="ce11" office:value-type="string">
            <text:p>No propuesto.</text:p>
          </table:table-cell>
          <table:table-cell table:style-name="ce11" office:value-type="string">
            <text:p>Distingue 'sin comisión de entrada (0%)' de 'no sabemos si cobra (NULL)'. Crítico para modelo de costes de rotación en P3.</text:p>
          </table:table-cell>
          <table:table-cell table:style-name="ce11" office:value-type="string">
            <text:p>No existe — NUEVO en v17</text:p>
          </table:table-cell>
          <table:table-cell table:number-columns-repeated="2" table:style-name="ce11" office:value-type="string">
            <text:p>No existe</text:p>
          </table:table-cell>
          <table:table-cell table:style-name="ce11" office:value-type="string">
            <text:p>EXTRACTED, ZERO_CONFIRMED, NOT_FOUND</text:p>
          </table:table-cell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── REGULACIÓN Y SOSTENIBILIDAD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3">
          <table:table-cell table:style-name="ce3" office:value-type="string">
            <text:p>Sfdr_Article</text:p>
          </table:table-cell>
          <table:table-cell table:style-name="ce9" office:value-type="string">
            <text:p>Cumplimiento regulatorio de sostenibilidad. Artículo 6, 8, 9.</text:p>
          </table:table-cell>
          <table:table-cell table:style-name="ce9" office:value-type="string">
            <text:p>Clasificación SFDR: Article 6, 8, 9.</text:p>
          </table:table-cell>
          <table:table-cell table:style-name="ce9" office:value-type="string">
            <text:p>Clasificación regulatoria ESG para filtros de P3 y reporting de sostenibilidad. Imputación automática implementada.</text:p>
          </table:table-cell>
          <table:table-cell table:style-name="ce9" office:value-type="string">
            <text:p>6, 8, 9</text:p>
          </table:table-cell>
          <table:table-cell table:style-name="ce9" office:value-type="string">
            <text:p>Artículo 6, Artículo 8, Artículo 9</text:p>
          </table:table-cell>
          <table:table-cell table:style-name="ce9" office:value-type="string">
            <text:p>Article 6, Article 8, Article 9</text:p>
          </table:table-cell>
          <table:table-cell table:style-name="ce9" office:value-type="string">
            <text:p>6, 8, 9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6">
          <table:table-cell table:style-name="ce4" office:value-type="string">
            <text:p>Is_ESG</text:p>
          </table:table-cell>
          <table:table-cell table:style-name="ce10" office:value-type="string">
            <text:p>Filtrado rápido de fondos ESG. Propone sustituir íntegramente por Sfdr_Article.</text:p>
          </table:table-cell>
          <table:table-cell table:style-name="ce10" office:value-type="string">
            <text:p>Indicador ESG booleano: Yes, No.</text:p>
          </table:table-cell>
          <table:table-cell table:style-name="ce10" office:value-type="string">
            <text:p>Señal de naming ESG complementaria a Sfdr_Article. Mantener: captura fondos con denominación ESG independientemente de su artículo SFDR. Son dimensiones distintas.</text:p>
          </table:table-cell>
          <table:table-cell table:style-name="ce10" office:value-type="string">
            <text:p>0, 1</text:p>
          </table:table-cell>
          <table:table-cell table:style-name="ce10" office:value-type="string">
            <text:p>Sustituir por Sfdr_Article</text:p>
          </table:table-cell>
          <table:table-cell table:style-name="ce10" office:value-type="string">
            <text:p>Yes, No</text:p>
          </table:table-cell>
          <table:table-cell table:style-name="ce10" office:value-type="string">
            <text:p>0, 1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Benchmark_Declared</text:p>
          </table:table-cell>
          <table:table-cell table:style-name="ce9" office:value-type="string">
            <text:p>Medir el Alpha del gestor. Texto libre o ID de índice.</text:p>
          </table:table-cell>
          <table:table-cell table:style-name="ce9" office:value-type="string">
            <text:p>Benchmark declarado. Sin modificación.</text:p>
          </table:table-cell>
          <table:table-cell table:style-name="ce9" office:value-type="string">
            <text:p>Fuente para cálculo de alpha, tracking error y clasificación de Geography en P2.</text:p>
          </table:table-cell>
          <table:table-cell table:style-name="ce9" office:value-type="string">
            <text:p>Texto libre normalizado (MSCI World, Bloomberg Euro Agg, EURIBOR 3M...)</text:p>
          </table:table-cell>
          <table:table-cell table:style-name="ce9" office:value-type="string">
            <text:p>Texto libre o ID de índice</text:p>
          </table:table-cell>
          <table:table-cell table:style-name="ce9" office:value-type="string">
            <text:p>Sin modificación</text:p>
          </table:table-cell>
          <table:table-cell table:style-name="ce9" office:value-type="string">
            <text:p>Texto libre normalizado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Benchmark_Type</text:p>
          </table:table-cell>
          <table:table-cell table:style-name="ce10" office:value-type="string">
            <text:p>Determinar si el gestor está obligado a seguir el índice o solo batirlo. Reference, Target, Hurdle Rate.</text:p>
          </table:table-cell>
          <table:table-cell table:style-name="ce10" office:value-type="string">
            <text:p>Tipo de benchmark: Reference, Target, None.</text:p>
          </table:table-cell>
          <table:table-cell table:style-name="ce10" office:value-type="string">
            <text:p>Determinar el rol del benchmark en la política de gestión.</text:p>
          </table:table-cell>
          <table:table-cell table:style-name="ce10" office:value-type="string">
            <text:p>Reference, Target, Absolute, None</text:p>
          </table:table-cell>
          <table:table-cell table:style-name="ce10" office:value-type="string">
            <text:p>Reference, Target, Hurdle Rate</text:p>
          </table:table-cell>
          <table:table-cell table:style-name="ce10" office:value-type="string">
            <text:p>Reference, Target, None</text:p>
          </table:table-cell>
          <table:table-cell table:style-name="ce10" office:value-type="string">
            <text:p>Reference, Target, Hurdle Rate, None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8" table:number-rows-spanned="1">
            <text:p>── CONTROL Y TRAZABILIDAD ──</text:p>
          </table:table-cell>
          <table:covered-table-cell table:number-columns-repeated="6" table:style-name="ce8"/>
          <table:covered-table-cell table:style-name="ce12"/>
          <table:table-cell table:number-columns-repeated="1016"/>
        </table:table-row>
        <table:table-row table:style-name="ro5">
          <table:table-cell table:style-name="ce3" office:value-type="string">
            <text:p>Heuristic_Block</text:p>
          </table:table-cell>
          <table:table-cell table:style-name="ce9" office:value-type="string">
            <text:p>Control interno ETL. Propone eliminar de vista de negocio.</text:p>
          </table:table-cell>
          <table:table-cell table:style-name="ce9" office:value-type="string">
            <text:p>Bloque de clasificación automática. Sin modificación.</text:p>
          </table:table-cell>
          <table:table-cell table:style-name="ce9" office:value-type="string">
            <text:p>Trazabilidad completa de clasificación para auditoría y debugging. Mantener en esquema — excluir de vistas de negocio.</text:p>
          </table:table-cell>
          <table:table-cell table:style-name="ce9" office:value-type="string">
            <text:p>monetarios, rf_corto, rf_flexible, renta_variable, mixtos, alternativos, restantes</text:p>
          </table:table-cell>
          <table:table-cell table:style-name="ce9" office:value-type="string">
            <text:p>Eliminar de vista de negocio (metadato técnico)</text:p>
          </table:table-cell>
          <table:table-cell table:style-name="ce9" office:value-type="string">
            <text:p>Sin modificación</text:p>
          </table:table-cell>
          <table:table-cell table:style-name="ce9" office:value-type="string">
            <text:p>monetarios, rf_corto, rf_flexible, renta_variable, mixtos, alternativos, restantes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Heuristic_Core</text:p>
          </table:table-cell>
          <table:table-cell table:style-name="ce10" office:value-type="string">
            <text:p>Control interno ETL. Propone eliminar de vista de negocio.</text:p>
          </table:table-cell>
          <table:table-cell table:style-name="ce10" office:value-type="string">
            <text:p>Regla aplicada en clasificación. Sin modificación.</text:p>
          </table:table-cell>
          <table:table-cell table:style-name="ce10" office:value-type="string">
            <text:p>Indicador de confianza de clasificación. Fondos con Core=0 son candidatos prioritarios a revisión.</text:p>
          </table:table-cell>
          <table:table-cell table:style-name="ce10" office:value-type="string">
            <text:p>0, 1</text:p>
          </table:table-cell>
          <table:table-cell table:style-name="ce10" office:value-type="string">
            <text:p>Eliminar de vista de negocio</text:p>
          </table:table-cell>
          <table:table-cell table:style-name="ce10" office:value-type="string">
            <text:p>Sin modificación</text:p>
          </table:table-cell>
          <table:table-cell table:style-name="ce10" office:value-type="string">
            <text:p>0, 1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RRI_Quality_Flag</text:p>
          </table:table-cell>
          <table:table-cell table:style-name="ce9" office:value-type="string">
            <text:p>Filtrar registros para evitar errores en P2/P3.</text:p>
          </table:table-cell>
          <table:table-cell table:style-name="ce9" office:value-type="string">
            <text:p>Control de validez del SRRI.</text:p>
          </table:table-cell>
          <table:table-cell table:style-name="ce9" office:value-type="string">
            <text:p>Indicador de fiabilidad del SRRI para priorizar revisiones manuales y ponderar el dato en P3.</text:p>
          </table:table-cell>
          <table:table-cell table:style-name="ce9" office:value-type="string">
            <text:p>HIGH (MATCH), MEDIUM_VISUAL, MEDIUM_TEXT, LOW (CONFLICT), NONE</text:p>
          </table:table-cell>
          <table:table-cell table:style-name="ce9" office:value-type="string">
            <text:p>Sin modificación</text:p>
          </table:table-cell>
          <table:table-cell table:style-name="ce9" office:value-type="string">
            <text:p>OK, WARN, ERROR</text:p>
          </table:table-cell>
          <table:table-cell table:style-name="ce9" office:value-type="string">
            <text:p>HIGH, MEDIUM_VISUAL, MEDIUM_TEXT, LOW, NONE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Data_Quality_Flag</text:p>
          </table:table-cell>
          <table:table-cell table:style-name="ce10" office:value-type="string">
            <text:p>Filtrar registros para evitar errores matemáticos en P2/P3.</text:p>
          </table:table-cell>
          <table:table-cell table:style-name="ce10" office:value-type="string">
            <text:p>Control de calidad general del registro.</text:p>
          </table:table-cell>
          <table:table-cell table:style-name="ce10" office:value-type="string">
            <text:p>Filtro de calidad mínima en P3 y priorización de fondos para re-ingesta.</text:p>
          </table:table-cell>
          <table:table-cell table:style-name="ce10" office:value-type="string">
            <text:p>OK, WARN, ERROR</text:p>
          </table:table-cell>
          <table:table-cell table:style-name="ce10" office:value-type="string">
            <text:p>Sin modificación</text:p>
          </table:table-cell>
          <table:table-cell table:number-columns-repeated="2" table:style-name="ce10" office:value-type="string">
            <text:p>OK, WARN, ERROR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Inference_Trace</text:p>
          </table:table-cell>
          <table:table-cell table:number-columns-repeated="2" table:style-name="ce9" office:value-type="string">
            <text:p>No analizado.</text:p>
          </table:table-cell>
          <table:table-cell table:style-name="ce9" office:value-type="string">
            <text:p>Trazabilidad detallada de las señales que determinaron la clasificación — debugging y análisis de heurísticas.</text:p>
          </table:table-cell>
          <table:table-cell table:style-name="ce9" office:value-type="string">
            <text:p>Texto libre serializado</text:p>
          </table:table-cell>
          <table:table-cell table:number-columns-repeated="2" table:style-name="ce9" office:value-type="string">
            <text:p>No analizado</text:p>
          </table:table-cell>
          <table:table-cell table:style-name="ce9" office:value-type="string">
            <text:p>Texto libre serializado</text:p>
          </table:table-cell>
          <table:table-cell office:value-type="string">
            <text:p>Actual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 table:style-name="ce7" office:value-type="string" table:number-columns-spanned="8" table:number-rows-spanned="1">
            <text:p>■ Fondo amarillo = atributo NUEVO propuesto <text:s/>| <text:s/>■ Fondo azul = separador de grupo</text:p>
          </table:table-cell>
          <table:covered-table-cell table:number-columns-repeated="7"/>
          <table:table-cell table:number-columns-repeated="1016"/>
        </table:table-row>
        <table:table-row table:style-name="ro8" table:number-rows-repeated="1048519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target-range-address="Comparativa.A1:Comparativa.J5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5">05/04/2026</text:date>, <text:time>11:41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mparativa" style:display-name="PageStyle_Comparativ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05T11:41:51.14</dc:date>
    <dc:creator>Jose Antonio Cormenzana Elosua</dc:creator>
    <meta:generator>OpenOffice/4.1.16$Win32 OpenOffice.org_project/4116m3$Build-9816</meta:generator>
    <meta:editing-duration>PT2M37S</meta:editing-duration>
    <meta:editing-cycles>1</meta:editing-cycles>
    <meta:document-statistic meta:table-count="1" meta:cell-count="406" meta:object-count="0"/>
  </office:meta>
</office:document-meta>
</file>