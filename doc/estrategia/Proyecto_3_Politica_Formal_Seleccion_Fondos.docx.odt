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ing_20_1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ÍTICA FORMAL DE SELECCIÓN DE FONDOS<text:line-break/>Proyecto 3</text:p>
      <text:p text:style-name="Standard">Este documento establece la política formal de selección de fondos de inversión basada exclusivamente en los indicadores cuantitativos generados en el Proyecto 2. Su objetivo es garantizar decisiones coherentes, reproducibles y orientadas a la preservación real del capital bajo distintos regímenes macroeconómicos.</text:p>
      <text:p text:style-name="Heading_20_2">1. Alcance y principios generales</text:p>
      <text:p text:style-name="Standard">La presente política se aplica al universo de fondos previamente clasificados en el Proyecto 1 y enriquecidos cuantitativamente en el Proyecto 2. No se emplean ratings comerciales ni juicios cualitativos no trazables.<text:line-break/><text:line-break/>Principios rectores:<text:line-break/>- Prioridad absoluta a la preservación real de capital.<text:line-break/>- Evaluación del riesgo antes de la rentabilidad.<text:line-break/>- Separación entre análisis, criterio y decisión.<text:line-break/>- Uso de métricas históricas auditables.</text:p>
      <text:p text:style-name="Heading_20_2">2. Indicadores base utilizados</text:p>
      <text:p text:style-name="Standard">Los indicadores empleados proceden exclusivamente de la tabla fund_metrics:<text:line-break/><text:line-break/>- max_drawdown (nominal y real)<text:line-break/>- drawdown_duration<text:line-break/>- time_to_recovery<text:line-break/>- pct_positive_months<text:line-break/>- pct_negative_loss_months<text:line-break/>- pct_severe_loss_months<text:line-break/>- worst_month<text:line-break/><text:line-break/>Todas las métricas se analizan preferentemente en su versión real (real_flag = 1).</text:p>
      <text:p text:style-name="Heading_20_2">3. Umbrales explícitos de exclusión (Hard Filters)</text:p>
      <text:p text:style-name="Standard">Los siguientes umbrales se consideran condiciones necesarias mínimas para que un fondo pueda ser elegible. El incumplimiento de cualquiera de ellos implica exclusión automática salvo justificación excepcional documentada:<text:line-break/><text:line-break/>- max_drawdown_real ≥ -30%<text:line-break/>- time_to_recovery_real ≤ 36 meses<text:line-break/>- pct_positive_months_real ≥ 45%<text:line-break/>- pct_severe_loss_months_real ≤ 15%<text:line-break/><text:line-break/>Estos umbrales no buscan optimización, sino eliminación de fondos estructuralmente destructivos.</text:p>
      <text:p text:style-name="Heading_20_2">4. Evaluación en ventanas de crisis</text:p>
      <text:p text:style-name="Standard">El fondo debe demostrar comportamiento aceptable en al menos tres de las cuatro crisis analizadas (2008, 2011, 2020, 2022).<text:line-break/><text:line-break/>Criterios orientativos:<text:line-break/>- max_drawdown_real en crisis no superior al percentil 75 del universo.<text:line-break/>- ausencia de colapsos irreversibles.</text:p>
      <text:p text:style-name="Heading_20_2">5. Rangos interpretativos</text:p>
      <text:p text:style-name="Standard">pct_positive_months_real:<text:line-break/>- &gt; 60%: alta consistencia<text:line-break/>- 45–60%: aceptable según rol<text:line-break/>- &lt; 45%: erosivo<text:line-break/><text:line-break/>time_to_recovery_real:<text:line-break/>- &lt; 12 meses: excelente resiliencia<text:line-break/>- 12–36 meses: aceptable<text:line-break/>- &gt; 36 meses: débil</text:p>
      <text:p text:style-name="Heading_20_2">6. Tipologías de carteras</text:p>
      <text:p text:style-name="Standard">Cartera Defensiva:<text:line-break/>- drawdown real muy contenido<text:line-break/>- alta consistencia<text:line-break/>- resiliencia demostrada en crisis<text:line-break/><text:line-break/>Cartera Equilibrada:<text:line-break/>- balance entre estabilidad y crecimiento<text:line-break/><text:line-break/>Cartera de Crecimiento:<text:line-break/>- mayor tolerancia a drawdown<text:line-break/>- foco en retorno a largo plazo</text:p>
      <text:p text:style-name="Heading_20_2">7. Ejemplos de consultas SQL</text:p>
      <text:p text:style-name="Standard">Fondos con drawdown real admisible:<text:line-break/><text:line-break/>SELECT isin FROM fund_metrics WHERE metric='max_drawdown' AND real_flag=1 AND value &gt;= -0.30;<text:line-break/><text:line-break/>Fondos consistentes:<text:line-break/><text:line-break/>SELECT isin FROM fund_metrics WHERE metric='pct_positive_months' AND real_flag=1 AND value &gt;= 0.60;</text:p>
      <text:p text:style-name="Heading_20_2">8. Gestión de excepciones</text:p>
      <text:p text:style-name="Standard">Las excepciones deben estar justificadas, documentadas y orientadas a la mejora del perfil agregado de la cartera. No se admitirán excepciones basadas solo en rentabilidad.</text:p>
      <text:p text:style-name="Heading_20_2">9. Conclusión</text:p>
      <text:p text:style-name="Standard">Esta política formaliza un proceso disciplinado y reproducible de selección de fondos, orientado a la preservación real del capi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835in" loext:contextual-spacing="false"/>
    </style:style>
    <style:style style:name="List" style:family="paragraph" style:parent-style-name="normal" style:default-outline-level="" style:class="list">
      <style:paragraph-properties fo:margin-left="0.25in" fo:margin-right="0in" fo:margin-top="0in" fo:margin-bottom="0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ody_20_Text_20_2" style:display-name="Body Text 2" style:family="paragraph" style:parent-style-name="normal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normal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normal" style:default-outline-level="" style:class="list">
      <style:paragraph-properties fo:margin-left="0.5in" fo:margin-right="0in" fo:margin-top="0in" fo:margin-bottom="0in" loext:contextual-spacing="true" fo:text-indent="-0.25in" style:auto-text-indent="false"/>
    </style:style>
    <style:style style:name="List_20_3" style:display-name="List 3" style:family="paragraph" style:parent-style-name="normal" style:default-outline-level="" style:class="list">
      <style:paragraph-properties fo:margin-left="0.75in" fo:margin-right="0in" fo:margin-top="0in" fo:margin-bottom="0in" loext:contextual-spacing="true" fo:text-indent="-0.25in" style:auto-text-indent="false"/>
    </style:style>
    <style:style style:name="List_20_Bullet" style:display-name="List Bullet" style:family="paragraph" style:parent-style-name="normal" style:default-outline-level="">
      <style:paragraph-properties fo:margin-top="0in" fo:margin-bottom="0in" loext:contextual-spacing="true"/>
    </style:style>
    <style:style style:name="List_20_Bullet_20_2" style:display-name="List Bullet 2" style:family="paragraph" style:parent-style-name="normal" style:default-outline-level="">
      <style:paragraph-properties fo:margin-top="0in" fo:margin-bottom="0in" loext:contextual-spacing="true"/>
    </style:style>
    <style:style style:name="List_20_Bullet_20_3" style:display-name="List Bullet 3" style:family="paragraph" style:parent-style-name="normal" style:default-outline-level="">
      <style:paragraph-properties fo:margin-top="0in" fo:margin-bottom="0in" loext:contextual-spacing="true"/>
    </style:style>
    <style:style style:name="List_20_Number" style:display-name="List Number" style:family="paragraph" style:parent-style-name="normal" style:default-outline-level="">
      <style:paragraph-properties fo:margin-top="0in" fo:margin-bottom="0in" loext:contextual-spacing="true"/>
    </style:style>
    <style:style style:name="List_20_Number_20_2" style:display-name="List Number 2" style:family="paragraph" style:parent-style-name="normal" style:default-outline-level="">
      <style:paragraph-properties fo:margin-top="0in" fo:margin-bottom="0in" loext:contextual-spacing="true"/>
    </style:style>
    <style:style style:name="List_20_Number_20_3" style:display-name="List Number 3" style:family="paragraph" style:parent-style-name="normal" style:default-outline-level="">
      <style:paragraph-properties fo:margin-top="0in" fo:margin-bottom="0in" loext:contextual-spacing="true"/>
    </style:style>
    <style:style style:name="List_20_Continue" style:display-name="List Continue" style:family="paragraph" style:parent-style-name="normal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normal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normal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normal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normal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normal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23:15:00</meta:creation-date>
    <meta:initial-creator>python-docx</meta:initial-creator>
    <meta:document-statistic meta:table-count="0" meta:image-count="0" meta:object-count="0" meta:page-count="1" meta:paragraph-count="20" meta:word-count="432" meta:character-count="3107" meta:non-whitespace-character-count="2685"/>
    <meta:generator>LibreOfficeDev/6.0.5.2$Linux_X86_64 LibreOffice_project/</meta:generator>
  </office:meta>
</office:document-meta>
</file>