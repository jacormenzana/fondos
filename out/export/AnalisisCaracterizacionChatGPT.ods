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17.1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5.383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6.576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3.522cm"/>
    </style:style>
    <style:style style:name="co11" style:family="table-column">
      <style:table-column-properties fo:break-before="auto" style:column-width="6.604cm"/>
    </style:style>
    <style:style style:name="co12" style:family="table-column">
      <style:table-column-properties fo:break-before="auto" style:column-width="5.105cm"/>
    </style:style>
    <style:style style:name="co13" style:family="table-column">
      <style:table-column-properties fo:break-before="auto" style:column-width="4.551cm"/>
    </style:style>
    <style:style style:name="co14" style:family="table-column">
      <style:table-column-properties fo:break-before="auto" style:column-width="3.357cm"/>
    </style:style>
    <style:style style:name="co15" style:family="table-column">
      <style:table-column-properties fo:break-before="auto" style:column-width="3.939cm"/>
    </style:style>
    <style:style style:name="co16" style:family="table-column">
      <style:table-column-properties fo:break-before="auto" style:column-width="4.355cm"/>
    </style:style>
    <style:style style:name="co17" style:family="table-column">
      <style:table-column-properties fo:break-before="auto" style:column-width="5.909cm"/>
    </style:style>
    <style:style style:name="co18" style:family="table-column">
      <style:table-column-properties fo:break-before="auto" style:column-width="20.145cm"/>
    </style:style>
    <style:style style:name="co19" style:family="table-column">
      <style:table-column-properties fo:break-before="auto" style:column-width="11.7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upo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Denominación</text:p>
          </table:table-cell>
          <table:table-cell table:style-name="ce1" office:value-type="string">
            <text:p>Objeto</text:p>
          </table:table-cell>
        </table:table-row>
        <table:table-row table:style-name="ro1">
          <table:table-cell office:value-type="string">
            <text:p>Identidad</text:p>
          </table:table-cell>
          <table:table-cell office:value-type="string">
            <text:p>Identificación única y estructural del fondo</text:p>
          </table:table-cell>
        </table:table-row>
        <table:table-row table:style-name="ro1">
          <table:table-cell office:value-type="string">
            <text:p>Clasificación principal</text:p>
          </table:table-cell>
          <table:table-cell office:value-type="string">
            <text:p>Naturaleza económica y tipología core</text:p>
          </table:table-cell>
        </table:table-row>
        <table:table-row table:style-name="ro1">
          <table:table-cell office:value-type="string">
            <text:p>Perfil de riesgo</text:p>
          </table:table-cell>
          <table:table-cell office:value-type="string">
            <text:p>Nivel de riesgo y adecuación inversor</text:p>
          </table:table-cell>
        </table:table-row>
        <table:table-row table:style-name="ro1">
          <table:table-cell office:value-type="string">
            <text:p>Estrategia y estilo</text:p>
          </table:table-cell>
          <table:table-cell office:value-type="string">
            <text:p>Cómo se genera el retorno</text:p>
          </table:table-cell>
        </table:table-row>
        <table:table-row table:style-name="ro1">
          <table:table-cell office:value-type="string">
            <text:p>Exposición de inversión</text:p>
          </table:table-cell>
          <table:table-cell office:value-type="string">
            <text:p>Dónde y en qué invierte</text:p>
          </table:table-cell>
        </table:table-row>
        <table:table-row table:style-name="ro1">
          <table:table-cell office:value-type="string">
            <text:p>Estructura del producto</text:p>
          </table:table-cell>
          <table:table-cell office:value-type="string">
            <text:p>Características técnicas del vehículo</text:p>
          </table:table-cell>
        </table:table-row>
        <table:table-row table:style-name="ro1">
          <table:table-cell office:value-type="string">
            <text:p>Costes y condiciones</text:p>
          </table:table-cell>
          <table:table-cell office:value-type="string">
            <text:p>Comisiones y condiciones operativas</text:p>
          </table:table-cell>
        </table:table-row>
        <table:table-row table:style-name="ro1">
          <table:table-cell office:value-type="string">
            <text:p>Información regulatoria (KIID / SFDR)</text:p>
          </table:table-cell>
          <table:table-cell office:value-type="string">
            <text:p>Información normativa y legal</text:p>
          </table:table-cell>
        </table:table-row>
        <table:table-row table:style-name="ro1">
          <table:table-cell office:value-type="string">
            <text:p>Calidad y control</text:p>
          </table:table-cell>
          <table:table-cell office:value-type="string">
            <text:p>Validación y trazabilidad del dato</text:p>
          </table:table-cell>
        </table:table-row>
        <table:table-row table:style-name="ro1">
          <table:table-cell office:value-type="string">
            <text:p>Metadatos técnicos</text:p>
          </table:table-cell>
          <table:table-cell office:value-type="string">
            <text:p>Información operativa y de sistema</text:p>
          </table:table-cell>
        </table:table-row>
      </table:table>
      <table:table table:name="Actuales" table:style-name="ta1" table:print="false"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Grupo</text:p>
          </table:table-cell>
          <table:table-cell table:style-name="ce1" office:value-type="string">
            <text:p>Pregunta</text:p>
          </table:table-cell>
          <table:table-cell table:style-name="ce1" office:value-type="string">
            <text:p>Criterio</text:p>
          </table:table-cell>
          <table:table-cell table:style-name="ce1" office:value-type="string">
            <text:p>Objeto</text:p>
          </table:table-cell>
          <table:table-cell table:style-name="ce1" office:value-type="string">
            <text:p>Población</text:p>
          </table:table-cell>
          <table:table-cell table:style-name="ce1" office:value-type="string">
            <text:p>Mantener</text:p>
          </table:table-cell>
          <table:table-cell table:style-name="ce1" office:value-type="string">
            <text:p>ModificarCriterio</text:p>
          </table:table-cell>
          <table:table-cell table:style-name="ce1" office:value-type="string">
            <text:p>ModificarValores</text:p>
          </table:table-cell>
          <table:table-cell table:style-name="ce1" office:value-type="string">
            <text:p>NuevaPoblación</text:p>
          </table:table-cell>
        </table:table-row>
        <table:table-row table:style-name="ro1">
          <table:table-cell office:value-type="string">
            <text:p>ISIN</text:p>
          </table:table-cell>
          <table:table-cell office:value-type="string">
            <text:p>Identidad</text:p>
          </table:table-cell>
          <table:table-cell office:value-type="string">
            <text:p>¿Qué fondo es?</text:p>
          </table:table-cell>
          <table:table-cell office:value-type="string">
            <text:p>ISO</text:p>
          </table:table-cell>
          <table:table-cell office:value-type="string">
            <text:p>Identificador</text:p>
          </table:table-cell>
          <table:table-cell office:value-type="string">
            <text:p>ISIN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Clasificación</text:p>
          </table:table-cell>
          <table:table-cell office:value-type="string">
            <text:p>¿Qué tipo de activo?</text:p>
          </table:table-cell>
          <table:table-cell office:value-type="string">
            <text:p>Clasificación macro</text:p>
          </table:table-cell>
          <table:table-cell office:value-type="string">
            <text:p>Naturaleza</text:p>
          </table:table-cell>
          <table:table-cell office:value-type="string">
            <text:p>Monetario, RF, RV, Mixto, Alternativo</text:p>
          </table:table-cell>
          <table:table-cell table:number-columns-repeated="3" office:value-type="string">
            <text:p>Sí</text:p>
          </table:table-cell>
          <table:table-cell office:value-type="string">
            <text:p>Monetario, RF Corto, RF Flexible, RF Largo, RV, Mixto, Alternativo</text:p>
          </table:table-cell>
        </table:table-row>
        <table:table-row table:style-name="ro1">
          <table:table-cell office:value-type="string">
            <text:p>Profile</text:p>
          </table:table-cell>
          <table:table-cell office:value-type="string">
            <text:p>Riesgo</text:p>
          </table:table-cell>
          <table:table-cell office:value-type="string">
            <text:p>¿Qué riesgo tiene?</text:p>
          </table:table-cell>
          <table:table-cell office:value-type="string">
            <text:p>SRRI → mapping</text:p>
          </table:table-cell>
          <table:table-cell office:value-type="string">
            <text:p>Perfil</text:p>
          </table:table-cell>
          <table:table-cell office:value-type="string">
            <text:p>Conservador, Moderado, Dinámico</text:p>
          </table:table-cell>
          <table:table-cell table:number-columns-repeated="3" office:value-type="string">
            <text:p>Sí</text:p>
          </table:table-cell>
          <table:table-cell office:value-type="string">
            <text:p>Conservador, Moderado, Dinámico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Clasificación</text:p>
          </table:table-cell>
          <table:table-cell office:value-type="string">
            <text:p>¿Qué estructura?</text:p>
          </table:table-cell>
          <table:table-cell office:value-type="string">
            <text:p>Estrategia base</text:p>
          </table:table-cell>
          <table:table-cell office:value-type="string">
            <text:p>Tipo</text:p>
          </table:table-cell>
          <table:table-cell office:value-type="string">
            <text:p>Absolute Return, Allocation…</text:p>
          </table:table-cell>
          <table:table-cell table:number-columns-repeated="3" office:value-type="string">
            <text:p>Sí</text:p>
          </table:table-cell>
          <table:table-cell office:value-type="string">
            <text:p>Lista cerrada coherente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Clasificación</text:p>
          </table:table-cell>
          <table:table-cell office:value-type="string">
            <text:p>¿Subtipo?</text:p>
          </table:table-cell>
          <table:table-cell office:value-type="string">
            <text:p>Derivado de Type</text:p>
          </table:table-cell>
          <table:table-cell office:value-type="string">
            <text:p>Subgrupo</text:p>
          </table:table-cell>
          <table:table-cell office:value-type="string">
            <text:p>Texto</text:p>
          </table:table-cell>
          <table:table-cell table:number-columns-repeated="3" office:value-type="string">
            <text:p>Sí</text:p>
          </table:table-cell>
          <table:table-cell office:value-type="string">
            <text:p>Lista cerrada o eliminar</text:p>
          </table:table-cell>
        </table:table-row>
        <table:table-row table:style-name="ro1">
          <table:table-cell office:value-type="string">
            <text:p>Style_Profile</text:p>
          </table:table-cell>
          <table:table-cell office:value-type="string">
            <text:p>Estrategia</text:p>
          </table:table-cell>
          <table:table-cell office:value-type="string">
            <text:p>¿Cómo gestiona?</text:p>
          </table:table-cell>
          <table:table-cell office:value-type="string">
            <text:p>Filosofía gestión</text:p>
          </table:table-cell>
          <table:table-cell office:value-type="string">
            <text:p>Estilo</text:p>
          </table:table-cell>
          <table:table-cell office:value-type="string">
            <text:p>Strategic, Tactical…</text:p>
          </table:table-cell>
          <table:table-cell table:number-columns-repeated="3" office:value-type="string">
            <text:p>Sí</text:p>
          </table:table-cell>
          <table:table-cell office:value-type="string">
            <text:p>Strategic, Tactical, Passive, Active</text:p>
          </table:table-cell>
        </table:table-row>
        <table:table-row table:style-name="ro1">
          <table:table-cell office:value-type="string">
            <text:p>Geography</text:p>
          </table:table-cell>
          <table:table-cell office:value-type="string">
            <text:p>Exposición</text:p>
          </table:table-cell>
          <table:table-cell office:value-type="string">
            <text:p>¿Dónde invierte?</text:p>
          </table:table-cell>
          <table:table-cell office:value-type="string">
            <text:p>Solo explícito</text:p>
          </table:table-cell>
          <table:table-cell office:value-type="string">
            <text:p>Región</text:p>
          </table:table-cell>
          <table:table-cell office:value-type="string">
            <text:p>Global, USA…</text:p>
          </table:table-cell>
          <table:table-cell table:number-columns-repeated="2"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Theme</text:p>
          </table:table-cell>
          <table:table-cell office:value-type="string">
            <text:p>Exposición</text:p>
          </table:table-cell>
          <table:table-cell office:value-type="string">
            <text:p>¿Tema?</text:p>
          </table:table-cell>
          <table:table-cell office:value-type="string">
            <text:p>Solo si explícito</text:p>
          </table:table-cell>
          <table:table-cell office:value-type="string">
            <text:p>Temática</text:p>
          </table:table-cell>
          <table:table-cell office:value-type="string">
            <text:p>Tech, Gold…</text:p>
          </table:table-cell>
          <table:table-cell table:number-columns-repeated="3" office:value-type="string">
            <text:p>Sí</text:p>
          </table:table-cell>
          <table:table-cell office:value-type="string">
            <text:p>Lista muy restringida</text:p>
          </table:table-cell>
        </table:table-row>
        <table:table-row table:style-name="ro1">
          <table:table-cell office:value-type="string">
            <text:p>Exposure_Bias</text:p>
          </table:table-cell>
          <table:table-cell office:value-type="string">
            <text:p>Exposición</text:p>
          </table:table-cell>
          <table:table-cell office:value-type="string">
            <text:p>¿Sesgo estructural?</text:p>
          </table:table-cell>
          <table:table-cell office:value-type="string">
            <text:p>Solo en alternativos</text:p>
          </table:table-cell>
          <table:table-cell office:value-type="string">
            <text:p>Sesgo</text:p>
          </table:table-cell>
          <table:table-cell office:value-type="string">
            <text:p>Long/Short…</text:p>
          </table:table-cell>
          <table:table-cell table:number-columns-repeated="3" office:value-type="string">
            <text:p>Sí</text:p>
          </table:table-cell>
          <table:table-cell office:value-type="string">
            <text:p>Lista cerrada por tipo</text:p>
          </table:table-cell>
        </table:table-row>
        <table:table-row table:style-name="ro1">
          <table:table-cell office:value-type="string">
            <text:p>Subtype</text:p>
          </table:table-cell>
          <table:table-cell office:value-type="string">
            <text:p>Clasificación</text:p>
          </table:table-cell>
          <table:table-cell office:value-type="string">
            <text:p>¿Subtipo adicional?</text:p>
          </table:table-cell>
          <table:table-cell office:value-type="string">
            <text:p>Uso excepcional</text:p>
          </table:table-cell>
          <table:table-cell office:value-type="string">
            <text:p>Refinamiento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office:value-type="string">
            <text:p>Eliminar</text:p>
          </table:table-cell>
        </table:table-row>
        <table:table-row table:style-name="ro1">
          <table:table-cell office:value-type="string">
            <text:p>Heuristic_Block</text:p>
          </table:table-cell>
          <table:table-cell office:value-type="string">
            <text:p>Control</text:p>
          </table:table-cell>
          <table:table-cell office:value-type="string">
            <text:p>¿Clasificación automática?</text:p>
          </table:table-cell>
          <table:table-cell office:value-type="string">
            <text:p>Pipeline</text:p>
          </table:table-cell>
          <table:table-cell office:value-type="string">
            <text:p>Bloque</text:p>
          </table:table-cell>
          <table:table-cell office:value-type="string">
            <text:p>MONETARIOS…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Heuristic_Core</text:p>
          </table:table-cell>
          <table:table-cell office:value-type="string">
            <text:p>Control</text:p>
          </table:table-cell>
          <table:table-cell office:value-type="string">
            <text:p>¿Regla aplicada?</text:p>
          </table:table-cell>
          <table:table-cell office:value-type="string">
            <text:p>Pipeline</text:p>
          </table:table-cell>
          <table:table-cell office:value-type="string">
            <text:p>Trazabilidad</text:p>
          </table:table-cell>
          <table:table-cell office:value-type="string">
            <text:p>0/1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RRI</text:p>
          </table:table-cell>
          <table:table-cell office:value-type="string">
            <text:p>Regulación</text:p>
          </table:table-cell>
          <table:table-cell office:value-type="string">
            <text:p>¿Riesgo KIID?</text:p>
          </table:table-cell>
          <table:table-cell office:value-type="string">
            <text:p>KIID</text:p>
          </table:table-cell>
          <table:table-cell office:value-type="string">
            <text:p>Riesgo</text:p>
          </table:table-cell>
          <table:table-cell office:value-type="string">
            <text:p>1–7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Fund_Currency</text:p>
          </table:table-cell>
          <table:table-cell office:value-type="string">
            <text:p>Estructura</text:p>
          </table:table-cell>
          <table:table-cell office:value-type="string">
            <text:p>¿Divisa base?</text:p>
          </table:table-cell>
          <table:table-cell office:value-type="string">
            <text:p>KIID</text:p>
          </table:table-cell>
          <table:table-cell office:value-type="string">
            <text:p>Divisa</text:p>
          </table:table-cell>
          <table:table-cell office:value-type="string">
            <text:p>EUR, USD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ortfolio_Currency</text:p>
          </table:table-cell>
          <table:table-cell office:value-type="string">
            <text:p>Estructura</text:p>
          </table:table-cell>
          <table:table-cell office:value-type="string">
            <text:p>¿Divisa cartera?</text:p>
          </table:table-cell>
          <table:table-cell office:value-type="string">
            <text:p>KIID</text:p>
          </table:table-cell>
          <table:table-cell office:value-type="string">
            <text:p>Divisa</text:p>
          </table:table-cell>
          <table:table-cell office:value-type="string">
            <text:p>EUR, USD</text:p>
          </table:table-cell>
          <table:table-cell table:number-columns-repeated="3" office:value-type="string">
            <text:p>Sí</text:p>
          </table:table-cell>
          <table:table-cell office:value-type="string">
            <text:p>Alinear con Fund_Currency o eliminar</text:p>
          </table:table-cell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Estructura</text:p>
          </table:table-cell>
          <table:table-cell office:value-type="string">
            <text:p>¿Cobertura?</text:p>
          </table:table-cell>
          <table:table-cell office:value-type="string">
            <text:p>Texto</text:p>
          </table:table-cell>
          <table:table-cell office:value-type="string">
            <text:p>Cobertura</text:p>
          </table:table-cell>
          <table:table-cell office:value-type="string">
            <text:p>Hedged…</text:p>
          </table:table-cell>
          <table:table-cell table:number-columns-repeated="3" office:value-type="string">
            <text:p>Sí</text:p>
          </table:table-cell>
          <table:table-cell office:value-type="string">
            <text:p>Hedged, Unhedged</text:p>
          </table:table-cell>
        </table:table-row>
        <table:table-row table:style-name="ro1">
          <table:table-cell office:value-type="string">
            <text:p>Replication_Method</text:p>
          </table:table-cell>
          <table:table-cell office:value-type="string">
            <text:p>Estructura</text:p>
          </table:table-cell>
          <table:table-cell office:value-type="string">
            <text:p>¿Replica índice?</text:p>
          </table:table-cell>
          <table:table-cell office:value-type="string">
            <text:p>ETF</text:p>
          </table:table-cell>
          <table:table-cell office:value-type="string">
            <text:p>Método</text:p>
          </table:table-cell>
          <table:table-cell office:value-type="string">
            <text:p>Physical, Synthetic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rivatives_Usage</text:p>
          </table:table-cell>
          <table:table-cell office:value-type="string">
            <text:p>Estructura</text:p>
          </table:table-cell>
          <table:table-cell office:value-type="string">
            <text:p>¿Usa derivados?</text:p>
          </table:table-cell>
          <table:table-cell office:value-type="string">
            <text:p>KIID</text:p>
          </table:table-cell>
          <table:table-cell office:value-type="string">
            <text:p>Uso</text:p>
          </table:table-cell>
          <table:table-cell office:value-type="string">
            <text:p>Yes, No, Limited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Benchmark_Declared</text:p>
          </table:table-cell>
          <table:table-cell office:value-type="string">
            <text:p>Regulación</text:p>
          </table:table-cell>
          <table:table-cell office:value-type="string">
            <text:p>¿Benchmark?</text:p>
          </table:table-cell>
          <table:table-cell office:value-type="string">
            <text:p>Texto</text:p>
          </table:table-cell>
          <table:table-cell office:value-type="string">
            <text:p>Índice</text:p>
          </table:table-cell>
          <table:table-cell office:value-type="string">
            <text:p>Texto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RRI_Quality_Flag</text:p>
          </table:table-cell>
          <table:table-cell office:value-type="string">
            <text:p>Calidad</text:p>
          </table:table-cell>
          <table:table-cell office:value-type="string">
            <text:p>¿Validez SRRI?</text:p>
          </table:table-cell>
          <table:table-cell office:value-type="string">
            <text:p>QA</text:p>
          </table:table-cell>
          <table:table-cell office:value-type="string">
            <text:p>Control</text:p>
          </table:table-cell>
          <table:table-cell office:value-type="string">
            <text:p>OK, WARN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ata_Quality_Flag</text:p>
          </table:table-cell>
          <table:table-cell office:value-type="string">
            <text:p>Calidad</text:p>
          </table:table-cell>
          <table:table-cell office:value-type="string">
            <text:p>¿Calidad general?</text:p>
          </table:table-cell>
          <table:table-cell office:value-type="string">
            <text:p>QA</text:p>
          </table:table-cell>
          <table:table-cell office:value-type="string">
            <text:p>Control</text:p>
          </table:table-cell>
          <table:table-cell office:value-type="string">
            <text:p>OK, WARN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fund_family_id</text:p>
          </table:table-cell>
          <table:table-cell office:value-type="string">
            <text:p>Identidad</text:p>
          </table:table-cell>
          <table:table-cell office:value-type="string">
            <text:p>¿Familia interna?</text:p>
          </table:table-cell>
          <table:table-cell office:value-type="string">
            <text:p>ID interno</text:p>
          </table:table-cell>
          <table:table-cell office:value-type="string">
            <text:p>Agrupación</text:p>
          </table:table-cell>
          <table:table-cell office:value-type="string">
            <text:p>ID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rategy</text:p>
          </table:table-cell>
          <table:table-cell office:value-type="string">
            <text:p>Estrategia</text:p>
          </table:table-cell>
          <table:table-cell office:value-type="string">
            <text:p>¿Estrategia?</text:p>
          </table:table-cell>
          <table:table-cell office:value-type="string">
            <text:p>Texto</text:p>
          </table:table-cell>
          <table:table-cell office:value-type="string">
            <text:p>Estrategia</text:p>
          </table:table-cell>
          <table:table-cell office:value-type="string">
            <text:p>Texto</text:p>
          </table:table-cell>
          <table:table-cell table:number-columns-repeated="3" office:value-type="string">
            <text:p>Sí</text:p>
          </table:table-cell>
          <table:table-cell office:value-type="string">
            <text:p>Lista cerrada</text:p>
          </table:table-cell>
        </table:table-row>
        <table:table-row table:style-name="ro1">
          <table:table-cell office:value-type="string">
            <text:p>Is_ESG</text:p>
          </table:table-cell>
          <table:table-cell office:value-type="string">
            <text:p>Regulación</text:p>
          </table:table-cell>
          <table:table-cell office:value-type="string">
            <text:p>¿ESG?</text:p>
          </table:table-cell>
          <table:table-cell office:value-type="string">
            <text:p>KIID</text:p>
          </table:table-cell>
          <table:table-cell office:value-type="string">
            <text:p>ESG</text:p>
          </table:table-cell>
          <table:table-cell office:value-type="string">
            <text:p>0/1</text:p>
          </table:table-cell>
          <table:table-cell table:number-columns-repeated="3" office:value-type="string">
            <text:p>Sí</text:p>
          </table:table-cell>
          <table:table-cell office:value-type="string">
            <text:p>Booleano</text:p>
          </table:table-cell>
        </table:table-row>
        <table:table-row table:style-name="ro1">
          <table:table-cell office:value-type="string">
            <text:p>Benchmark_Type</text:p>
          </table:table-cell>
          <table:table-cell office:value-type="string">
            <text:p>Regulación</text:p>
          </table:table-cell>
          <table:table-cell office:value-type="string">
            <text:p>¿Tipo benchmark?</text:p>
          </table:table-cell>
          <table:table-cell office:value-type="string">
            <text:p>Clasificación</text:p>
          </table:table-cell>
          <table:table-cell office:value-type="string">
            <text:p>Tipo</text:p>
          </table:table-cell>
          <table:table-cell office:value-type="string">
            <text:p>Reference…</text:p>
          </table:table-cell>
          <table:table-cell table:number-columns-repeated="3" office:value-type="string">
            <text:p>Sí</text:p>
          </table:table-cell>
          <table:table-cell office:value-type="string">
            <text:p>Reference, Target, None</text:p>
          </table:table-cell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Producto</text:p>
          </table:table-cell>
          <table:table-cell office:value-type="string">
            <text:p>¿Distribuye?</text:p>
          </table:table-cell>
          <table:table-cell office:value-type="string">
            <text:p>Share class</text:p>
          </table:table-cell>
          <table:table-cell office:value-type="string">
            <text:p>Política</text:p>
          </table:table-cell>
          <table:table-cell office:value-type="string">
            <text:p>Accumulation</text:p>
          </table:table-cell>
          <table:table-cell table:number-columns-repeated="3" office:value-type="string">
            <text:p>Sí</text:p>
          </table:table-cell>
          <table:table-cell office:value-type="string">
            <text:p>Acc, Dist</text:p>
          </table:table-cell>
        </table:table-row>
        <table:table-row table:style-name="ro1">
          <table:table-cell office:value-type="string">
            <text:p>Entry_Fee_Pct</text:p>
          </table:table-cell>
          <table:table-cell office:value-type="string">
            <text:p>Costes</text:p>
          </table:table-cell>
          <table:table-cell office:value-type="string">
            <text:p>¿Comisión entrada?</text:p>
          </table:table-cell>
          <table:table-cell office:value-type="string">
            <text:p>KIID</text:p>
          </table:table-cell>
          <table:table-cell office:value-type="string">
            <text:p>Coste</text:p>
          </table:table-cell>
          <table:table-cell office:value-type="string">
            <text:p>%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xit_Fee_Pct</text:p>
          </table:table-cell>
          <table:table-cell office:value-type="string">
            <text:p>Costes</text:p>
          </table:table-cell>
          <table:table-cell office:value-type="string">
            <text:p>¿Comisión salida?</text:p>
          </table:table-cell>
          <table:table-cell office:value-type="string">
            <text:p>KIID</text:p>
          </table:table-cell>
          <table:table-cell office:value-type="string">
            <text:p>Coste</text:p>
          </table:table-cell>
          <table:table-cell office:value-type="string">
            <text:p>%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fdr_Article</text:p>
          </table:table-cell>
          <table:table-cell office:value-type="string">
            <text:p>Regulación</text:p>
          </table:table-cell>
          <table:table-cell office:value-type="string">
            <text:p>¿Artículo SFDR?</text:p>
          </table:table-cell>
          <table:table-cell office:value-type="string">
            <text:p>KIID</text:p>
          </table:table-cell>
          <table:table-cell office:value-type="string">
            <text:p>Clasificación</text:p>
          </table:table-cell>
          <table:table-cell office:value-type="string">
            <text:p>6,8,9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Recommended_Holding_Period</text:p>
          </table:table-cell>
          <table:table-cell office:value-type="string">
            <text:p>Regulación</text:p>
          </table:table-cell>
          <table:table-cell office:value-type="string">
            <text:p>¿Horizonte?</text:p>
          </table:table-cell>
          <table:table-cell office:value-type="string">
            <text:p>KIID</text:p>
          </table:table-cell>
          <table:table-cell office:value-type="string">
            <text:p>Horizonte</text:p>
          </table:table-cell>
          <table:table-cell office:value-type="string">
            <text:p>Años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Leverage_Used</text:p>
          </table:table-cell>
          <table:table-cell office:value-type="string">
            <text:p>Estructura</text:p>
          </table:table-cell>
          <table:table-cell office:value-type="string">
            <text:p>¿Apalancamiento?</text:p>
          </table:table-cell>
          <table:table-cell office:value-type="string">
            <text:p>KIID</text:p>
          </table:table-cell>
          <table:table-cell office:value-type="string">
            <text:p>Riesgo</text:p>
          </table:table-cell>
          <table:table-cell office:value-type="string">
            <text:p>Yes/No</text:p>
          </table:table-cell>
          <table:table-cell table:number-columns-repeated="3" office:value-type="string">
            <text:p>Sí</text:p>
          </table:table-cell>
          <table:table-cell office:value-type="string">
            <text:p>Booleano</text:p>
          </table:table-cell>
        </table:table-row>
        <table:table-row table:style-name="ro1">
          <table:table-cell office:value-type="string">
            <text:p>Liquidity_Profile</text:p>
          </table:table-cell>
          <table:table-cell office:value-type="string">
            <text:p>Estructura</text:p>
          </table:table-cell>
          <table:table-cell office:value-type="string">
            <text:p>¿Liquidez?</text:p>
          </table:table-cell>
          <table:table-cell office:value-type="string">
            <text:p>Inferido</text:p>
          </table:table-cell>
          <table:table-cell office:value-type="string">
            <text:p>Liquidez</text:p>
          </table:table-cell>
          <table:table-cell office:value-type="string">
            <text:p>Alta…</text:p>
          </table:table-cell>
          <table:table-cell table:number-columns-repeated="3" office:value-type="string">
            <text:p>Sí</text:p>
          </table:table-cell>
          <table:table-cell office:value-type="string">
            <text:p>Alta, Media, Baja</text:p>
          </table:table-cell>
        </table:table-row>
        <table:table-row table:style-name="ro1">
          <table:table-cell office:value-type="string">
            <text:p>Distribution_Frequency</text:p>
          </table:table-cell>
          <table:table-cell office:value-type="string">
            <text:p>Producto</text:p>
          </table:table-cell>
          <table:table-cell office:value-type="string">
            <text:p>¿Frecuencia?</text:p>
          </table:table-cell>
          <table:table-cell office:value-type="string">
            <text:p>KIID</text:p>
          </table:table-cell>
          <table:table-cell office:value-type="string">
            <text:p>Distribución</text:p>
          </table:table-cell>
          <table:table-cell office:value-type="string">
            <text:p>Annual…</text:p>
          </table:table-cell>
          <table:table-cell table:number-columns-repeated="3" office:value-type="string">
            <text:p>Sí</text:p>
          </table:table-cell>
          <table:table-cell office:value-type="string">
            <text:p>Lista cerrada</text:p>
          </table:table-cell>
        </table:table-row>
        <table:table-row table:style-name="ro1">
          <table:table-cell office:value-type="string">
            <text:p>Market_Cap_Focus</text:p>
          </table:table-cell>
          <table:table-cell office:value-type="string">
            <text:p>Exposición</text:p>
          </table:table-cell>
          <table:table-cell office:value-type="string">
            <text:p>¿Capitalización?</text:p>
          </table:table-cell>
          <table:table-cell office:value-type="string">
            <text:p>RV</text:p>
          </table:table-cell>
          <table:table-cell office:value-type="string">
            <text:p>Sesgo</text:p>
          </table:table-cell>
          <table:table-cell office:value-type="string">
            <text:p>Large…</text:p>
          </table:table-cell>
          <table:table-cell table:number-columns-repeated="3" office:value-type="string">
            <text:p>Sí</text:p>
          </table:table-cell>
          <table:table-cell office:value-type="string">
            <text:p>Large, Mid, Small</text:p>
          </table:table-cell>
        </table:table-row>
        <table:table-row table:style-name="ro1">
          <table:table-cell office:value-type="string">
            <text:p>Sector_Focus</text:p>
          </table:table-cell>
          <table:table-cell office:value-type="string">
            <text:p>Exposición</text:p>
          </table:table-cell>
          <table:table-cell office:value-type="string">
            <text:p>¿Sector?</text:p>
          </table:table-cell>
          <table:table-cell office:value-type="string">
            <text:p>RV</text:p>
          </table:table-cell>
          <table:table-cell office:value-type="string">
            <text:p>Sector</text:p>
          </table:table-cell>
          <table:table-cell office:value-type="string">
            <text:p>Texto</text:p>
          </table:table-cell>
          <table:table-cell table:number-columns-repeated="3" office:value-type="string">
            <text:p>Sí</text:p>
          </table:table-cell>
          <table:table-cell office:value-type="string">
            <text:p>Lista cerrada</text:p>
          </table:table-cell>
        </table:table-row>
        <table:table-row table:style-name="ro1">
          <table:table-cell office:value-type="string">
            <text:p>Currency_Hedged</text:p>
          </table:table-cell>
          <table:table-cell office:value-type="string">
            <text:p>Estructura</text:p>
          </table:table-cell>
          <table:table-cell office:value-type="string">
            <text:p>¿Cubierto?</text:p>
          </table:table-cell>
          <table:table-cell office:value-type="string">
            <text:p>Derivado</text:p>
          </table:table-cell>
          <table:table-cell office:value-type="string">
            <text:p>FX</text:p>
          </table:table-cell>
          <table:table-cell office:value-type="string">
            <text:p>Yes/No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Investment_Universe</text:p>
          </table:table-cell>
          <table:table-cell office:value-type="string">
            <text:p>Exposición</text:p>
          </table:table-cell>
          <table:table-cell office:value-type="string">
            <text:p>¿Universo?</text:p>
          </table:table-cell>
          <table:table-cell office:value-type="string">
            <text:p>Texto</text:p>
          </table:table-cell>
          <table:table-cell office:value-type="string">
            <text:p>Universo</text:p>
          </table:table-cell>
          <table:table-cell office:value-type="string">
            <text:p>Texto</text:p>
          </table:table-cell>
          <table:table-cell table:number-columns-repeated="3" office:value-type="string">
            <text:p>Sí</text:p>
          </table:table-cell>
          <table:table-cell office:value-type="string">
            <text:p>Lista estructurada</text:p>
          </table:table-cell>
        </table:table-row>
      </table:table>
      <table:table table:name="Añadir" table:style-name="ta1" table:print="false"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Grupo</text:p>
          </table:table-cell>
          <table:table-cell table:style-name="ce1" office:value-type="string">
            <text:p>Pregunta</text:p>
          </table:table-cell>
          <table:table-cell table:style-name="ce1" office:value-type="string">
            <text:p>Criterio</text:p>
          </table:table-cell>
          <table:table-cell table:style-name="ce1" office:value-type="string">
            <text:p>Objeto</text:p>
          </table:table-cell>
          <table:table-cell table:style-name="ce1" office:value-type="string">
            <text:p>Población</text:p>
          </table:table-cell>
        </table:table-row>
        <table:table-row table:style-name="ro1">
          <table:table-cell office:value-type="string">
            <text:p>Volatility_Target</text:p>
          </table:table-cell>
          <table:table-cell office:value-type="string">
            <text:p>Estrategia</text:p>
          </table:table-cell>
          <table:table-cell office:value-type="string">
            <text:p>¿Objetivo de volatilidad?</text:p>
          </table:table-cell>
          <table:table-cell office:value-type="string">
            <text:p>KIID / nombre</text:p>
          </table:table-cell>
          <table:table-cell office:value-type="string">
            <text:p>Control riesgo</text:p>
          </table:table-cell>
          <table:table-cell office:value-type="string">
            <text:p>5%, 10%, etc.</text:p>
          </table:table-cell>
        </table:table-row>
        <table:table-row table:style-name="ro1">
          <table:table-cell office:value-type="string">
            <text:p>Income_Yield_Target</text:p>
          </table:table-cell>
          <table:table-cell office:value-type="string">
            <text:p>Estrategia</text:p>
          </table:table-cell>
          <table:table-cell office:value-type="string">
            <text:p>¿Objetivo de rentas?</text:p>
          </table:table-cell>
          <table:table-cell office:value-type="string">
            <text:p>KIID</text:p>
          </table:table-cell>
          <table:table-cell office:value-type="string">
            <text:p>Income</text:p>
          </table:table-cell>
          <table:table-cell office:value-type="string">
            <text:p>Bajo, Medio, Alto</text:p>
          </table:table-cell>
        </table:table-row>
        <table:table-row table:style-name="ro1">
          <table:table-cell office:value-type="string">
            <text:p>Credit_Quality</text:p>
          </table:table-cell>
          <table:table-cell office:value-type="string">
            <text:p>Exposición</text:p>
          </table:table-cell>
          <table:table-cell office:value-type="string">
            <text:p>¿Calidad crediticia?</text:p>
          </table:table-cell>
          <table:table-cell office:value-type="string">
            <text:p>RF</text:p>
          </table:table-cell>
          <table:table-cell office:value-type="string">
            <text:p>Riesgo crédito</text:p>
          </table:table-cell>
          <table:table-cell office:value-type="string">
            <text:p>IG, HY, Mixed</text:p>
          </table:table-cell>
        </table:table-row>
        <table:table-row table:style-name="ro1">
          <table:table-cell office:value-type="string">
            <text:p>Duration_Target</text:p>
          </table:table-cell>
          <table:table-cell office:value-type="string">
            <text:p>Exposición</text:p>
          </table:table-cell>
          <table:table-cell office:value-type="string">
            <text:p>¿Duración RF?</text:p>
          </table:table-cell>
          <table:table-cell office:value-type="string">
            <text:p>KIID</text:p>
          </table:table-cell>
          <table:table-cell office:value-type="string">
            <text:p>Sensibilidad tipos</text:p>
          </table:table-cell>
          <table:table-cell office:value-type="string">
            <text:p>Short, Medium, Long</text:p>
          </table:table-cell>
        </table:table-row>
        <table:table-row table:style-name="ro1">
          <table:table-cell office:value-type="string">
            <text:p>Management_Type</text:p>
          </table:table-cell>
          <table:table-cell office:value-type="string">
            <text:p>Estrategia</text:p>
          </table:table-cell>
          <table:table-cell office:value-type="string">
            <text:p>¿Gestión activa/pasiva?</text:p>
          </table:table-cell>
          <table:table-cell office:value-type="string">
            <text:p>Derivado</text:p>
          </table:table-cell>
          <table:table-cell office:value-type="string">
            <text:p>Tipo gestión</text:p>
          </table:table-cell>
          <table:table-cell office:value-type="string">
            <text:p>Active, Passive</text:p>
          </table:table-cell>
        </table:table-row>
      </table:table>
      <table:table table:name="DiccionarioDeValor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1022" table:default-cell-style-name="Default"/>
        <table:table-row table:style-name="ro2">
          <table:table-cell table:style-name="ce1" office:value-type="string">
            <text:p>Atributo</text:p>
          </table:table-cell>
          <table:table-cell table:style-name="ce1" office:value-type="string">
            <text:p>Val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und_Nature</text:p>
          </table:table-cell>
          <table:table-cell table:style-name="ce2" office:value-type="string">
            <text:p>Monetario, Renta Fija Corto Plazo, Renta Fija Flexible, Renta Fija Largo Plazo, Renta Variable, Mixto, Alternativ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rofile</text:p>
          </table:table-cell>
          <table:table-cell table:style-name="ce2" office:value-type="string">
            <text:p>Conservador, Moderado, Dinámic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Allocation, Absolute Return, Equity, Fixed Income, Multi-Asset, Index, ETF, Fund of Fund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amily</text:p>
          </table:table-cell>
          <table:table-cell table:style-name="ce2" office:value-type="string">
            <text:p>Income, Growth, Balanced, Defensive, Opportunistic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tyle_Profile</text:p>
          </table:table-cell>
          <table:table-cell table:style-name="ce2" office:value-type="string">
            <text:p>Strategic, Tactical, Active, Passiv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eography</text:p>
          </table:table-cell>
          <table:table-cell table:style-name="ce2" office:value-type="string">
            <text:p>Global, Europa, USA, Norteamérica, Emergentes, Asia, Japón, Latinoamérica, África, Oriente Medi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heme</text:p>
          </table:table-cell>
          <table:table-cell table:style-name="ce2" office:value-type="string">
            <text:p>Tecnología, Salud, Energía, ESG, Infraestructura, Consumo, Fintech, Agua, Oro, Clima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Exposure_Bias</text:p>
          </table:table-cell>
          <table:table-cell table:style-name="ce2" office:value-type="string">
            <text:p>Long Only, Long/Short, Market Neutral, Directional, Credit Bias, Macr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RRI</text:p>
          </table:table-cell>
          <table:table-cell table:style-name="ce2" office:value-type="string">
            <text:p>1, 2, 3, 4, 5, 6, 7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und_Currency</text:p>
          </table:table-cell>
          <table:table-cell table:style-name="ce2" office:value-type="string">
            <text:p>EUR, USD, GBP, CHF, JP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ortfolio_Currency</text:p>
          </table:table-cell>
          <table:table-cell table:style-name="ce2" office:value-type="string">
            <text:p>EUR, USD, GBP, CHF, JP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edging_Policy</text:p>
          </table:table-cell>
          <table:table-cell table:style-name="ce2" office:value-type="string">
            <text:p>Hedged, Unhedg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eplication_Method</text:p>
          </table:table-cell>
          <table:table-cell table:style-name="ce2" office:value-type="string">
            <text:p>Physical, Synthetic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erivatives_Usage</text:p>
          </table:table-cell>
          <table:table-cell table:style-name="ce2" office:value-type="string">
            <text:p>Yes, No, Limit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enchmark_Type</text:p>
          </table:table-cell>
          <table:table-cell table:style-name="ce2" office:value-type="string">
            <text:p>Reference, Target, No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ccumulation_Policy</text:p>
          </table:table-cell>
          <table:table-cell table:style-name="ce2" office:value-type="string">
            <text:p>Accumulation, Distribu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fdr_Article</text:p>
          </table:table-cell>
          <table:table-cell table:style-name="ce2" office:value-type="string">
            <text:p>Article 6, Article 8, Article 9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everage_Used</text:p>
          </table:table-cell>
          <table:table-cell table:style-name="ce2" office:value-type="string">
            <text:p>Yes, N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iquidity_Profile</text:p>
          </table:table-cell>
          <table:table-cell table:style-name="ce2" office:value-type="string">
            <text:p>Alta, Media, Baja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istribution_Frequency</text:p>
          </table:table-cell>
          <table:table-cell table:style-name="ce2" office:value-type="string">
            <text:p>Mensual, Trimestral, Semestral, Anual, No Distribuy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rket_Cap_Focus</text:p>
          </table:table-cell>
          <table:table-cell table:style-name="ce2" office:value-type="string">
            <text:p>Large Cap, Mid Cap, Small Cap, All Ca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ctor_Focus</text:p>
          </table:table-cell>
          <table:table-cell table:style-name="ce2" office:value-type="string">
            <text:p>Tecnología, Financiero, Salud, Energía, Industrial, Consumo, Materiales, Utilities, Telecomunicaciones, Inmobiliari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urrency_Hedged</text:p>
          </table:table-cell>
          <table:table-cell table:style-name="ce2" office:value-type="string">
            <text:p>Yes, N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nvestment_Universe</text:p>
          </table:table-cell>
          <table:table-cell table:style-name="ce2" office:value-type="string">
            <text:p>Global Diversificado, Renta Variable Desarrollada, Renta Variable Emergente, Renta Fija Gobierno, Renta Fija Corporativa, High Yield, Mixto Global, Alternativo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s_ESG</text:p>
          </table:table-cell>
          <table:table-cell table:style-name="ce2" office:value-type="string">
            <text:p>Yes, N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ata_Quality_Flag</text:p>
          </table:table-cell>
          <table:table-cell table:style-name="ce2" office:value-type="string">
            <text:p>OK, WARN, ERR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RRI_Quality_Flag</text:p>
          </table:table-cell>
          <table:table-cell table:style-name="ce2" office:value-type="string">
            <text:p>OK, WARN, ERR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latility_Target</text:p>
          </table:table-cell>
          <table:table-cell table:style-name="ce2" office:value-type="string">
            <text:p>5%, 10%, 15%, 20%, Sin Objetiv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ncome_Yield_Target</text:p>
          </table:table-cell>
          <table:table-cell table:style-name="ce2" office:value-type="string">
            <text:p>Bajo, Medio, Alt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redit_Quality</text:p>
          </table:table-cell>
          <table:table-cell table:style-name="ce2" office:value-type="string">
            <text:p>Investment Grade, High Yield, Mixt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uration_Target</text:p>
          </table:table-cell>
          <table:table-cell table:style-name="ce2" office:value-type="string">
            <text:p>Corto Plazo, Medio Plazo, Largo Plaz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nagement_Type</text:p>
          </table:table-cell>
          <table:table-cell table:style-name="ce2" office:value-type="string">
            <text:p>Active, Passive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1">01/04/2026</text:date>, <text:time>22:25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ntonio Cormenzana Elosua</meta:initial-creator>
    <meta:creation-date>2026-04-01T22:14:42.21</meta:creation-date>
    <dc:date>2026-04-01T22:25:43.38</dc:date>
    <dc:creator>Jose Antonio Cormenzana Elosua</dc:creator>
    <meta:editing-duration>PT11M1S</meta:editing-duration>
    <meta:editing-cycles>2</meta:editing-cycles>
    <meta:generator>OpenOffice/4.1.16$Win32 OpenOffice.org_project/4116m3$Build-9816</meta:generator>
    <meta:document-statistic meta:table-count="4" meta:cell-count="504" meta:object-count="0"/>
  </office:meta>
</office:document-meta>
</file>