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89cm"/>
    </style:style>
    <style:style style:name="co2" style:family="table-column">
      <style:table-column-properties fo:break-before="auto" style:column-width="4.722cm"/>
    </style:style>
    <style:style style:name="co3" style:family="table-column">
      <style:table-column-properties fo:break-before="auto" style:column-width="3.279cm"/>
    </style:style>
    <style:style style:name="co4" style:family="table-column">
      <style:table-column-properties fo:break-before="auto" style:column-width="8.246cm"/>
    </style:style>
    <style:style style:name="co5" style:family="table-column">
      <style:table-column-properties fo:break-before="auto" style:column-width="10.328cm"/>
    </style:style>
    <style:style style:name="co6" style:family="table-column">
      <style:table-column-properties fo:break-before="auto" style:column-width="1.707cm"/>
    </style:style>
    <style:style style:name="co7" style:family="table-column">
      <style:table-column-properties fo:break-before="auto" style:column-width="4.277cm"/>
    </style:style>
    <style:style style:name="co8" style:family="table-column">
      <style:table-column-properties fo:break-before="auto" style:column-width="4.249cm"/>
    </style:style>
    <style:style style:name="co9" style:family="table-column">
      <style:table-column-properties fo:break-before="auto" style:column-width="2.669cm"/>
    </style:style>
    <style:style style:name="co10" style:family="table-column">
      <style:table-column-properties fo:break-before="auto" style:column-width="8.911cm"/>
    </style:style>
    <style:style style:name="co11" style:family="table-column">
      <style:table-column-properties fo:break-before="auto" style:column-width="7.414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fund_5f_master">
      <style:table-properties table:display="true" style:writing-mode="lr-tb"/>
    </style:style>
    <style:style style:name="ta2" style:family="table" style:master-page-name="PageStyle_5f_fund_5f_kiid_5f_metadata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und_master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9" table:default-cell-style-name="Excel_20_Built-in_20_Normal"/>
        <table:table-row table:style-name="ro1">
          <table:table-cell office:value-type="string">
            <text:p>Atributo</text:p>
          </table:table-cell>
          <table:table-cell office:value-type="string">
            <text:p>Ámbito</text:p>
          </table:table-cell>
          <table:table-cell office:value-type="string">
            <text:p>Naturaleza</text:p>
          </table:table-cell>
          <table:table-cell office:value-type="string">
            <text:p>Objeto</text:p>
          </table:table-cell>
          <table:table-cell office:value-type="string">
            <text:p>Población de valores</text:p>
          </table:table-cell>
          <table:table-cell table:number-columns-repeated="1019"/>
        </table:table-row>
        <table:table-row table:style-name="ro1">
          <table:table-cell office:value-type="string">
            <text:p>ISIN</text:p>
          </table:table-cell>
          <table:table-cell office:value-type="string">
            <text:p>Identificación</text:p>
          </table:table-cell>
          <table:table-cell office:value-type="string">
            <text:p>Clave primaria</text:p>
          </table:table-cell>
          <table:table-cell office:value-type="string">
            <text:p>Identificar de forma única el fondo</text:p>
          </table:table-cell>
          <table:table-cell office:value-type="string">
            <text:p>Código ISIN (12 caracteres alfanuméricos)</text:p>
          </table:table-cell>
          <table:table-cell table:number-columns-repeated="1019"/>
        </table:table-row>
        <table:table-row table:style-name="ro1">
          <table:table-cell office:value-type="string">
            <text:p>Fund_Name</text:p>
          </table:table-cell>
          <table:table-cell office:value-type="string">
            <text:p>Identificación</text:p>
          </table:table-cell>
          <table:table-cell office:value-type="string">
            <text:p>Texto descriptivo</text:p>
          </table:table-cell>
          <table:table-cell office:value-type="string">
            <text:p>Nombre oficial del fondo</text:p>
          </table:table-cell>
          <table:table-cell office:value-type="string">
            <text:p>Texto libre</text:p>
          </table:table-cell>
          <table:table-cell table:number-columns-repeated="1019"/>
        </table:table-row>
        <table:table-row table:style-name="ro1">
          <table:table-cell office:value-type="string">
            <text:p>Management_Company</text:p>
          </table:table-cell>
          <table:table-cell office:value-type="string">
            <text:p>Identificación</text:p>
          </table:table-cell>
          <table:table-cell office:value-type="string">
            <text:p>Texto descriptivo</text:p>
          </table:table-cell>
          <table:table-cell office:value-type="string">
            <text:p>Entidad gestora del fondo</text:p>
          </table:table-cell>
          <table:table-cell office:value-type="string">
            <text:p>Nombre de gestora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Clasificación</text:p>
          </table:table-cell>
          <table:table-cell office:value-type="string">
            <text:p>Categoría</text:p>
          </table:table-cell>
          <table:table-cell office:value-type="string">
            <text:p>Naturaleza estructural del fondo</text:p>
          </table:table-cell>
          <table:table-cell office:value-type="string">
            <text:p>UCITS, ETF, AIF, etc.</text:p>
          </table:table-cell>
          <table:table-cell table:number-columns-repeated="1019"/>
        </table:table-row>
        <table:table-row table:style-name="ro1">
          <table:table-cell office:value-type="string">
            <text:p>Profile</text:p>
          </table:table-cell>
          <table:table-cell office:value-type="string">
            <text:p>Clasificación</text:p>
          </table:table-cell>
          <table:table-cell office:value-type="string">
            <text:p>Categoría</text:p>
          </table:table-cell>
          <table:table-cell office:value-type="string">
            <text:p>Perfil general del fondo</text:p>
          </table:table-cell>
          <table:table-cell office:value-type="string">
            <text:p>Renta fija, renta variable, mixto, monetario, alternativo</text:p>
          </table:table-cell>
          <table:table-cell table:number-columns-repeated="1019"/>
        </table:table-row>
        <table:table-row table:style-name="ro1">
          <table:table-cell office:value-type="string">
            <text:p>Type</text:p>
          </table:table-cell>
          <table:table-cell office:value-type="string">
            <text:p>Clasificación</text:p>
          </table:table-cell>
          <table:table-cell office:value-type="string">
            <text:p>Categoría</text:p>
          </table:table-cell>
          <table:table-cell office:value-type="string">
            <text:p>Tipo específico dentro del perfil</text:p>
          </table:table-cell>
          <table:table-cell office:value-type="string">
            <text:p>Subcategorías del perfil</text:p>
          </table:table-cell>
          <table:table-cell table:number-columns-repeated="1019"/>
        </table:table-row>
        <table:table-row table:style-name="ro1">
          <table:table-cell office:value-type="string">
            <text:p>Family</text:p>
          </table:table-cell>
          <table:table-cell office:value-type="string">
            <text:p>Clasificación</text:p>
          </table:table-cell>
          <table:table-cell office:value-type="string">
            <text:p>Categoría</text:p>
          </table:table-cell>
          <table:table-cell office:value-type="string">
            <text:p>Familia de estrategia</text:p>
          </table:table-cell>
          <table:table-cell office:value-type="string">
            <text:p>Income, Growth, Balanced, etc.</text:p>
          </table:table-cell>
          <table:table-cell table:number-columns-repeated="1019"/>
        </table:table-row>
        <table:table-row table:style-name="ro1">
          <table:table-cell office:value-type="string">
            <text:p>Style_Profile</text:p>
          </table:table-cell>
          <table:table-cell office:value-type="string">
            <text:p>Clasificación</text:p>
          </table:table-cell>
          <table:table-cell office:value-type="string">
            <text:p>Categoría</text:p>
          </table:table-cell>
          <table:table-cell office:value-type="string">
            <text:p>Estilo de gestión</text:p>
          </table:table-cell>
          <table:table-cell office:value-type="string">
            <text:p>Value, Growth, Blend, Flexible, etc.</text:p>
          </table:table-cell>
          <table:table-cell table:number-columns-repeated="1019"/>
        </table:table-row>
        <table:table-row table:style-name="ro1">
          <table:table-cell office:value-type="string">
            <text:p>Geography</text:p>
          </table:table-cell>
          <table:table-cell office:value-type="string">
            <text:p>Clasificación</text:p>
          </table:table-cell>
          <table:table-cell office:value-type="string">
            <text:p>Categoría</text:p>
          </table:table-cell>
          <table:table-cell office:value-type="string">
            <text:p>Ámbito geográfico de inversión</text:p>
          </table:table-cell>
          <table:table-cell office:value-type="string">
            <text:p>Global, Europe, US, Emerging Markets, etc.</text:p>
          </table:table-cell>
          <table:table-cell table:number-columns-repeated="1019"/>
        </table:table-row>
        <table:table-row table:style-name="ro1">
          <table:table-cell office:value-type="string">
            <text:p>Theme</text:p>
          </table:table-cell>
          <table:table-cell office:value-type="string">
            <text:p>Clasificación</text:p>
          </table:table-cell>
          <table:table-cell office:value-type="string">
            <text:p>Categoría</text:p>
          </table:table-cell>
          <table:table-cell office:value-type="string">
            <text:p>Temática de inversión</text:p>
          </table:table-cell>
          <table:table-cell office:value-type="string">
            <text:p>Technology, ESG, Healthcare, etc.</text:p>
          </table:table-cell>
          <table:table-cell table:number-columns-repeated="1019"/>
        </table:table-row>
        <table:table-row table:style-name="ro1">
          <table:table-cell office:value-type="string">
            <text:p>Exposure_Bias</text:p>
          </table:table-cell>
          <table:table-cell office:value-type="string">
            <text:p>Clasificación</text:p>
          </table:table-cell>
          <table:table-cell office:value-type="string">
            <text:p>Categoría</text:p>
          </table:table-cell>
          <table:table-cell office:value-type="string">
            <text:p>Sesgo principal de exposición</text:p>
          </table:table-cell>
          <table:table-cell office:value-type="string">
            <text:p>Large Cap, Small Cap, Duration Bias, etc.</text:p>
          </table:table-cell>
          <table:table-cell table:number-columns-repeated="1019"/>
        </table:table-row>
        <table:table-row table:style-name="ro1">
          <table:table-cell office:value-type="string">
            <text:p>Subtype</text:p>
          </table:table-cell>
          <table:table-cell office:value-type="string">
            <text:p>Clasificación</text:p>
          </table:table-cell>
          <table:table-cell office:value-type="string">
            <text:p>Categoría</text:p>
          </table:table-cell>
          <table:table-cell office:value-type="string">
            <text:p>Subtipo final de clasificación</text:p>
          </table:table-cell>
          <table:table-cell office:value-type="string">
            <text:p>Combinaciones específicas de estrategia</text:p>
          </table:table-cell>
          <table:table-cell table:number-columns-repeated="1019"/>
        </table:table-row>
        <table:table-row table:style-name="ro1">
          <table:table-cell office:value-type="string">
            <text:p>Heuristic_Block</text:p>
          </table:table-cell>
          <table:table-cell office:value-type="string">
            <text:p>Control interno</text:p>
          </table:table-cell>
          <table:table-cell office:value-type="string">
            <text:p>Etiqueta técnica</text:p>
          </table:table-cell>
          <table:table-cell office:value-type="string">
            <text:p>Bloque heurístico que clasificó el fondo</text:p>
          </table:table-cell>
          <table:table-cell office:value-type="string">
            <text:p>Nombre del bloque de reglas</text:p>
          </table:table-cell>
          <table:table-cell table:number-columns-repeated="1019"/>
        </table:table-row>
        <table:table-row table:style-name="ro1">
          <table:table-cell office:value-type="string">
            <text:p>Heuristic_Core</text:p>
          </table:table-cell>
          <table:table-cell office:value-type="string">
            <text:p>Control interno</text:p>
          </table:table-cell>
          <table:table-cell office:value-type="string">
            <text:p>Etiqueta técnica</text:p>
          </table:table-cell>
          <table:table-cell office:value-type="string">
            <text:p>Regla central utilizada para inferir clasificación</text:p>
          </table:table-cell>
          <table:table-cell office:value-type="string">
            <text:p>Nombre de regla heurística</text:p>
          </table:table-cell>
          <table:table-cell table:number-columns-repeated="1019"/>
        </table:table-row>
        <table:table-row table:style-name="ro1">
          <table:table-cell office:value-type="string">
            <text:p>SRRI</text:p>
          </table:table-cell>
          <table:table-cell office:value-type="string">
            <text:p>Riesgo</text:p>
          </table:table-cell>
          <table:table-cell office:value-type="string">
            <text:p>Ordinal</text:p>
          </table:table-cell>
          <table:table-cell office:value-type="string">
            <text:p>Indicador sintético de riesgo y rentabilidad</text:p>
          </table:table-cell>
          <table:table-cell office:value-type="string">
            <text:p>Entero 1–7</text:p>
          </table:table-cell>
          <table:table-cell table:number-columns-repeated="1019"/>
        </table:table-row>
        <table:table-row table:style-name="ro1">
          <table:table-cell office:value-type="string">
            <text:p>Fund_Currency</text:p>
          </table:table-cell>
          <table:table-cell office:value-type="string">
            <text:p>Características financieras</text:p>
          </table:table-cell>
          <table:table-cell office:value-type="string">
            <text:p>Código</text:p>
          </table:table-cell>
          <table:table-cell office:value-type="string">
            <text:p>Divisa base del fondo</text:p>
          </table:table-cell>
          <table:table-cell office:value-type="string">
            <text:p>ISO 4217 (EUR, USD, GBP, etc.)</text:p>
          </table:table-cell>
          <table:table-cell table:number-columns-repeated="1019"/>
        </table:table-row>
        <table:table-row table:style-name="ro1">
          <table:table-cell office:value-type="string">
            <text:p>Portfolio_Currency</text:p>
          </table:table-cell>
          <table:table-cell office:value-type="string">
            <text:p>Características financieras</text:p>
          </table:table-cell>
          <table:table-cell office:value-type="string">
            <text:p>Código</text:p>
          </table:table-cell>
          <table:table-cell office:value-type="string">
            <text:p>Divisa principal de la cartera</text:p>
          </table:table-cell>
          <table:table-cell office:value-type="string">
            <text:p>ISO 4217</text:p>
          </table:table-cell>
          <table:table-cell table:number-columns-repeated="1019"/>
        </table:table-row>
        <table:table-row table:style-name="ro1">
          <table:table-cell office:value-type="string">
            <text:p>Hedging_Policy</text:p>
          </table:table-cell>
          <table:table-cell office:value-type="string">
            <text:p>Política de inversión</text:p>
          </table:table-cell>
          <table:table-cell office:value-type="string">
            <text:p>Categoría</text:p>
          </table:table-cell>
          <table:table-cell office:value-type="string">
            <text:p>Política de cobertura de divisa</text:p>
          </table:table-cell>
          <table:table-cell office:value-type="string">
            <text:p>Hedged, Unhedged, Partial</text:p>
          </table:table-cell>
          <table:table-cell table:number-columns-repeated="1019"/>
        </table:table-row>
        <table:table-row table:style-name="ro1">
          <table:table-cell office:value-type="string">
            <text:p>Replication_Method</text:p>
          </table:table-cell>
          <table:table-cell office:value-type="string">
            <text:p>Política de inversión</text:p>
          </table:table-cell>
          <table:table-cell office:value-type="string">
            <text:p>Categoría</text:p>
          </table:table-cell>
          <table:table-cell office:value-type="string">
            <text:p>Método de replicación (ETF)</text:p>
          </table:table-cell>
          <table:table-cell office:value-type="string">
            <text:p>Physical, Synthetic</text:p>
          </table:table-cell>
          <table:table-cell table:number-columns-repeated="1019"/>
        </table:table-row>
        <table:table-row table:style-name="ro1">
          <table:table-cell office:value-type="string">
            <text:p>Derivatives_Usage</text:p>
          </table:table-cell>
          <table:table-cell office:value-type="string">
            <text:p>Política de inversión</text:p>
          </table:table-cell>
          <table:table-cell office:value-type="string">
            <text:p>Categoría</text:p>
          </table:table-cell>
          <table:table-cell office:value-type="string">
            <text:p>Uso de derivados</text:p>
          </table:table-cell>
          <table:table-cell office:value-type="string">
            <text:p>None, Hedging, Efficient Portfolio Management, Extensive</text:p>
          </table:table-cell>
          <table:table-cell table:number-columns-repeated="1019"/>
        </table:table-row>
        <table:table-row table:style-name="ro1">
          <table:table-cell office:value-type="string">
            <text:p>Benchmark_Declared</text:p>
          </table:table-cell>
          <table:table-cell office:value-type="string">
            <text:p>Referencia de mercado</text:p>
          </table:table-cell>
          <table:table-cell office:value-type="string">
            <text:p>Texto / indicador</text:p>
          </table:table-cell>
          <table:table-cell office:value-type="string">
            <text:p>Benchmark declarado en el KIID</text:p>
          </table:table-cell>
          <table:table-cell office:value-type="string">
            <text:p>Nombre de índice o vacío</text:p>
          </table:table-cell>
          <table:table-cell table:number-columns-repeated="1019"/>
        </table:table-row>
        <table:table-row table:style-name="ro1">
          <table:table-cell office:value-type="string">
            <text:p>Inference_Trace</text:p>
          </table:table-cell>
          <table:table-cell office:value-type="string">
            <text:p>Trazabilidad</text:p>
          </table:table-cell>
          <table:table-cell office:value-type="string">
            <text:p>Texto técnico</text:p>
          </table:table-cell>
          <table:table-cell office:value-type="string">
            <text:p>Registro de cómo se infirió la clasificación</text:p>
          </table:table-cell>
          <table:table-cell office:value-type="string">
            <text:p>Log estructurado o texto</text:p>
          </table:table-cell>
          <table:table-cell table:number-columns-repeated="1019"/>
        </table:table-row>
        <table:table-row table:style-name="ro1">
          <table:table-cell office:value-type="string">
            <text:p>SRRI_Quality_Flag</text:p>
          </table:table-cell>
          <table:table-cell office:value-type="string">
            <text:p>Control calidad</text:p>
          </table:table-cell>
          <table:table-cell office:value-type="string">
            <text:p>Indicador</text:p>
          </table:table-cell>
          <table:table-cell office:value-type="string">
            <text:p>Calidad de extracción del SRRI</text:p>
          </table:table-cell>
          <table:table-cell office:value-type="string">
            <text:p>OK, Estimated, Missing, Conflict</text:p>
          </table:table-cell>
          <table:table-cell table:number-columns-repeated="1019"/>
        </table:table-row>
        <table:table-row table:style-name="ro1">
          <table:table-cell office:value-type="string">
            <text:p>Data_Quality_Flag</text:p>
          </table:table-cell>
          <table:table-cell office:value-type="string">
            <text:p>Control calidad</text:p>
          </table:table-cell>
          <table:table-cell office:value-type="string">
            <text:p>Indicador</text:p>
          </table:table-cell>
          <table:table-cell office:value-type="string">
            <text:p>Estado general de calidad de datos</text:p>
          </table:table-cell>
          <table:table-cell office:value-type="string">
            <text:p>OK, Incomplete, Review</text:p>
          </table:table-cell>
          <table:table-cell table:number-columns-repeated="1019"/>
        </table:table-row>
        <table:table-row table:style-name="ro1">
          <table:table-cell office:value-type="string">
            <text:p>Updated_At</text:p>
          </table:table-cell>
          <table:table-cell office:value-type="string">
            <text:p>Trazabilidad</text:p>
          </table:table-cell>
          <table:table-cell office:value-type="string">
            <text:p>Timestamp</text:p>
          </table:table-cell>
          <table:table-cell office:value-type="string">
            <text:p>Última actualización del registro</text:p>
          </table:table-cell>
          <table:table-cell office:value-type="string">
            <text:p>Fecha‑hora</text:p>
          </table:table-cell>
          <table:table-cell table:number-columns-repeated="101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nd_kiid_metadata" table:style-name="ta2" table:print="false">
        <office:forms form:automatic-focus="false" form:apply-design-mode="false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6" table:number-columns-repeated="1019" table:default-cell-style-name="Excel_20_Built-in_20_Normal"/>
        <table:table-row table:style-name="ro1">
          <table:table-cell office:value-type="string">
            <text:p>Atributo</text:p>
          </table:table-cell>
          <table:table-cell office:value-type="string">
            <text:p>Ámbito</text:p>
          </table:table-cell>
          <table:table-cell office:value-type="string">
            <text:p>Naturaleza</text:p>
          </table:table-cell>
          <table:table-cell office:value-type="string">
            <text:p>Objeto</text:p>
          </table:table-cell>
          <table:table-cell office:value-type="string">
            <text:p>Población de valores</text:p>
          </table:table-cell>
          <table:table-cell table:number-columns-repeated="1019"/>
        </table:table-row>
        <table:table-row table:style-name="ro1">
          <table:table-cell office:value-type="string">
            <text:p>ISIN</text:p>
          </table:table-cell>
          <table:table-cell office:value-type="string">
            <text:p>Identificación</text:p>
          </table:table-cell>
          <table:table-cell office:value-type="string">
            <text:p>Clave externa</text:p>
          </table:table-cell>
          <table:table-cell office:value-type="string">
            <text:p>ISIN del fondo asociado</text:p>
          </table:table-cell>
          <table:table-cell office:value-type="string">
            <text:p>Código ISIN</text:p>
          </table:table-cell>
          <table:table-cell table:number-columns-repeated="1019"/>
        </table:table-row>
        <table:table-row table:style-name="ro1">
          <table:table-cell office:value-type="string">
            <text:p>KIID_Class</text:p>
          </table:table-cell>
          <table:table-cell office:value-type="string">
            <text:p>Identificación</text:p>
          </table:table-cell>
          <table:table-cell office:value-type="string">
            <text:p>Categoría</text:p>
          </table:table-cell>
          <table:table-cell office:value-type="string">
            <text:p>Clase del fondo a la que corresponde el KIID</text:p>
          </table:table-cell>
          <table:table-cell office:value-type="string">
            <text:p>Clase A, C, I, etc.</text:p>
          </table:table-cell>
          <table:table-cell table:number-columns-repeated="1019"/>
        </table:table-row>
        <table:table-row table:style-name="ro1">
          <table:table-cell office:value-type="string">
            <text:p>KIID_URL</text:p>
          </table:table-cell>
          <table:table-cell office:value-type="string">
            <text:p>Origen documental</text:p>
          </table:table-cell>
          <table:table-cell office:value-type="string">
            <text:p>URL</text:p>
          </table:table-cell>
          <table:table-cell office:value-type="string">
            <text:p>Dirección de descarga del KIID</text:p>
          </table:table-cell>
          <table:table-cell office:value-type="string">
            <text:p>URL válida</text:p>
          </table:table-cell>
          <table:table-cell table:number-columns-repeated="1019"/>
        </table:table-row>
        <table:table-row table:style-name="ro1">
          <table:table-cell office:value-type="string">
            <text:p>KIID_PDF_Hash</text:p>
          </table:table-cell>
          <table:table-cell office:value-type="string">
            <text:p>Control documental</text:p>
          </table:table-cell>
          <table:table-cell office:value-type="string">
            <text:p>Hash</text:p>
          </table:table-cell>
          <table:table-cell office:value-type="string">
            <text:p>Huella digital del PDF descargado</text:p>
          </table:table-cell>
          <table:table-cell office:value-type="string">
            <text:p>Hash SHA o similar</text:p>
          </table:table-cell>
          <table:table-cell table:number-columns-repeated="1019"/>
        </table:table-row>
        <table:table-row table:style-name="ro1">
          <table:table-cell office:value-type="string">
            <text:p>KIID_Status</text:p>
          </table:table-cell>
          <table:table-cell office:value-type="string">
            <text:p>Control proceso</text:p>
          </table:table-cell>
          <table:table-cell office:value-type="string">
            <text:p>Categoría</text:p>
          </table:table-cell>
          <table:table-cell office:value-type="string">
            <text:p>Estado del documento KIID</text:p>
          </table:table-cell>
          <table:table-cell office:value-type="string">
            <text:p>Downloaded, Parsed, Missing, Error</text:p>
          </table:table-cell>
          <table:table-cell table:number-columns-repeated="1019"/>
        </table:table-row>
        <table:table-row table:style-name="ro1">
          <table:table-cell office:value-type="string">
            <text:p>Language</text:p>
          </table:table-cell>
          <table:table-cell office:value-type="string">
            <text:p>Origen documental</text:p>
          </table:table-cell>
          <table:table-cell office:value-type="string">
            <text:p>Código</text:p>
          </table:table-cell>
          <table:table-cell office:value-type="string">
            <text:p>Idioma del documento KIID</text:p>
          </table:table-cell>
          <table:table-cell office:value-type="string">
            <text:p>ISO 639‑1 (en, es, fr, de, etc.)</text:p>
          </table:table-cell>
          <table:table-cell table:number-columns-repeated="1019"/>
        </table:table-row>
        <table:table-row table:style-name="ro1">
          <table:table-cell office:value-type="string">
            <text:p>Raw_KIID_Text</text:p>
          </table:table-cell>
          <table:table-cell office:value-type="string">
            <text:p>Contenido documental</text:p>
          </table:table-cell>
          <table:table-cell office:value-type="string">
            <text:p>Texto</text:p>
          </table:table-cell>
          <table:table-cell office:value-type="string">
            <text:p>Texto extraído del KIID</text:p>
          </table:table-cell>
          <table:table-cell office:value-type="string">
            <text:p>Texto completo OCR o parseado</text:p>
          </table:table-cell>
          <table:table-cell table:number-columns-repeated="1019"/>
        </table:table-row>
        <table:table-row table:style-name="ro1">
          <table:table-cell office:value-type="string">
            <text:p>KIID_Published_Date</text:p>
          </table:table-cell>
          <table:table-cell office:value-type="string">
            <text:p>Metadatos documento</text:p>
          </table:table-cell>
          <table:table-cell office:value-type="string">
            <text:p>Fecha</text:p>
          </table:table-cell>
          <table:table-cell office:value-type="string">
            <text:p>Fecha de publicación del KIID</text:p>
          </table:table-cell>
          <table:table-cell office:value-type="string">
            <text:p>YYYY‑MM‑DD</text:p>
          </table:table-cell>
          <table:table-cell table:number-columns-repeated="1019"/>
        </table:table-row>
        <table:table-row table:style-name="ro1">
          <table:table-cell office:value-type="string">
            <text:p>KIID_Downloaded_At</text:p>
          </table:table-cell>
          <table:table-cell office:value-type="string">
            <text:p>Metadatos proceso</text:p>
          </table:table-cell>
          <table:table-cell office:value-type="string">
            <text:p>Timestamp</text:p>
          </table:table-cell>
          <table:table-cell office:value-type="string">
            <text:p>Momento de descarga del documento</text:p>
          </table:table-cell>
          <table:table-cell office:value-type="string">
            <text:p>Fecha‑hora</text:p>
          </table:table-cell>
          <table:table-cell table:number-columns-repeated="1019"/>
        </table:table-row>
        <table:table-row table:style-name="ro1">
          <table:table-cell office:value-type="string">
            <text:p>SRRI</text:p>
          </table:table-cell>
          <table:table-cell office:value-type="string">
            <text:p>Riesgo</text:p>
          </table:table-cell>
          <table:table-cell office:value-type="string">
            <text:p>Ordinal</text:p>
          </table:table-cell>
          <table:table-cell office:value-type="string">
            <text:p>SRRI detectado en el documento</text:p>
          </table:table-cell>
          <table:table-cell office:value-type="string">
            <text:p>Entero 1–7</text:p>
          </table:table-cell>
          <table:table-cell table:number-columns-repeated="1019"/>
        </table:table-row>
        <table:table-row table:style-name="ro1">
          <table:table-cell office:value-type="string">
            <text:p>SRRI_Visual</text:p>
          </table:table-cell>
          <table:table-cell office:value-type="string">
            <text:p>Riesgo</text:p>
          </table:table-cell>
          <table:table-cell office:value-type="string">
            <text:p>Ordinal</text:p>
          </table:table-cell>
          <table:table-cell office:value-type="string">
            <text:p>SRRI detectado visualmente</text:p>
          </table:table-cell>
          <table:table-cell office:value-type="string">
            <text:p>Entero 1–7</text:p>
          </table:table-cell>
          <table:table-cell table:number-columns-repeated="1019"/>
        </table:table-row>
        <table:table-row table:style-name="ro1">
          <table:table-cell office:value-type="string">
            <text:p>SRRI_Textual</text:p>
          </table:table-cell>
          <table:table-cell office:value-type="string">
            <text:p>Riesgo</text:p>
          </table:table-cell>
          <table:table-cell office:value-type="string">
            <text:p>Ordinal</text:p>
          </table:table-cell>
          <table:table-cell office:value-type="string">
            <text:p>SRRI detectado en el texto</text:p>
          </table:table-cell>
          <table:table-cell office:value-type="string">
            <text:p>Entero 1–7</text:p>
          </table:table-cell>
          <table:table-cell table:number-columns-repeated="1019"/>
        </table:table-row>
        <table:table-row table:style-name="ro1">
          <table:table-cell office:value-type="string">
            <text:p>SRRI_Validation_Status</text:p>
          </table:table-cell>
          <table:table-cell office:value-type="string">
            <text:p>Control calidad</text:p>
          </table:table-cell>
          <table:table-cell office:value-type="string">
            <text:p>Categoría</text:p>
          </table:table-cell>
          <table:table-cell office:value-type="string">
            <text:p>Resultado de validación entre SRRI visual y textual</text:p>
          </table:table-cell>
          <table:table-cell office:value-type="string">
            <text:p>Match, Mismatch, Only_Visual, Only_Text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8000" number:language="es" number:country="ES">
      <number:number number:min-integer-digits="1"/>
    </number:number-style>
    <number:number-style style:name="N8103P0" style:volatile="true" number:language="es" number:country="ES">
      <number:number number:decimal-places="0" number:min-integer-digits="1" number:grouping="true"/>
      <number:text> €</number:text>
    </number:number-style>
    <number:number-style style:name="N8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3P0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2" number:min-integer-digits="1" number:grouping="true"/>
      <number:text> €</number:text>
    </number:number-style>
    <number:number-style style:name="N8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5P0"/>
    </number:number-style>
    <number:number-style style:name="N8106P0" style:volatile="true" number:language="es" number:country="ES">
      <number:number number:decimal-places="2" number:min-integer-digits="1" number:grouping="true"/>
      <number:text> €</number:text>
    </number:number-style>
    <number:number-style style:name="N8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6P0"/>
    </number:number-style>
    <number:date-style style:name="N8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08" number:language="es" number:country="ES">
      <number:day number:style="long"/>
      <number:text>-</number:text>
      <number:month number:textual="true"/>
    </number:date-style>
    <number:date-style style:name="N8109" number:language="es" number:country="ES">
      <number:month number:textual="true"/>
      <number:text>-</number:text>
      <number:year/>
    </number:date-style>
    <number:time-style style:name="N8110" number:language="es" number:country="ES">
      <number:hours/>
      <number:text>:</number:text>
      <number:minutes number:style="long"/>
      <number:text> </number:text>
      <number:am-pm/>
    </number:time-style>
    <number:time-style style:name="N8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s" number:country="ES">
      <number:hours/>
      <number:text>:</number:text>
      <number:minutes number:style="long"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s" number:country="ES">
      <number:number number:decimal-places="0" number:min-integer-digits="1" number:grouping="true"/>
      <number:text>   </number:text>
    </number:number-style>
    <number:number-style style:name="N8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es" number:country="ES">
      <number:number number:decimal-places="0" number:min-integer-digits="1" number:grouping="true"/>
      <number:text>   </number:text>
    </number:number-style>
    <number:number-style style:name="N8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es" number:country="ES">
      <number:number number:decimal-places="2" number:min-integer-digits="1" number:grouping="true"/>
      <number:text>   </number:text>
    </number:number-style>
    <number:number-style style:name="N8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es" number:country="ES">
      <number:number number:decimal-places="2" number:min-integer-digits="1" number:grouping="true"/>
      <number:text>   </number:text>
    </number:number-style>
    <number:number-style style:name="N8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8119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19P2" style:volatile="true" number:language="es" number:country="ES">
      <number:text> -    </number:text>
    </number:number-style>
    <number:text-style style:name="N8119" number:language="es" number:country="ES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812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20P2" style:volatile="true" number:language="es" number:country="ES">
      <number:text> - € </number:text>
    </number:number-style>
    <number:text-style style:name="N8120" number:language="es" number:country="ES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8121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21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21" number:language="es" number:country="ES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8122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22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22" number:language="es" number:country="ES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s" number:country="ES">
      <number:minutes number:style="long"/>
      <number:text>:</number:text>
      <number:seconds number:style="long"/>
    </number:time-style>
    <number:time-style style:name="N8124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s" number:country="ES">
      <number:minutes number:style="long"/>
      <number:text>:</number:text>
      <number:seconds number:style="long" number:decimal-places="1"/>
    </number:time-style>
    <number:number-style style:name="N8126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07">07/03/2026</text:date>, <text:time>21:25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fund_5f_master" style:display-name="PageStyle_fund_mas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nd_5f_kiid_5f_metadata" style:display-name="PageStyle_fund_kiid_meta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3-07T21:25:52.40</dc:date>
    <dc:creator>Jose Antonio Cormenzana Elosua</dc:creator>
    <meta:generator>OpenOffice/4.1.15$Win32 OpenOffice.org_project/4115m2$Build-9813</meta:generator>
    <meta:editing-duration>PT11H44M41S</meta:editing-duration>
    <meta:editing-cycles>1</meta:editing-cycles>
    <meta:document-statistic meta:table-count="2" meta:cell-count="200" meta:object-count="0"/>
  </office:meta>
</office:document-meta>
</file>