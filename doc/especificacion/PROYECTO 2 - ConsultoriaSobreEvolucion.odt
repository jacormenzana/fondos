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1.251cm" fo:margin-right="0cm" fo:text-indent="0cm" style:auto-text-indent="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margin-left="1.251cm" fo:margin-right="0cm" fo:text-indent="0cm" style:auto-text-indent="false"/>
      <style:text-properties style:font-name="Arial" fo:font-size="8pt" style:font-size-asian="8pt" style:font-size-complex="8pt"/>
    </style:style>
    <style:style style:name="P3" style:family="paragraph" style:parent-style-name="Standard">
      <style:paragraph-properties loext:contextual-spacing="false" fo:margin-left="1.251cm" fo:margin-right="0cm" fo:text-indent="0cm" style:auto-text-indent="false"/>
      <style:text-properties style:font-name="Arial" fo:font-size="8pt" style:font-size-asian="8pt" style:font-size-complex="8pt"/>
    </style:style>
    <style:style style:name="P4" style:family="paragraph" style:parent-style-name="Standard">
      <style:text-properties style:font-name="Arial" fo:font-size="8pt" style:font-size-asian="8pt" style:font-size-complex="8pt"/>
    </style:style>
    <style:style style:name="P5" style:family="paragraph" style:parent-style-name="Standard">
      <style:paragraph-properties loext:contextual-spacing="false" fo:margin-top="0.423cm" fo:margin-bottom="0.423cm" fo:line-height="100%"/>
      <style:text-properties style:font-name="Arial" fo:font-size="8pt" style:font-size-asian="8pt" style:font-size-complex="8pt"/>
    </style:style>
    <style:style style:name="P6" style:family="paragraph" style:parent-style-name="Standard">
      <style:paragraph-properties fo:margin-left="0cm" fo:margin-right="0cm" fo:text-indent="0cm" style:auto-text-indent="false"/>
      <style:text-properties style:font-name="Arial" fo:font-size="8pt" fo:font-weight="normal" style:font-size-asian="8pt" style:font-weight-asian="normal" style:font-size-complex="8pt" style:font-weight-complex="normal"/>
    </style:style>
    <style:style style:name="P7" style:family="paragraph" style:parent-style-name="Heading_20_2">
      <style:paragraph-properties fo:margin-left="1.251cm" fo:margin-right="0cm" fo:text-indent="0cm" style:auto-text-indent="false"/>
      <style:text-properties style:font-name="Arial" fo:font-size="8pt" fo:font-weight="normal" style:font-size-asian="8pt" style:font-weight-asian="normal" style:font-size-complex="8pt" style:font-weight-complex="normal"/>
    </style:style>
    <style:style style:name="P8" style:family="paragraph" style:parent-style-name="Standard">
      <style:text-properties style:font-name="Arial" fo:font-size="8pt" style:font-size-asian="8pt" style:font-size-complex="8pt"/>
    </style:style>
    <style:style style:name="P9" style:family="paragraph" style:parent-style-name="Standard" style:list-style-name="L1">
      <style:text-properties style:font-name="Arial" fo:font-size="8pt" style:font-size-asian="8pt" style:font-size-complex="8pt"/>
    </style:style>
    <style:style style:name="P10" style:family="paragraph" style:parent-style-name="Standard" style:list-style-name="L2">
      <style:paragraph-properties fo:margin-left="2.501cm" fo:margin-right="0cm" fo:text-indent="-0.635cm" style:auto-text-indent="false"/>
      <style:text-properties style:font-name="Arial" fo:font-size="8pt" style:font-size-asian="8pt" style:font-size-complex="8pt"/>
    </style:style>
    <style:style style:name="P11" style:family="paragraph" style:parent-style-name="Text_20_body" style:list-style-name="L3">
      <style:paragraph-properties fo:margin-left="1.251cm" fo:margin-right="0cm" fo:text-indent="0cm" style:auto-text-indent="false"/>
      <style:text-properties style:font-name="Arial" fo:font-size="8pt" fo:font-weight="normal" style:font-size-asian="8pt" style:font-weight-asian="normal" style:font-size-complex="8pt" style:font-weight-complex="normal"/>
    </style:style>
    <style:style style:name="P12" style:family="paragraph" style:parent-style-name="Text_20_body" style:list-style-name="L4">
      <style:paragraph-properties fo:margin-left="1.251cm" fo:margin-right="0cm" fo:text-indent="0cm" style:auto-text-indent="false"/>
      <style:text-properties style:font-name="Arial" fo:font-size="8pt" fo:font-weight="normal" style:font-size-asian="8pt" style:font-weight-asian="normal" style:font-size-complex="8pt" style:font-weight-complex="normal"/>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font-weight-complex="bold"/>
    </style:style>
    <style:style style:name="T3" style:family="text">
      <style:text-properties fo:color="#000000" fo:font-weight="bold" style:font-weight-asian="bold" style:font-name-complex="Arial" style:font-weight-complex="bold"/>
    </style:style>
    <style:style style:name="T4" style:family="text">
      <style:text-properties style:font-name-complex="Arial"/>
    </style:style>
    <text:list-style style:name="L1">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yecto1 es la primera fase de un proyecto de analítica de fondos de inversión, que quiero construir contigo. Hasta el momento, se puede decir que hemos completado la fase 1, que la relacionada con el descubrimiento y caracterización de una población extensa de fondos de inversión. <text:s/></text:p>
      <text:p text:style-name="P4"/>
      <text:p text:style-name="P4">El proyecto 2 tiene como objetivo<text:span text:style-name="T4"> </text:span><text:span text:style-name="T2">enriquecer cuantitativamente</text:span><text:span text:style-name="T4"> la tabla maestra de fondos creada en el Proyecto 1, incorporando </text:span><text:span text:style-name="T2">datos históricos de comportamiento</text:span><text:span text:style-name="T4">, </text:span><text:span text:style-name="T2">riesgo</text:span><text:span text:style-name="T4"> y </text:span><text:span text:style-name="T2">relación con su benchmark</text:span><text:span text:style-name="T4">, sin alterar en ningún caso la tipología estructural del fondo.</text:span></text:p>
      <text:p text:style-name="P5">El Proyecto 3 utiliza la <text:span text:style-name="T1">tabla maestra tipificada (Proyecto 1)</text:span> y la <text:span text:style-name="T1">tabla enriquecida cuantitativamente (Proyecto 2)</text:span> para seleccionar fondos concretos, agruparlos en bloques funcionales, asignar pesos,y construir carteras coherentes con el entorno macro y el perfil del inversor. <text:span text:style-name="T3">Es el proyecto donde se toman decisiones, pero solo sobre datos ya validados.</text:span></text:p>
      <text:p text:style-name="P4"/>
      <text:p text:style-name="P4">Para darte contexto he subido documentación al proyecto sobre las tres fases</text:p>
      <text:p text:style-name="P4"/>
      <text:p text:style-name="P4">Tambien te he pasado la lógica del proyecto1 actualmente en producción y documentación asociada</text:p>
      <text:p text:style-name="P4"/>
      <text:p text:style-name="P4">Y finalmente te he pasado el volcado de todos atributos de los fondos que han sido procesados hasta el momento.</text:p>
      <text:p text:style-name="P4"/>
      <text:p text:style-name="P4">El objetivo de todo este trabajo es disponer de una plataforma para la toma de decisiones de inversión, que nos permita obtener unas rentabilidades anuales que nos permitan, como mínimo batir a los procesos de inflacción y devaluación monetaria que estamos sufriendo actualmente y que se están viendo agravados por la situación geopolítica, conflictos bélicos, y crisis energéticas que estamos <text:s text:c="2"/>sufriendo en la actualidad. Con el objetivo como mínimo de preservar el capital y a ser posible incrementarlo, tomando como referencia no el IPC sino el IPC + la inflacción monetaria que actualmente se puede <text:s/>objetivar en aproximadamente en un 8%, con lo que la rentabilidad mínima anual en estos momentos debiera ser superior al 11%.</text:p>
      <text:p text:style-name="P4"/>
      <text:p text:style-name="P4">Y por tanto esta toma de decisión se debe basar en datos objetivos sobre evolución de indicadores globales, como </text:p>
      <text:list xml:id="list1820890053893080371" text:style-name="L1">
        <text:list-item>
          <text:p text:style-name="P9">La inflacción interanual, mensualizada, a nivel local (España), continental (Europa) y mundial (Japon China y Estados Unidos)</text:p>
        </text:list-item>
        <text:list-item>
          <text:p text:style-name="P9">la evolución <text:s/>o incremento interanual, mensualizada, de la masa monetaria global, que es un factor que como la inflacción pondera en negativo el valor del dinero, así como l</text:p>
        </text:list-item>
        <text:list-item>
          <text:p text:style-name="P9">La variación del deficit público, interanual mensualizada, a nivel local (España), continental (Europa) y mundial (Japon China y Estados Unidos) </text:p>
        </text:list-item>
        <text:list-item>
          <text:p text:style-name="P9">La variación del Producto interior bruto, interanual mensualizada, a nivel local (España), continental (Europa) y mundial (Japon China y Estados Unidos), nominada en dolares </text:p>
        </text:list-item>
        <text:list-item>
          <text:p text:style-name="P9">La variación del deficit público acumulado, mensualizada, a nivel local (España), continental (Europa) y mundial (Japon China y Estados Unidos), nominada en dolares </text:p>
        </text:list-item>
      </text:list>
      <text:p text:style-name="P4"/>
      <text:p text:style-name="P4">Indicadores de fondo a 1mes, 6 meses 1 año, 3 años y 5 años</text:p>
      <text:p text:style-name="P2">Eficiencia de cada fondo:</text:p>
      <text:list xml:id="list1079862645815224432" text:style-name="L2">
        <text:list-item>
          <text:p text:style-name="P10">Ratio Sharpe</text:p>
        </text:list-item>
        <text:list-item>
          <text:p text:style-name="P10">Ratio Sortino</text:p>
        </text:list-item>
        <text:list-item>
          <text:p text:style-name="P10">Rentabilidad / Volatilidad simpleE indicadores propios de cada fondo de inversión como por ejemplo</text:p>
        </text:list-item>
        <text:list-item>
          <text:p text:style-name="P10">Ratio de información</text:p>
        </text:list-item>
      </text:list>
      <text:p text:style-name="P3"/>
      <text:h text:style-name="P1" text:outline-level="2">Comportamiento frente al Mercado</text:h>
      <text:list xml:id="list2534776815679065109" text:style-name="L3">
        <text:list-item>
          <text:p text:style-name="P11"><text:bookmark text:name="p-rc_4833cf05f6ffa18a-26"/>Alfa de Jensen </text:p>
        </text:list-item>
        <text:list-item>
          <text:p text:style-name="P11"><text:bookmark text:name="p-rc_4833cf05f6ffa18a-27"/>Beta</text:p>
        </text:list-item>
        <text:list-item>
          <text:p text:style-name="P11">Tracking Error</text:p>
        </text:list-item>
      </text:list>
      <text:h text:style-name="P1" text:outline-level="2">Preservación de Capital</text:h>
      <text:list xml:id="list7408398054849318025" text:style-name="L4">
        <text:list-item>
          <text:p text:style-name="P12"><text:bookmark text:name="p-rc_4833cf05f6ffa18a-28"/>Maximum Drawdown</text:p>
        </text:list-item>
        <text:list-item>
          <text:p text:style-name="P12">Ratio de Captura</text:p>
        </text:list-item>
      </text:list>
      <text:p text:style-name="P6"/>
      <text:p text:style-name="P6"/>
      <text:p text:style-name="P4">Llegados a este punto necesito tu consultoría en relación a si ves viable este planteamiento, y en caso afirmativo que consideres que <text:s/>indicadores concretos planteas que tenemos que administrar para lograr los objetivos que buscamos, y detemines que política de descubrimiento, actualización y mantenimiento debemos aplicar para para poder implementar un modelo de estas características, y deteminar de que fuentes podemos adquirirlas estos datos, con que periodicidad, y como gestionar e implementar esta adquisición. Como vamos a implementarla en la fase 2, y <text:s/>a partir de ahí definir las reglas que determinarán los criterios de selección de fondos en la fase 3.</text:p>
      <text:p text:style-name="Standard"/>
      <text:p text:style-name="Standard"/>
      <text:p text:style-name="Standard"/>
      <text:p text:style-name="Standard">ya que los fondos restantes se caracterizan de un modo propio, según el cual, hay atributos que si se están informando en otras clases, y no en esta, y por tanto, estamos perdiendo información. La cuestión es que aunquede otras clases que no se est´ñan informanfo están siendo caracterizados de <text:soft-page-break/>manala ejecución de este blpero que <text:s/>tanto no se esta </text:p>
      <text:p text:style-name="Standard"/>
      <text:p text:style-name="Standard"/>
      <text:p text:style-name="Standard">Este es un grupo de fondos que no procedían de un proceso 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3-08T19:08:20.22</meta:creation-date>
    <meta:editing-duration>P8DT2H52M1S</meta:editing-duration>
    <meta:editing-cycles>4</meta:editing-cycles>
    <meta:generator>OpenOffice/4.1.15$Win32 OpenOffice.org_project/4115m2$Build-9813</meta:generator>
    <meta:initial-creator>Jose Antonio Cormenzana Elosua</meta:initial-creator>
    <dc:date>2026-03-17T18:21:24.44</dc:date>
    <dc:creator>Jose Antonio Cormenzana Elosua</dc:creator>
    <meta:document-statistic meta:table-count="0" meta:image-count="0" meta:object-count="0" meta:page-count="2" meta:paragraph-count="29" meta:word-count="677" meta:character-count="4247"/>
  </office:meta>
</office:document-meta>
</file>