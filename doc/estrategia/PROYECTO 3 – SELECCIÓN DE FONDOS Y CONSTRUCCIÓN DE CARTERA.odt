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4.5799in" fo:margin-left="0in" fo:margin-top="0in" fo:margin-bottom="0in" table:align="left"/>
    </style:style>
    <style:style style:name="Table1.A" style:family="table-column">
      <style:table-column-properties style:column-width="2.1597in"/>
    </style:style>
    <style:style style:name="Table1.B" style:family="table-column">
      <style:table-column-properties style:column-width="2.4194in"/>
    </style:style>
    <style:style style:name="Table1.1" style:family="table-row">
      <style:table-row-properties style:min-row-height="0.3472in" fo:keep-together="auto"/>
    </style:style>
    <style:style style:name="Table1.A1" style:family="table-cell">
      <style:table-cell-properties style:vertical-align="" fo:padding="0.0694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665in" fo:margin-bottom="0.1665in" loext:contextual-spacing="false" fo:line-height="100%"/>
    </style:style>
    <style:style style:name="P3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1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2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1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1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1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1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1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1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1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1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1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2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7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" style:family="paragraph" style:parent-style-name="Standard" style:list-style-name="WWNum1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9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0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1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2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3" style:family="paragraph" style:parent-style-name="Standard" style:list-style-name="WWNum1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4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5" style:family="paragraph" style:parent-style-name="Standard" style:list-style-name="WWNum1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6" style:family="paragraph" style:parent-style-name="Standard" style:list-style-name="WWNum1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7" style:family="paragraph" style:parent-style-name="Standard" style:list-style-name="WWNum1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8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9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0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1" style:family="paragraph" style:parent-style-name="Standard" style:list-style-name="WWNum1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2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3" style:family="paragraph" style:parent-style-name="Standard" style:list-style-name="WWNum2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4" style:family="paragraph" style:parent-style-name="Standard" style:list-style-name="WWNum1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5" style:family="paragraph" style:parent-style-name="Standard" style:list-style-name="WWNum1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6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7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8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9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0" style:family="paragraph" style:parent-style-name="Standard" style:list-style-name="WWNum1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1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2" style:family="paragraph" style:parent-style-name="Standard" style:list-style-name="WWNum1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3" style:family="paragraph" style:parent-style-name="Standard" style:list-style-name="WWNum1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4" style:family="paragraph" style:parent-style-name="Standard" style:list-style-name="WWNum1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5" style:family="paragraph" style:parent-style-name="Standard" style:list-style-name="WWNum1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6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7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8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9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0" style:family="paragraph" style:parent-style-name="Standard">
      <style:paragraph-properties fo:margin-left="0.4165in" fo:margin-right="0.4165in" fo:margin-top="0.1665in" fo:margin-bottom="0.1665in" loext:contextual-spacing="false" fo:line-height="100%" fo:text-indent="0in" style:auto-text-indent="false"/>
    </style:style>
    <style:style style:name="P61" style:family="paragraph" style:parent-style-name="Heading_20_1" style:master-page-name="Standard">
      <style:paragraph-properties fo:margin-top="0.3335in" fo:margin-bottom="0.0835in" loext:contextual-spacing="false" fo:line-height="100%" fo:keep-together="auto" style:page-number="1" fo:keep-with-next="auto"/>
    </style:style>
    <style:style style:name="P62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63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64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3pt" fo:font-weight="bold" style:font-size-asian="23pt" style:font-weight-asian="bold" style:font-size-complex="23pt" style:font-weight-complex="bold"/>
    </style:style>
    <style:style style:name="T2" style:family="text">
      <style:text-properties fo:font-size="17pt" fo:font-weight="bold" style:font-size-asian="17pt" style:font-weight-asian="bold" style:font-size-complex="17pt" style:font-weight-complex="bold"/>
    </style:style>
    <style:style style:name="T3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4" style:family="text">
      <style:text-properties fo:font-weight="bold" style:font-weight-asian="bold" style:font-weight-complex="bol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text:bookmark text:name="_lbvz6rzdkush"/><text:span text:style-name="T1">📘 PROYECTO 3 – SELECCIÓN DE FONDOS Y CONSTRUCCIÓN DE CARTERA</text:span></text:p>
      <text:p text:style-name="P63"><text:bookmark text:name="_qyux5lmr96n0"/><text:span text:style-name="T2">1️⃣ ÁMBITO DEL PROYECTO</text:span></text:p>
      <text:p text:style-name="P62"><text:bookmark text:name="_t7uz499y3s6p"/><text:span text:style-name="T3">Qué es el Proyecto 3</text:span></text:p>
      <text:p text:style-name="P2">El Proyecto 3 utiliza la <text:span text:style-name="T4">tabla maestra tipificada (Proyecto 1)</text:span> y la <text:span text:style-name="T4">tabla enriquecida cuantitativamente (Proyecto 2)</text:span> para:</text:p>
      <text:list xml:id="list3308438440" text:style-name="WWNum1">
        <text:list-item>
          <text:p text:style-name="P3">seleccionar fondos concretos,<text:line-break/></text:p>
        </text:list-item>
        <text:list-item>
          <text:p text:style-name="P23">agruparlos en bloques funcionales,<text:line-break/></text:p>
        </text:list-item>
        <text:list-item>
          <text:p text:style-name="P23">asignar pesos,<text:line-break/></text:p>
        </text:list-item>
        <text:list-item>
          <text:p text:style-name="P40">y construir carteras coherentes con el entorno macro y el perfil del inversor.<text:line-break/></text:p>
        </text:list-item>
      </text:list>
      <text:p text:style-name="P2">Es el proyecto donde <text:span text:style-name="T4">se toman decisiones</text:span>, pero <text:span text:style-name="T4">solo</text:span> sobre datos ya validados.</text:p>
      <text:p text:style-name="P62"><text:bookmark text:name="_8z1jupuladce"/><text:span text:style-name="T3">Qué NO es el Proyecto 3</text:span></text:p>
      <text:list xml:id="list1298098662" text:style-name="WWNum18">
        <text:list-item>
          <text:p text:style-name="P4">❌ No descubre fondos<text:line-break/></text:p>
        </text:list-item>
        <text:list-item>
          <text:p text:style-name="P24">❌ No corrige tipologías<text:line-break/></text:p>
        </text:list-item>
        <text:list-item>
          <text:p text:style-name="P24">❌ No recalcula indicadores<text:line-break/></text:p>
        </text:list-item>
        <text:list-item>
          <text:p text:style-name="P41">❌ No persigue optimización matemática ciega<text:line-break/></text:p>
        </text:list-item>
      </text:list>
      <text:p text:style-name="P2">👉 Es un proyecto <text:span text:style-name="T4">estratégico y de gobierno de cartera</text:span>, no de data science experimental.</text:p>
      <text:p text:style-name="Standard"><draw:rect text:anchor-type="as-char" style:rel-width="100%" draw:z-index="0" draw:style-name="gr1" draw:text-style-name="P64" svg:width="0.0012in" svg:height="0.0213in"><text:p/></draw:rect></text:p>
      <text:p text:style-name="P63"><text:bookmark text:name="_yz5voxh8k3"/><text:span text:style-name="T2">2️⃣ OBJETIVO DEL PROYECTO</text:span></text:p>
      <text:p text:style-name="P62"><text:bookmark text:name="_5xrvxg2pcfcq"/><text:span text:style-name="T3">Objetivo principal</text:span></text:p>
      <text:p text:style-name="P2">Construir una <text:span text:style-name="T4">cartera robusta, defendible y adaptable</text:span>, que:</text:p>
      <text:list xml:id="list1145159441" text:style-name="WWNum3">
        <text:list-item>
          <text:p text:style-name="P5">preserve poder adquisitivo real,<text:line-break/></text:p>
        </text:list-item>
        <text:list-item>
          <text:p text:style-name="P25"><text:soft-page-break/>controle drawdowns severos,<text:line-break/></text:p>
        </text:list-item>
        <text:list-item>
          <text:p text:style-name="P25">sea coherente con el ciclo macro,<text:line-break/></text:p>
        </text:list-item>
        <text:list-item>
          <text:p text:style-name="P42">y minimice el riesgo de errores irreversibles.<text:line-break/></text:p>
        </text:list-item>
      </text:list>
      <text:p text:style-name="P62"><text:bookmark text:name="_1577bumk8ucu"/><text:span text:style-name="T3">Objetivos secundarios</text:span></text:p>
      <text:list xml:id="list4103072659" text:style-name="WWNum20">
        <text:list-item>
          <text:p text:style-name="P6">Reducir dependencia de narrativas comerciales.<text:line-break/></text:p>
        </text:list-item>
        <text:list-item>
          <text:p text:style-name="P26">Evitar sesgos de moda o retrospectivos.<text:line-break/></text:p>
        </text:list-item>
        <text:list-item>
          <text:p text:style-name="P26">Permitir revisiones periódicas con reglas claras.<text:line-break/></text:p>
        </text:list-item>
        <text:list-item>
          <text:p text:style-name="P43">Facilitar comunicación y justificación de decisiones.<text:line-break/></text:p>
        </text:list-item>
      </text:list>
      <text:p text:style-name="Standard"><draw:rect text:anchor-type="as-char" style:rel-width="100%" draw:z-index="1" draw:style-name="gr1" draw:text-style-name="P64" svg:width="0.0012in" svg:height="0.0213in"><text:p/></draw:rect></text:p>
      <text:p text:style-name="P63"><text:bookmark text:name="_jyc1fu5q5d2p"/><text:span text:style-name="T2">3️⃣ DATOS DE ENTRADA</text:span></text:p>
      <text:p text:style-name="P62"><text:bookmark text:name="_ihg1y6xyziig"/><text:span text:style-name="T3">📥 Entrada obligatoria</text:span></text:p>
      <text:p text:style-name="P2">Tabla final del Proyecto 2, con:</text:p>
      <text:list xml:id="list2527119550" text:style-name="WWNum11">
        <text:list-item>
          <text:p text:style-name="P7">ISIN<text:line-break/></text:p>
        </text:list-item>
        <text:list-item>
          <text:p text:style-name="P27">Gestora<text:line-break/></text:p>
        </text:list-item>
        <text:list-item>
          <text:p text:style-name="P27">Naturaleza del fondo<text:line-break/></text:p>
        </text:list-item>
        <text:list-item>
          <text:p text:style-name="P27">SRRI (KIID)<text:line-break/></text:p>
        </text:list-item>
        <text:list-item>
          <text:p text:style-name="P27">Rentabilidades (YTD, 1y, 3y, 5y)<text:line-break/></text:p>
        </text:list-item>
        <text:list-item>
          <text:p text:style-name="P27">Volatilidades<text:line-break/></text:p>
        </text:list-item>
        <text:list-item>
          <text:p text:style-name="P27">Drawdowns<text:line-break/></text:p>
        </text:list-item>
        <text:list-item>
          <text:p text:style-name="P27">Ratios Sharpe / Sortino<text:line-break/></text:p>
        </text:list-item>
        <text:list-item>
          <text:p text:style-name="P27">Benchmark (si existe)<text:line-break/></text:p>
        </text:list-item>
        <text:list-item>
          <text:p text:style-name="P27"><text:soft-page-break/>Métricas de consistencia<text:line-break/></text:p>
        </text:list-item>
        <text:list-item>
          <text:p text:style-name="P44">Correlaciones relevantes<text:line-break/></text:p>
        </text:list-item>
      </text:list>
      <text:p text:style-name="P2">👉 <text:span text:style-name="T4">No se usan datos no presentes aquí</text:span>.</text:p>
      <text:p text:style-name="Standard"><draw:rect text:anchor-type="as-char" style:rel-width="100%" draw:z-index="2" draw:style-name="gr1" draw:text-style-name="P64" svg:width="0.0012in" svg:height="0.0213in"><text:p/></draw:rect></text:p>
      <text:p text:style-name="P63"><text:bookmark text:name="_8eslsec9eej8"/><text:span text:style-name="T2">4️⃣ ESTRUCTURA DE LA CARTERA (MARCO DE BLOQUES)</text:span></text:p>
      <text:p text:style-name="P2">La cartera se construye por <text:span text:style-name="T4">bloques funcionales</text:span>, no por activos aislados.</text:p>
      <text:p text:style-name="P2">Ejemplo típico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4">Bloque</text:span></text:p>
          </table:table-cell>
          <table:table-cell table:style-name="Table1.A1" office:value-type="string">
            <text:p text:style-name="P1"><text:span text:style-name="T4">Función</text:span></text:p>
          </table:table-cell>
        </table:table-row>
        <table:table-row table:style-name="Table1.1">
          <table:table-cell table:style-name="Table1.A1" office:value-type="string">
            <text:p text:style-name="Standard">Bloque 1 – Monetarios</text:p>
          </table:table-cell>
          <table:table-cell table:style-name="Table1.A1" office:value-type="string">
            <text:p text:style-name="Standard">Liquidez, colchón, opcionalidad</text:p>
          </table:table-cell>
        </table:table-row>
        <table:table-row table:style-name="Table1.1">
          <table:table-cell table:style-name="Table1.A1" office:value-type="string">
            <text:p text:style-name="Standard">Bloque 2 – RF corto</text:p>
          </table:table-cell>
          <table:table-cell table:style-name="Table1.A1" office:value-type="string">
            <text:p text:style-name="Standard">Carry defensivo</text:p>
          </table:table-cell>
        </table:table-row>
        <table:table-row table:style-name="Table1.1">
          <table:table-cell table:style-name="Table1.A1" office:value-type="string">
            <text:p text:style-name="Standard">Bloque 3 – RF flexible</text:p>
          </table:table-cell>
          <table:table-cell table:style-name="Table1.A1" office:value-type="string">
            <text:p text:style-name="Standard">Protección ante tipos</text:p>
          </table:table-cell>
        </table:table-row>
        <table:table-row table:style-name="Table1.1">
          <table:table-cell table:style-name="Table1.A1" office:value-type="string">
            <text:p text:style-name="Standard">Bloque 4 – Mixtos defensivos</text:p>
          </table:table-cell>
          <table:table-cell table:style-name="Table1.A1" office:value-type="string">
            <text:p text:style-name="Standard">Estabilidad intermedia</text:p>
          </table:table-cell>
        </table:table-row>
        <table:table-row table:style-name="Table1.1">
          <table:table-cell table:style-name="Table1.A1" office:value-type="string">
            <text:p text:style-name="Standard">Bloque 5 – Crecimiento real</text:p>
          </table:table-cell>
          <table:table-cell table:style-name="Table1.A1" office:value-type="string">
            <text:p text:style-name="Standard">Protección inflación / crecimiento</text:p>
          </table:table-cell>
        </table:table-row>
      </table:table>
      <text:p text:style-name="P2">Cada bloque tiene <text:span text:style-name="T4">criterios propios</text:span>, pero una metodología común.</text:p>
      <text:p text:style-name="Standard"><draw:rect text:anchor-type="as-char" style:rel-width="100%" draw:z-index="3" draw:style-name="gr1" draw:text-style-name="P64" svg:width="0.0012in" svg:height="0.0213in"><text:p/></draw:rect></text:p>
      <text:p text:style-name="P63"><text:bookmark text:name="_k481zcyrue50"/><text:span text:style-name="T2">5️⃣ INDICADORES CLAVE UTILIZADOS EN PROYECTO 3</text:span></text:p>
      <text:p text:style-name="P62"><text:bookmark text:name="_1fyzz0te7v2c"/><text:span text:style-name="T3">5.1 Indicadores de descarte (hard filters)</text:span></text:p>
      <text:p text:style-name="P2">Fondos que <text:span text:style-name="T4">no cumplen</text:span> se excluyen directamente:</text:p>
      <text:list xml:id="list1250127723" text:style-name="WWNum16">
        <text:list-item>
          <text:p text:style-name="P8">Drawdown máximo excesivo para su bloque<text:line-break/></text:p>
        </text:list-item>
        <text:list-item>
          <text:p text:style-name="P28">Volatilidad superior a la media del bloque<text:line-break/></text:p>
        </text:list-item>
        <text:list-item>
          <text:p text:style-name="P28">Rentabilidad sistemáticamente inferior<text:line-break/></text:p>
        </text:list-item>
        <text:list-item>
          <text:p text:style-name="P28"><text:soft-page-break/>Inconsistencia extrema (muchos años negativos)<text:line-break/></text:p>
        </text:list-item>
        <text:list-item>
          <text:p text:style-name="P45">SRRI incoherente con el bloque<text:line-break/></text:p>
        </text:list-item>
      </text:list>
      <text:p text:style-name="Standard"><draw:rect text:anchor-type="as-char" style:rel-width="100%" draw:z-index="4" draw:style-name="gr1" draw:text-style-name="P64" svg:width="0.0012in" svg:height="0.0213in"><text:p/></draw:rect></text:p>
      <text:p text:style-name="P62"><text:bookmark text:name="_ddfc7qyylfdv"/><text:span text:style-name="T3">5.2 Indicadores de selección (ranking interno)</text:span></text:p>
      <text:p text:style-name="P2">Dentro de cada bloque, se priorizan fondos con:</text:p>
      <text:list xml:id="list2749504222" text:style-name="WWNum7">
        <text:list-item>
          <text:p text:style-name="P9">Sharpe y Sortino superiores a la media<text:line-break/></text:p>
        </text:list-item>
        <text:list-item>
          <text:p text:style-name="P29">Mejor relación retorno / drawdown<text:line-break/></text:p>
        </text:list-item>
        <text:list-item>
          <text:p text:style-name="P29">Mayor consistencia temporal<text:line-break/></text:p>
        </text:list-item>
        <text:list-item>
          <text:p text:style-name="P46">Menor correlación con otros fondos del bloque<text:line-break/></text:p>
        </text:list-item>
      </text:list>
      <text:p text:style-name="Standard"><draw:rect text:anchor-type="as-char" style:rel-width="100%" draw:z-index="5" draw:style-name="gr1" draw:text-style-name="P64" svg:width="0.0012in" svg:height="0.0213in"><text:p/></draw:rect></text:p>
      <text:p text:style-name="P62"><text:bookmark text:name="_f7usr85x1o82"/><text:span text:style-name="T3">5.3 Indicadores de complementariedad</text:span></text:p>
      <text:p text:style-name="P2">Usados para construir el conjunto final:</text:p>
      <text:list xml:id="list4083156491" text:style-name="WWNum5">
        <text:list-item>
          <text:p text:style-name="P10">Correlación cruzada<text:line-break/></text:p>
        </text:list-item>
        <text:list-item>
          <text:p text:style-name="P30">Diferencias de estilo<text:line-break/></text:p>
        </text:list-item>
        <text:list-item>
          <text:p text:style-name="P30">Sensibilidad distinta a tipos / crédito<text:line-break/></text:p>
        </text:list-item>
        <text:list-item>
          <text:p text:style-name="P47">Diferente comportamiento en estrés<text:line-break/></text:p>
        </text:list-item>
      </text:list>
      <text:p text:style-name="Standard"><draw:rect text:anchor-type="as-char" style:rel-width="100%" draw:z-index="6" draw:style-name="gr1" draw:text-style-name="P64" svg:width="0.0012in" svg:height="0.0213in"><text:p/></draw:rect></text:p>
      <text:p text:style-name="P63"><text:bookmark text:name="_wyvn0y7x29ar"/><text:span text:style-name="T2">6️⃣ CRITERIOS DE SELECCIÓN DE FONDOS (FORMALIZADOS)</text:span></text:p>
      <text:p text:style-name="P62"><text:bookmark text:name="_vw637wj9y2x9"/><text:span text:style-name="T3">Criterios estructurales (Proyecto 1)</text:span></text:p>
      <text:list xml:id="list1582609575" text:style-name="WWNum4">
        <text:list-item>
          <text:p text:style-name="P11">Tipología correcta para el bloque<text:line-break/></text:p>
        </text:list-item>
        <text:list-item>
          <text:p text:style-name="P31">Uso de derivados compatible<text:line-break/></text:p>
        </text:list-item>
        <text:list-item>
          <text:p text:style-name="P48"><text:soft-page-break/>Benchmark claro o justificación de ausencia<text:line-break/></text:p>
        </text:list-item>
      </text:list>
      <text:p text:style-name="P62"><text:bookmark text:name="_2t1b9cay3ot6"/><text:span text:style-name="T3">Criterios cuantitativos (Proyecto 2)</text:span></text:p>
      <text:list xml:id="list1107529643" text:style-name="WWNum8">
        <text:list-item>
          <text:p text:style-name="P12">Rentabilidad real positiva o defendible<text:line-break/></text:p>
        </text:list-item>
        <text:list-item>
          <text:p text:style-name="P32">Volatilidad controlada<text:line-break/></text:p>
        </text:list-item>
        <text:list-item>
          <text:p text:style-name="P32">Drawdowns recuperables<text:line-break/></text:p>
        </text:list-item>
        <text:list-item>
          <text:p text:style-name="P49">Consistencia histórica<text:line-break/></text:p>
        </text:list-item>
      </text:list>
      <text:p text:style-name="P62"><text:bookmark text:name="_lfgd8jkuzmzy"/><text:span text:style-name="T3">Criterios estratégicos (Proyecto 3)</text:span></text:p>
      <text:list xml:id="list807201773" text:style-name="WWNum15">
        <text:list-item>
          <text:p text:style-name="P13">Rol claro en cartera<text:line-break/></text:p>
        </text:list-item>
        <text:list-item>
          <text:p text:style-name="P33">Aporta diversificación<text:line-break/></text:p>
        </text:list-item>
        <text:list-item>
          <text:p text:style-name="P33">No duplica riesgo existente<text:line-break/></text:p>
        </text:list-item>
        <text:list-item>
          <text:p text:style-name="P50">Escala correctamente con el peso asignado<text:line-break/></text:p>
        </text:list-item>
      </text:list>
      <text:p text:style-name="Standard"><draw:rect text:anchor-type="as-char" style:rel-width="100%" draw:z-index="7" draw:style-name="gr1" draw:text-style-name="P64" svg:width="0.0012in" svg:height="0.0213in"><text:p/></draw:rect></text:p>
      <text:p text:style-name="P63"><text:bookmark text:name="_9cpxkcc3b1js"/><text:span text:style-name="T2">7️⃣ PROCESO DE SELECCIÓN (PASO A PASO)</text:span></text:p>
      <text:list xml:id="list145503511" text:style-name="WWNum2">
        <text:list-item>
          <text:p text:style-name="P14">Filtrar fondos por naturaleza → bloque<text:line-break/></text:p>
        </text:list-item>
        <text:list-item>
          <text:p text:style-name="P34">Aplicar filtros duros<text:line-break/></text:p>
        </text:list-item>
        <text:list-item>
          <text:p text:style-name="P34">Rankear por eficiencia<text:line-break/></text:p>
        </text:list-item>
        <text:list-item>
          <text:p text:style-name="P34">Analizar solapamientos<text:line-break/></text:p>
        </text:list-item>
        <text:list-item>
          <text:p text:style-name="P34">Seleccionar subconjunto óptimo<text:line-break/></text:p>
        </text:list-item>
        <text:list-item>
          <text:p text:style-name="P34">Asignar pesos<text:line-break/></text:p>
        </text:list-item>
        <text:list-item>
          <text:p text:style-name="P34">Evaluar cartera agregada<text:line-break/></text:p>
        </text:list-item>
        <text:list-item>
          <text:p text:style-name="P51">Ajustar por coherencia macro<text:line-break/></text:p>
        </text:list-item>
      </text:list>
      <text:p text:style-name="Standard"><text:soft-page-break/><draw:rect text:anchor-type="as-char" style:rel-width="100%" draw:z-index="8" draw:style-name="gr1" draw:text-style-name="P64" svg:width="0.0012in" svg:height="0.0213in"><text:p/></draw:rect></text:p>
      <text:p text:style-name="P63"><text:bookmark text:name="_ekiwyuefuwqm"/><text:span text:style-name="T2">8️⃣ CASOS DE USO DEL PROYECTO 3</text:span></text:p>
      <text:p text:style-name="P62"><text:bookmark text:name="_ofx4kbrj3wy8"/><text:span text:style-name="T3">CU-1: Construcción de cartera defensiva</text:span></text:p>
      <text:list xml:id="list1030483640" text:style-name="WWNum19">
        <text:list-item>
          <text:p text:style-name="P15">Perfil conservador<text:line-break/></text:p>
        </text:list-item>
        <text:list-item>
          <text:p text:style-name="P35">Prioridad: preservación de capital<text:line-break/></text:p>
        </text:list-item>
        <text:list-item>
          <text:p text:style-name="P52">Peso alto en Bloques 1–2<text:line-break/></text:p>
        </text:list-item>
      </text:list>
      <text:p text:style-name="P62"><text:bookmark text:name="_okhngr5bt9a6"/><text:span text:style-name="T3">CU-2: Rebalanceo por cambio de ciclo</text:span></text:p>
      <text:list xml:id="list713794864" text:style-name="WWNum12">
        <text:list-item>
          <text:p text:style-name="P16">Subida de tipos<text:line-break/></text:p>
        </text:list-item>
        <text:list-item>
          <text:p text:style-name="P36">Reducción de duración<text:line-break/></text:p>
        </text:list-item>
        <text:list-item>
          <text:p text:style-name="P53">Aumento de liquidez y RF corto<text:line-break/></text:p>
        </text:list-item>
      </text:list>
      <text:p text:style-name="P62"><text:bookmark text:name="_7jqssef7iweq"/><text:span text:style-name="T3">CU-3: Sustitución de fondo ineficiente</text:span></text:p>
      <text:list xml:id="list139909118" text:style-name="WWNum13">
        <text:list-item>
          <text:p text:style-name="P17">Fondo con drawdown excesivo<text:line-break/></text:p>
        </text:list-item>
        <text:list-item>
          <text:p text:style-name="P37">Sustitución por alternativa del mismo bloque<text:line-break/></text:p>
        </text:list-item>
        <text:list-item>
          <text:p text:style-name="P54">Impacto mínimo en cartera global<text:line-break/></text:p>
        </text:list-item>
      </text:list>
      <text:p text:style-name="P62"><text:bookmark text:name="_qpvxghlh750a"/><text:span text:style-name="T3">CU-4: Evaluación ex-ante de riesgo</text:span></text:p>
      <text:list xml:id="list3276959355" text:style-name="WWNum17">
        <text:list-item>
          <text:p text:style-name="P18">Simulación de drawdowns agregados<text:line-break/></text:p>
        </text:list-item>
        <text:list-item>
          <text:p text:style-name="P55">Identificación de concentraciones ocultas<text:line-break/></text:p>
        </text:list-item>
      </text:list>
      <text:p text:style-name="P62"><text:bookmark text:name="_so6pqijfgb4a"/><text:span text:style-name="T3">CU-5: Comunicación y gobernanza</text:span></text:p>
      <text:list xml:id="list3946272921" text:style-name="WWNum6">
        <text:list-item>
          <text:p text:style-name="P19">Justificación clara de cada fondo<text:line-break/></text:p>
        </text:list-item>
        <text:list-item>
          <text:p text:style-name="P38">Explicación del rol de cada bloque<text:line-break/></text:p>
        </text:list-item>
        <text:list-item>
          <text:p text:style-name="P56">Argumentación basada en datos<text:line-break/></text:p>
        </text:list-item>
      </text:list>
      <text:p text:style-name="Standard"><text:soft-page-break/><draw:rect text:anchor-type="as-char" style:rel-width="100%" draw:z-index="9" draw:style-name="gr1" draw:text-style-name="P64" svg:width="0.0012in" svg:height="0.0213in"><text:p/></draw:rect></text:p>
      <text:p text:style-name="P63"><text:bookmark text:name="_6a0s8duqprwx"/><text:span text:style-name="T2">9️⃣ CONTROLES Y GOBERNANZA</text:span></text:p>
      <text:list xml:id="list662955260" text:style-name="WWNum9">
        <text:list-item>
          <text:p text:style-name="P20">Trazabilidad total de decisiones<text:line-break/></text:p>
        </text:list-item>
        <text:list-item>
          <text:p text:style-name="P39">Separación clara entre datos y criterio<text:line-break/></text:p>
        </text:list-item>
        <text:list-item>
          <text:p text:style-name="P39">Reglas explícitas de entrada/salida<text:line-break/></text:p>
        </text:list-item>
        <text:list-item>
          <text:p text:style-name="P57">Documentación de excepciones<text:line-break/></text:p>
        </text:list-item>
      </text:list>
      <text:p text:style-name="Standard"><draw:rect text:anchor-type="as-char" style:rel-width="100%" draw:z-index="10" draw:style-name="gr1" draw:text-style-name="P64" svg:width="0.0012in" svg:height="0.0213in"><text:p/></draw:rect></text:p>
      <text:p text:style-name="P63"><text:bookmark text:name="_cayowfku0kna"/><text:span text:style-name="T2">🔚 CONCLUSIÓN</text:span></text:p>
      <text:p text:style-name="P2">En una frase:</text:p>
      <text:p text:style-name="P60"><text:span text:style-name="T4">El Proyecto 3 transforma datos fiables en decisiones coherentes.</text:span></text:p>
      <text:p text:style-name="P2">Es el punto donde:</text:p>
      <text:list xml:id="list1012641482" text:style-name="WWNum14">
        <text:list-item>
          <text:p text:style-name="P21">la técnica se convierte en estrategia,<text:line-break/></text:p>
        </text:list-item>
        <text:list-item>
          <text:p text:style-name="P58">y el análisis en protección real del patrimonio.<text:line-break/></text:p>
        </text:list-item>
      </text:list>
      <text:p text:style-name="P2">Cuando quieras, el siguiente paso natural es:</text:p>
      <text:list xml:id="list2335254856" text:style-name="WWNum10">
        <text:list-item>
          <text:p text:style-name="P22">diseñar un <text:span text:style-name="T4">ejemplo completo de cartera</text:span> usando este marco,<text:line-break/></text:p>
        </text:list-item>
        <text:list-item>
          <text:p text:style-name="P59">o formalizar los <text:span text:style-name="T4">criterios de rebalanceo y revisión periódica</text:span>.<text:line-break/></text:p>
        </text:list-item>
      </text:list>
      <text:p text:style-name="P2">Seguimo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7" meta:paragraph-count="148" meta:word-count="737" meta:character-count="4646" meta:non-whitespace-character-count="4041"/>
    <meta:generator>LibreOfficeDev/6.0.5.2$Linux_X86_64 LibreOffice_project/</meta:generator>
  </office:meta>
</office:document-meta>
</file>